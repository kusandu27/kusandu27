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>
      <style:paragraph-properties fo:margin-top="0in" fo:margin-bottom="0in" style:contextual-spacing="false"/>
    </style:style>
    <style:style style:name="P8" style:family="paragraph" style:parent-style-name="Text_20_body" style:list-style-name="L6"/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  <style:text-properties style:text-underline-style="none"/>
    </style:style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Preformatted_20_Text">
      <style:paragraph-properties fo:margin-left="0in" fo:margin-right="0in" fo:text-indent="0in" style:auto-text-indent="false"/>
    </style:style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7" style:family="paragraph" style:parent-style-name="Text_20_body" style:list-style-name="L9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<text:span text:style-name="Source_20_Text">sort</text:span></text:span> (basic idea):</text:p>
      <text:p text:style-name="Text_20_body">It just <text:span text:style-name="Strong_20_Emphasis">arranges things in order</text:span>.</text:p>
      <text:list text:style-name="L1">
        <text:list-item>
          <text:p text:style-name="P1">If it’s <text:span text:style-name="Strong_20_Emphasis">text</text:span> → it puts lines in <text:span text:style-name="Strong_20_Emphasis">alphabetical order (A → Z)</text:span></text:p>
        </text:list-item>
        <text:list-item>
          <text:p text:style-name="P1">If it’s <text:span text:style-name="Strong_20_Emphasis">numbers</text:span> → it puts them in <text:span text:style-name="Strong_20_Emphasis">small → big</text:span></text:p>
        </text:list-item>
      </text:list>
      <text:h text:style-name="Heading_20_3" text:outline-level="3">Example:</text:h>
      <text:p text:style-name="Text_20_body">If you have this:</text:p>
      <text:p text:style-name="Preformatted_20_Text"><text:span text:style-name="Source_20_Text">banana</text:span></text:p>
      <text:p text:style-name="Preformatted_20_Text"><text:span text:style-name="Source_20_Text">apple</text:span></text:p>
      <text:p text:style-name="P2"><text:span text:style-name="Source_20_Text">cherry</text:span></text:p>
      <text:p text:style-name="Text_20_body">After <text:span text:style-name="Source_20_Text">sort</text:span>:</text:p>
      <text:p text:style-name="Preformatted_20_Text"><text:span text:style-name="Source_20_Text">apple</text:span></text:p>
      <text:p text:style-name="Preformatted_20_Text"><text:span text:style-name="Source_20_Text">banana</text:span></text:p>
      <text:p text:style-name="P2"><text:span text:style-name="Source_20_Text">cherry</text:span></text:p>
      <text:h text:style-name="Heading_20_3" text:outline-level="3">For numbers:</text:h>
      <text:p text:style-name="Preformatted_20_Text"><text:span text:style-name="Source_20_Text">3</text:span></text:p>
      <text:p text:style-name="Preformatted_20_Text"><text:span text:style-name="Source_20_Text">1</text:span></text:p>
      <text:p text:style-name="P2"><text:span text:style-name="Source_20_Text">2</text:span></text:p>
      <text:p text:style-name="Text_20_body">After <text:span text:style-name="Source_20_Text">sort</text:span>: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2"><text:span text:style-name="Source_20_Text">3</text:span></text:p>
      <text:p text:style-name="Horizontal_20_Line"/>
      <text:p text:style-name="Text_20_body">💡 Think of it like:</text:p>
      <text:p text:style-name="Quotations">“Clean this messy list and put it in order.”</text:p>
      <text:p text:style-name="Horizontal_20_Line"/>
      <text:p text:style-name="Text_20_body">Later you’ll see options like:</text:p>
      <text:list text:style-name="L2">
        <text:list-item>
          <text:p text:style-name="P3"><text:span text:style-name="Source_20_Text">-r</text:span> → reverse (Z → A or big → small)</text:p>
        </text:list-item>
        <text:list-item>
          <text:p text:style-name="P3"><text:span text:style-name="Source_20_Text">-n</text:span> → sort numbers properly</text:p>
        </text:list-item>
      </text:list>
      <text:p text:style-name="Text_20_body">But for now, just remember:<text:line-break/>👉 <text:span text:style-name="Strong_20_Emphasis"><text:span text:style-name="Source_20_Text">sort</text:span></text:span><text:span text:style-name="Strong_20_Emphasis"> = organize things in order</text:span></text:p>
      <text:p text:style-name="Horizontal_20_Line"/>
      <text:p text:style-name="Text_20_body"/>
      <text:h text:style-name="Heading_20_3" text:outline-level="3"><text:soft-page-break/><text:span text:style-name="Strong_20_Emphasis"><text:span text:style-name="Source_20_Text">less</text:span></text:span><text:span text:style-name="Strong_20_Emphasis"> (simple idea):</text:span></text:h>
      <text:p text:style-name="Text_20_body">It lets you <text:span text:style-name="Strong_20_Emphasis">view content slowly, one screen at a time</text:span>.</text:p>
      <text:p text:style-name="Text_20_body">Think:</text:p>
      <text:p text:style-name="Quotations">“Open this file, but don’t dump everything at once — let me scroll.”</text:p>
      <text:p text:style-name="Horizontal_20_Line"/>
      <text:h text:style-name="Heading_20_3" text:outline-level="3">Example:</text:h>
      <text:p text:style-name="P2"><text:span text:style-name="Source_20_Text">less file.txt</text:span></text:p>
      <text:p text:style-name="Text_20_body">👉 This opens <text:span text:style-name="Source_20_Text">file.txt</text:span> and lets you:</text:p>
      <text:list text:style-name="L3">
        <text:list-item>
          <text:p text:style-name="P4">Scroll up/down with arrow keys</text:p>
        </text:list-item>
        <text:list-item>
          <text:p text:style-name="P4">Press <text:span text:style-name="Strong_20_Emphasis">Space</text:span> → go down a page</text:p>
        </text:list-item>
        <text:list-item>
          <text:p text:style-name="P4">Press <text:span text:style-name="Strong_20_Emphasis">q</text:span> → quit</text:p>
        </text:list-item>
      </text:list>
      <text:p text:style-name="Horizontal_20_Line"/>
      <text:h text:style-name="Heading_20_3" text:outline-level="3">Now combining with <text:span text:style-name="Source_20_Text">sort</text:span></text:h>
      <text:p text:style-name="Text_20_body">You can chain them like this:</text:p>
      <text:p text:style-name="P2"><text:span text:style-name="Source_20_Text">sort file.txt | less</text:span></text:p>
      <text:h text:style-name="Heading_20_3" text:outline-level="3">What this does:</text:h>
      <text:list text:style-name="L4">
        <text:list-item>
          <text:p text:style-name="P5"><text:span text:style-name="Source_20_Text">sort file.txt</text:span> → sorts the file</text:p>
        </text:list-item>
        <text:list-item>
          <text:p text:style-name="P5"><text:span text:style-name="Source_20_Text">|</text:span> (pipe) → sends the result forward</text:p>
        </text:list-item>
        <text:list-item>
          <text:p text:style-name="P5"><text:span text:style-name="Source_20_Text">less</text:span> → lets you <text:span text:style-name="Strong_20_Emphasis">view it nicely, page by page</text:span></text:p>
        </text:list-item>
      </text:list>
      <text:p text:style-name="Horizontal_20_Line"/>
      <text:p text:style-name="Text_20_body">💡 Real-life idea:</text:p>
      <text:p text:style-name="Quotations">You have a HUGE messy list → <text:span text:style-name="Source_20_Text">sort</text:span> cleans it → <text:span text:style-name="Source_20_Text">less</text:span> lets you read it without getting overwhelmed.</text:p>
      <text:p text:style-name="Horizontal_20_Line"/>
      <text:h text:style-name="Heading_20_3" text:outline-level="3">Quick mental model:</text:h>
      <text:list text:style-name="L5">
        <text:list-item>
          <text:p text:style-name="P6"><text:span text:style-name="Source_20_Text">sort</text:span> = organize</text:p>
        </text:list-item>
        <text:list-item>
          <text:p text:style-name="P6"><text:span text:style-name="Source_20_Text">less</text:span> = view safely</text:p>
        </text:list-item>
      </text:list>
      <text:p text:style-name="Horizontal_20_Line"/>
      <text:p text:style-name="Text_20_body"><text:soft-page-break/></text:p>
      <text:h text:style-name="Heading_20_3" text:outline-level="3"><text:span text:style-name="Strong_20_Emphasis"><text:span text:style-name="Source_20_Text">sort -nr</text:span></text:span><text:span text:style-name="Strong_20_Emphasis"> (super simple):</text:span></text:h>
      <text:p text:style-name="Text_20_body">👉 It means:</text:p>
      <text:p text:style-name="Quotations"><text:span text:style-name="Strong_20_Emphasis">Sort numbers in reverse order (big → small)</text:span></text:p>
      <text:p text:style-name="Horizontal_20_Line"/>
      <text:h text:style-name="Heading_20_3" text:outline-level="3">Break it down:</text:h>
      <text:list text:style-name="L6">
        <text:list-item>
          <text:p text:style-name="P7"><text:span text:style-name="Source_20_Text">sort</text:span> → organize </text:p>
        </text:list-item>
        <text:list-item>
          <text:p text:style-name="P7"><text:span text:style-name="Source_20_Text">-n</text:span> → treat values as <text:span text:style-name="Strong_20_Emphasis">numbers</text:span> (not text) </text:p>
        </text:list-item>
        <text:list-item>
          <text:p text:style-name="P8"><text:span text:style-name="Source_20_Text">-r</text:span> → <text:span text:style-name="Strong_20_Emphasis">reverse</text:span> the order</text:p>
        </text:list-item>
      </text:list>
      <text:p text:style-name="Standard"/>
      <text:p text:style-name="P9">……………………………………………………………………………..</text:p>
      <text:p text:style-name="P10"/>
      <text:p text:style-name="P10"/>
      <text:p text:style-name="P10"/>
      <text:h text:style-name="Heading_20_3" text:outline-level="3"><text:soft-page-break/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trong_20_Emphasis"><text:span text:style-name="Source_20_Text">sort -u</text:span></text:span><text:span text:style-name="Strong_20_Emphasis"> (simple idea):</text:span></text:h>
      <text:p text:style-name="Text_20_body">👉 It means:</text:p>
      <text:p text:style-name="Quotations"><text:span text:style-name="Strong_20_Emphasis">Sort the list AND remove duplicates</text:span></text:p>
      <text:p text:style-name="Horizontal_20_Line"/>
      <text:h text:style-name="Heading_20_3" text:outline-level="3">Break it down:</text:h>
      <text:list text:style-name="L7">
        <text:list-item>
          <text:p text:style-name="P11"><text:span text:style-name="Source_20_Text">sort</text:span> → organize </text:p>
        </text:list-item>
        <text:list-item>
          <text:p text:style-name="P12"><text:span text:style-name="Source_20_Text">-u</text:span> → <text:span text:style-name="Strong_20_Emphasis">unique only</text:span> (no repeats) </text:p>
        </text:list-item>
      </text:list>
      <text:p text:style-name="Horizontal_20_Line"/>
      <text:h text:style-name="Heading_20_3" text:outline-level="3">Example:</text:h>
      <text:p text:style-name="Text_20_body">Input:</text:p>
      <text:section text:style-name="Sect1" text:name="code-block-viewer">
        <text:p text:style-name="P13"><text:span text:style-name="Source_20_Text">apple</text:span></text:p>
        <text:p text:style-name="Preformatted_20_Text"><text:span text:style-name="Source_20_Text">banana</text:span></text:p>
        <text:p text:style-name="Preformatted_20_Text"><text:span text:style-name="Source_20_Text">apple</text:span></text:p>
        <text:p text:style-name="Preformatted_20_Text"><text:span text:style-name="Source_20_Text">cherry</text:span></text:p>
        <text:p text:style-name="P2"><text:span text:style-name="Source_20_Text">banana</text:span></text:p>
      </text:section>
      <text:p text:style-name="Text_20_body">With <text:span text:style-name="Source_20_Text">sort -u</text:span>:</text:p>
      <text:section text:style-name="Sect1" text:name="Section1">
        <text:p text:style-name="P13"><text:bookmark text:name="code-block-viewer"/><text:span text:style-name="Source_20_Text">apple</text:span></text:p>
        <text:p text:style-name="Preformatted_20_Text"><text:span text:style-name="Source_20_Text">banana</text:span></text:p>
        <text:p text:style-name="P2"><text:span text:style-name="Source_20_Text">cherry</text:span></text:p>
      </text:section>
      <text:p text:style-name="Horizontal_20_Line"/>
      <text:p text:style-name="Text_20_body">💡 What happened?</text:p>
      <text:list text:style-name="L8">
        <text:list-item>
          <text:p text:style-name="P14">It sorted everything (A → Z) </text:p>
        </text:list-item>
        <text:list-item>
          <text:p text:style-name="P15">It removed repeated lines </text:p>
        </text:list-item>
      </text:list>
      <text:p text:style-name="Horizontal_20_Line"/>
      <text:h text:style-name="Heading_20_3" text:outline-level="3"><text:soft-page-break/>Real-life use:</text:h>
      <text:section text:style-name="Sect1" text:name="Section2">
        <text:p text:style-name="P16"><text:bookmark text:name="code-block-viewer Copy 1"/><text:span text:style-name="Source_20_Text">sort -u names.txt</text:span></text:p>
      </text:section>
      <text:p text:style-name="Text_20_body">👉 You get a clean list with <text:span text:style-name="Strong_20_Emphasis">no duplicates</text:span></text:p>
      <text:p text:style-name="Horizontal_20_Line"/>
      <text:h text:style-name="Heading_20_3" text:outline-level="3">Mental shortcut:</text:h>
      <text:p text:style-name="Quotations"><text:span text:style-name="Source_20_Text">-u</text:span> = “only one of each”</text:p>
      <text:p text:style-name="Horizontal_20_Line"/>
      <text:h text:style-name="Heading_20_3" text:outline-level="3">Bonus tip (important 👀):</text:h>
      <text:p text:style-name="Text_20_body"><text:span text:style-name="Source_20_Text">sort -u</text:span> only removes <text:span text:style-name="Strong_20_Emphasis">exact duplicates</text:span></text:p>
      <text:list text:style-name="L9">
        <text:list-item>
          <text:p text:style-name="P17"><text:span text:style-name="Source_20_Text">"apple"</text:span> and <text:span text:style-name="Source_20_Text">"Apple"</text:span> are treated as differ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09:51:55.123403933</meta:creation-date>
    <dc:date>2026-05-04T10:11:35.522875675</dc:date>
    <meta:editing-duration>PT19M48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6" meta:paragraph-count="85" meta:word-count="372" meta:character-count="1817" meta:non-whitespace-character-count="1543"/>
  </office:meta>
</office:document-meta>
</file>