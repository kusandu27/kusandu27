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6896in" table:align="left"/>
    </style:style>
    <style:style style:name="Table1.A" style:family="table-column">
      <style:table-column-properties style:column-width="0.3986in"/>
    </style:style>
    <style:style style:name="Table1.B" style:family="table-column">
      <style:table-column-properties style:column-width="0.7028in"/>
    </style:style>
    <style:style style:name="Table1.C" style:family="table-column">
      <style:table-column-properties style:column-width="4.5882in"/>
    </style:style>
    <style:style style:name="Table1.A1" style:family="table-cell">
      <style:table-cell-properties style:vertical-align="middle" fo:padding="0.0694in" fo:border="1pt solid #000000"/>
    </style:style>
    <style:style style:name="Table2" style:family="table">
      <style:table-properties style:width="4.1764in" table:align="left"/>
    </style:style>
    <style:style style:name="Table2.A" style:family="table-column">
      <style:table-column-properties style:column-width="0.3986in"/>
    </style:style>
    <style:style style:name="Table2.B" style:family="table-column">
      <style:table-column-properties style:column-width="2.0653in"/>
    </style:style>
    <style:style style:name="Table2.C" style:family="table-column">
      <style:table-column-properties style:column-width="1.7125in"/>
    </style:style>
    <style:style style:name="Table2.A1" style:family="table-cell">
      <style:table-cell-properties style:vertical-align="middle" fo:padding="0.0694in" fo:border="1pt solid #000000"/>
    </style:style>
    <style:style style:name="Table3" style:family="table">
      <style:table-properties style:width="2.5799in" table:align="left"/>
    </style:style>
    <style:style style:name="Table3.A" style:family="table-column">
      <style:table-column-properties style:column-width="0.884in"/>
    </style:style>
    <style:style style:name="Table3.B" style:family="table-column">
      <style:table-column-properties style:column-width="1.6958in"/>
    </style:style>
    <style:style style:name="Table3.A1" style:family="table-cell">
      <style:table-cell-properties style:vertical-align="middle" fo:padding="0.0694in" fo:border="1pt solid #000000"/>
    </style:style>
    <style:style style:name="Table4" style:family="table">
      <style:table-properties style:width="3.4847in" table:align="left"/>
    </style:style>
    <style:style style:name="Table4.A" style:family="table-column">
      <style:table-column-properties style:column-width="0.884in"/>
    </style:style>
    <style:style style:name="Table4.B" style:family="table-column">
      <style:table-column-properties style:column-width="0.6097in"/>
    </style:style>
    <style:style style:name="Table4.C" style:family="table-column">
      <style:table-column-properties style:column-width="1.991in"/>
    </style:style>
    <style:style style:name="Table4.A1" style:family="table-cell">
      <style:table-cell-properties style:vertical-align="middle" fo:padding="0.0694in" fo:border="1pt solid #000000"/>
    </style:style>
    <style:style style:name="P1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2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weight="bold"/>
    </style:style>
    <style:style style:name="P4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Heading_20_2">
      <style:paragraph-properties fo:margin-left="0in" fo:margin-right="0in" fo:text-indent="0in" style:auto-text-indent="false"/>
      <style:text-properties fo:font-size="15pt" fo:font-weight="bold"/>
    </style:style>
    <style:style style:name="P6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8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0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11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3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14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/>
    </style:style>
    <style:style style:name="P15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/>
      <style:text-properties fo:font-size="15pt" fo:font-weight="bold" fo:background-color="#f4f6f7"/>
    </style:style>
    <style:style style:name="P16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fo:background-color="#f4f6f7"/>
    </style:style>
    <style:style style:name="P17" style:family="paragraph" style:parent-style-name="Text_20_body" style:list-style-name="L4">
      <style:paragraph-properties fo:margin-left="0in" fo:margin-right="0in" fo:margin-top="0.1665in" fo:margin-bottom="0in" style:contextual-spacing="false" fo:text-indent="0in" style:auto-text-indent="false" style:writing-mode="lr-tb"/>
      <style:text-properties fo:background-color="#f4f6f7"/>
    </style:style>
    <style:style style:name="P18" style:family="paragraph" style:parent-style-name="Text_20_body" style:list-style-name="L4">
      <style:paragraph-properties fo:margin-left="0in" fo:margin-right="0in" fo:margin-top="0.1665in" fo:margin-bottom="0.1965in" style:contextual-spacing="false" fo:text-indent="0in" style:auto-text-indent="false" style:writing-mode="lr-tb"/>
      <style:text-properties fo:background-color="#f4f6f7"/>
    </style:style>
    <style:style style:name="P19" style:family="paragraph" style:parent-style-name="Horizontal_20_Line">
      <style:paragraph-properties fo:margin-top="0.1665in" fo:margin-bottom="0.1665in" style:contextual-spacing="false" fo:line-height="115%"/>
      <style:text-properties fo:background-color="#f4f6f7"/>
    </style:style>
    <style:style style:name="P20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/>
      <style:text-properties fo:font-size="12pt" fo:font-weight="bold" fo:background-color="#f4f6f7"/>
    </style:style>
    <style:style style:name="P21" style:family="paragraph" style:parent-style-name="Text_20_body" style:list-style-name="L5">
      <style:paragraph-properties fo:margin-left="0in" fo:margin-right="0in" fo:margin-top="0.1665in" fo:margin-bottom="0.1965in" style:contextual-spacing="false" fo:text-indent="0in" style:auto-text-indent="false" style:writing-mode="lr-tb"/>
      <style:text-properties fo:background-color="#f4f6f7"/>
    </style:style>
    <style:style style:name="P22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 style:writing-mode="lr-tb"/>
      <style:text-properties fo:background-color="#f4f6f7"/>
    </style:style>
    <style:style style:name="P23" style:family="paragraph" style:parent-style-name="Text_20_body" style:list-style-name="L6">
      <style:paragraph-properties fo:margin-left="0in" fo:margin-right="0in" fo:margin-top="0.1665in" fo:margin-bottom="0.1965in" style:contextual-spacing="false" fo:text-indent="0in" style:auto-text-indent="false" style:writing-mode="lr-tb"/>
      <style:text-properties fo:background-color="#f4f6f7"/>
    </style:style>
    <style:style style:name="P24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officeooo:paragraph-rsid="000e6f26" fo:background-color="#f4f6f7"/>
    </style:style>
    <style:style style:name="P25" style:family="paragraph" style:parent-style-name="Text_20_body" style:list-style-name="L7">
      <style:paragraph-properties fo:margin-left="0in" fo:margin-right="0in" fo:margin-top="0.1665in" fo:margin-bottom="0.1965in" style:contextual-spacing="false" fo:text-indent="0in" style:auto-text-indent="false" style:writing-mode="lr-tb"/>
      <style:text-properties fo:background-color="#f4f6f7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</style:style>
    <style:style style:name="P27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fo:background-color="#ffff00"/>
    </style:style>
    <style:style style:name="P28" style:family="paragraph" style:parent-style-name="Text_20_body">
      <style:paragraph-properties fo:margin-top="0in" fo:margin-bottom="0in" style:contextual-spacing="false"/>
    </style:style>
    <style:style style:name="P29" style:family="paragraph" style:parent-style-name="Heading_20_2">
      <style:paragraph-properties fo:margin-left="0in" fo:margin-right="0in" fo:text-indent="0in" style:auto-text-indent="false"/>
      <style:text-properties fo:font-size="12pt" fo:font-weight="bold"/>
    </style:style>
    <style:style style:name="P3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3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34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fo:font-weight="normal"/>
    </style:style>
    <style:style style:name="P35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fo:font-weight="normal"/>
    </style:style>
    <style:style style:name="P36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37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/>
      <style:text-properties fo:font-size="15pt" fo:font-weight="bold"/>
    </style:style>
    <style:style style:name="P38" style:family="paragraph" style:parent-style-name="Text_20_body" style:list-style-name="L12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39" style:family="paragraph" style:parent-style-name="Text_20_body" style:list-style-name="L12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40" style:family="paragraph" style:parent-style-name="Horizontal_20_Line">
      <style:paragraph-properties fo:margin-top="0.1665in" fo:margin-bottom="0.1665in" style:contextual-spacing="false" fo:line-height="115%"/>
    </style:style>
    <style:style style:name="P41" style:family="paragraph" style:parent-style-name="Text_20_body" style:list-style-name="L13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42" style:family="paragraph" style:parent-style-name="Text_20_body" style:list-style-name="L13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43" style:family="paragraph" style:parent-style-name="Text_20_body" style:list-style-name="L14">
      <style:paragraph-properties fo:margin-left="0in" fo:margin-right="0in" fo:margin-top="0.1665in" fo:margin-bottom="0in" style:contextual-spacing="false" fo:text-indent="0in" style:auto-text-indent="false"/>
    </style:style>
    <style:style style:name="P44" style:family="paragraph" style:parent-style-name="Text_20_body" style:list-style-name="L14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45" style:family="paragraph" style:parent-style-name="Text_20_body" style:list-style-name="L15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46" style:family="paragraph" style:parent-style-name="Text_20_body" style:list-style-name="L15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47" style:family="paragraph" style:parent-style-name="Text_20_body" style:list-style-name="L16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48" style:family="paragraph" style:parent-style-name="Text_20_body" style:list-style-name="L16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49" style:family="paragraph" style:parent-style-name="Text_20_body" style:list-style-name="L17">
      <style:paragraph-properties fo:margin-left="0in" fo:margin-right="0in" fo:margin-top="0.1665in" fo:margin-bottom="0in" style:contextual-spacing="false" fo:text-indent="0in" style:auto-text-indent="false"/>
    </style:style>
    <style:style style:name="P50" style:family="paragraph" style:parent-style-name="Text_20_body" style:list-style-name="L17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51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52" style:family="paragraph" style:parent-style-name="Text_20_body">
      <style:paragraph-properties fo:margin-top="0.1665in" fo:margin-bottom="0in" style:contextual-spacing="false"/>
    </style:style>
    <style:style style:name="T1" style:family="text">
      <style:text-properties fo:font-weight="normal"/>
    </style:style>
    <style:style style:name="T2" style:family="text">
      <style:text-properties fo:font-weight="normal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3" style:family="text">
      <style:text-properties fo:font-weight="bold"/>
    </style:style>
    <style:style style:name="T4" style:family="text">
      <style:text-properties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5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6" style:family="text">
      <style:text-properties fo:background-color="#f4f6f7" loext:char-shading-value="0" loext:padding="0in" loext:border="none"/>
    </style:style>
    <style:style style:name="T7" style:family="text">
      <style:text-properties fo:font-weight="normal" fo:background-color="#f4f6f7" loext:char-shading-value="0" loext:padding="0in" loext:border="none"/>
    </style:style>
    <style:style style:name="T8" style:family="text">
      <style:text-properties fo:font-weight="bold" fo:background-color="#f4f6f7" loext:char-shading-value="0" loext:padding="0in" loext:border="none"/>
    </style:style>
    <style:style style:name="T9" style:family="text">
      <style:text-properties fo:font-weight="normal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10" style:family="text">
      <style:text-properties fo:font-weight="bold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11" style:family="text">
      <style:text-properties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12" style:family="text">
      <style:text-properties fo:font-size="12pt" fo:font-weight="bold"/>
    </style:style>
    <style:style style:name="T13" style:family="text">
      <style:text-properties fo:font-size="12pt" fo:font-weight="bold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14" style:family="text">
      <style:text-properties fo:font-weight="normal" fo:background-color="transparent" loext:char-shading-value="0"/>
    </style:style>
    <style:style style:name="T15" style:family="text">
      <style:text-properties fo:font-weight="normal" fo:background-color="#ffff00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16" style:family="text">
      <style:text-properties fo:font-weight="normal" fo:background-color="#ffff00" loext:char-shading-value="0"/>
    </style:style>
    <style:style style:name="T17" style:family="text">
      <style:text-properties fo:font-weight="bold"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fo:background-color="transparent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In Linux, the </text:span><text:span text:style-name="Source_20_Text"><text:span text:style-name="T2">tar</text:span></text:span><text:span text:style-name="T1"> command is used to bundle many files into one single file, often called a "tarball." Think of it like putting a bunch of physical documents into one big envelope.</text:span></text:p>
      <text:p text:style-name="P1"><text:span text:style-name="T1">The flags </text:span><text:span text:style-name="Source_20_Text"><text:span text:style-name="T2">-cvf</text:span></text:span><text:span text:style-name="T1"> are like instructions for how to pack that envelop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Flag</text:p>
          </table:table-cell>
          <table:table-cell table:style-name="Table1.A1" office:value-type="string">
            <text:p text:style-name="P2">Meaning</text:p>
          </table:table-cell>
          <table:table-cell table:style-name="Table1.A1" office:value-type="string">
            <text:p text:style-name="P2">Simple Explanation</text:p>
          </table:table-cell>
        </table:table-row>
        <table:table-row>
          <table:table-cell table:style-name="Table1.A1" office:value-type="string">
            <text:p text:style-name="P3">-c</text:p>
          </table:table-cell>
          <table:table-cell table:style-name="Table1.A1" office:value-type="string">
            <text:p text:style-name="P4"><text:span text:style-name="T3">C</text:span>reate</text:p>
          </table:table-cell>
          <table:table-cell table:style-name="Table1.A1" office:value-type="string">
            <text:p text:style-name="P4">"Hey Linux, <text:span text:style-name="T3">make</text:span> a new archive file."</text:p>
          </table:table-cell>
        </table:table-row>
        <table:table-row>
          <table:table-cell table:style-name="Table1.A1" office:value-type="string">
            <text:p text:style-name="P3">-v</text:p>
          </table:table-cell>
          <table:table-cell table:style-name="Table1.A1" office:value-type="string">
            <text:p text:style-name="P4"><text:span text:style-name="T3">V</text:span>erbose</text:p>
          </table:table-cell>
          <table:table-cell table:style-name="Table1.A1" office:value-type="string">
            <text:p text:style-name="P4">"Show me what you're doing." (It lists the files as they get packed).</text:p>
          </table:table-cell>
        </table:table-row>
        <table:table-row>
          <table:table-cell table:style-name="Table1.A1" office:value-type="string">
            <text:p text:style-name="P3">-f</text:p>
          </table:table-cell>
          <table:table-cell table:style-name="Table1.A1" office:value-type="string">
            <text:p text:style-name="P4"><text:span text:style-name="T3">F</text:span>ile</text:p>
          </table:table-cell>
          <table:table-cell table:style-name="Table1.A1" office:value-type="string">
            <text:p text:style-name="P4">"The very next word I type is the <text:span text:style-name="T3">name</text:span> of the archive."</text:p>
          </table:table-cell>
        </table:table-row>
      </table:table>
      <text:h text:style-name="P5" text:outline-level="2">The Basic Recipe</text:h>
      <text:p text:style-name="P6"><text:span text:style-name="Source_20_Text"><text:span text:style-name="T2">tar -cvf backup.tar file1.txt file2.txt</text:span></text:span></text:p>
      <text:list text:style-name="L1">
        <text:list-item>
          <text:p text:style-name="P7"><text:span text:style-name="Source_20_Text"><text:span text:style-name="T4">tar -cvf</text:span></text:span>: The tool and the instructions.</text:p>
        </text:list-item>
        <text:list-item>
          <text:p text:style-name="P7"><text:span text:style-name="Source_20_Text"><text:span text:style-name="T4">backup.tar</text:span></text:span>: The name of your "envelope." (Always put the name of the archive <text:span text:style-name="T3">first</text:span> after <text:span text:style-name="Source_20_Text"><text:span text:style-name="T5">-f</text:span></text:span>).</text:p>
        </text:list-item>
        <text:list-item>
          <text:p text:style-name="P8"><text:span text:style-name="Source_20_Text"><text:span text:style-name="T4">file1.txt file2.txt</text:span></text:span>: The items you want to put inside.</text:p>
        </text:list-item>
      </text:list>
      <text:h text:style-name="P5" text:outline-level="2">Important Note for Beginners</text:h>
      <text:p text:style-name="P6"><text:span text:style-name="T1">The order of the flags matters because of the </text:span><text:span text:style-name="Source_20_Text"><text:span text:style-name="T2">f</text:span></text:span><text:span text:style-name="T1">. You must put the </text:span><text:span text:style-name="T3">name of the archive</text:span><text:span text:style-name="T1"> immediately after the </text:span><text:span text:style-name="Source_20_Text"><text:span text:style-name="T2">f</text:span></text:span><text:span text:style-name="T1">.</text:span></text:p>
      <text:list text:style-name="L2">
        <text:list-item>
          <text:p text:style-name="P9">✅ <text:span text:style-name="T3">Correct:</text:span> <text:span text:style-name="Source_20_Text"><text:span text:style-name="T5">tar -cvf my_photos.tar photo1.jpg</text:span></text:span></text:p>
        </text:list-item>
        <text:list-item>
          <text:p text:style-name="P10">❌ <text:span text:style-name="T3">Incorrect:</text:span> <text:span text:style-name="Source_20_Text"><text:span text:style-name="T5">tar -cfv photo1.jpg my_photos.tar</text:span></text:span> (Linux will think "v" is the name of your file!)</text:p>
        </text:list-item>
      </text:list>
      <text:h text:style-name="P5" text:outline-level="2">Analogy</text:h>
      <text:p text:style-name="P6"><text:span text:style-name="T1">It's like using a Digital Suitcase. You take all your loose clothes (</text:span><text:span text:style-name="Source_20_Text"><text:span text:style-name="T2">files</text:span></text:span><text:span text:style-name="T1">), put them in the suitcase (</text:span><text:span text:style-name="Source_20_Text"><text:span text:style-name="T2">-c</text:span></text:span><text:span text:style-name="T1">), watch yourself pack them (</text:span><text:span text:style-name="Source_20_Text"><text:span text:style-name="T2">-v</text:span></text:span><text:span text:style-name="T1">), and give the suitcase a name tag (</text:span><text:span text:style-name="Source_20_Text"><text:span text:style-name="T2">-f</text:span></text:span><text:span text:style-name="T1">).</text:span></text:p>
      <text:p text:style-name="P11"><text:soft-page-break/></text:p>
      <text:p text:style-name="P1"><text:span text:style-name="T1">You can do this using a "one-liner" that combines two commands with </text:span><text:span text:style-name="Source_20_Text"><text:span text:style-name="T2">&amp;&amp;</text:span></text:span><text:span text:style-name="T1"> (which means "do the first thing, then do the second").</text:span></text:p>
      <text:h text:style-name="P5" text:outline-level="2">The Command</text:h>
      <text:p text:style-name="P6"><text:span text:style-name="Source_20_Text"><text:span text:style-name="T2">mkdir Test &amp;&amp; touch Test/file{1..10}</text:span></text:span></text:p>
      <text:h text:style-name="P5" text:outline-level="2">How it works:</text:h>
      <text:list text:style-name="L3">
        <text:list-item>
          <text:p text:style-name="P12"><text:span text:style-name="Source_20_Text"><text:span text:style-name="T4">mkdir Test</text:span></text:span>: Creates the <text:span text:style-name="T3">folder</text:span> named "Test".</text:p>
        </text:list-item>
        <text:list-item>
          <text:p text:style-name="P12"><text:span text:style-name="Source_20_Text"><text:span text:style-name="T4">&amp;&amp;</text:span></text:span>: Tells Linux to only run the next part if the folder was created successfully.</text:p>
        </text:list-item>
        <text:list-item>
          <text:p text:style-name="P12"><text:span text:style-name="Source_20_Text"><text:span text:style-name="T4">touch</text:span></text:span>: The command used to create <text:span text:style-name="T3">empty files</text:span>.</text:p>
        </text:list-item>
        <text:list-item>
          <text:p text:style-name="P12"><text:span text:style-name="Source_20_Text"><text:span text:style-name="T4">Test/file{1..10}</text:span></text:span>: This is a Linux trick called <text:a xlink:type="simple" xlink:href="https://www.gnu.org/software/bash/manual/html_node/Brace-Expansion.html" text:style-name="Internet_20_link" text:visited-style-name="Visited_20_Internet_20_Link">Brace Expansion</text:a>.</text:p>
          <text:list>
            <text:list-item>
              <text:p text:style-name="P12"><text:span text:style-name="Source_20_Text"><text:span text:style-name="T5">Test/</text:span></text:span> tells it to put them inside the folder.</text:p>
            </text:list-item>
            <text:list-item>
              <text:p text:style-name="P13"><text:span text:style-name="Source_20_Text"><text:span text:style-name="T5">{1..10}</text:span></text:span> tells Linux to automatically repeat the command for every number from 1 to 10.</text:p>
            </text:list-item>
          </text:list>
        </text:list-item>
      </text:list>
      <text:h text:style-name="P5" text:outline-level="2">What you'll see:</text:h>
      <text:p text:style-name="P6"><text:span text:style-name="T1">If you then type </text:span><text:span text:style-name="Source_20_Text"><text:span text:style-name="T2">ls Test</text:span></text:span><text:span text:style-name="T1">, you will see:<text:line-break/></text:span><text:span text:style-name="Source_20_Text"><text:span text:style-name="T2">file1 file2 file3 file4 file5 file6 file7 file8 file9 file10</text:span></text:span></text:p>
      <text:p text:style-name="P6"><text:span text:style-name="T3">Pro Tip:</text:span><text:span text:style-name="T1"> If you want to delete them all just as quickly, you can use </text:span><text:span text:style-name="Source_20_Text"><text:span text:style-name="T2">rm -rf Test</text:span></text:span><text:span text:style-name="T1"> to remove the folder and everything inside it!</text:span></text:p>
      <text:p text:style-name="P11"><text:span text:style-name="Source_20_Text"><text:span text:style-name="T6"/></text:span></text:p>
      <text:p text:style-name="P11"><text:span text:style-name="Source_20_Text"><text:span text:style-name="T6"/></text:span></text:p>
      <text:p text:style-name="P11"><text:span text:style-name="Source_20_Text"><text:span text:style-name="T6"/></text:span></text:p>
      <text:p text:style-name="P11"><text:span text:style-name="Source_20_Text"><text:span text:style-name="T6"/></text:span></text:p>
      <text:p text:style-name="P11"><text:span text:style-name="Source_20_Text"><text:span text:style-name="T6"/></text:span></text:p>
      <text:p text:style-name="P11"><text:soft-page-break/><text:span text:style-name="Source_20_Text"><text:span text:style-name="T6"/></text:span></text:p>
      <text:p text:style-name="P14"><text:span text:style-name="Source_20_Text"><text:span text:style-name="T2">grep</text:span></text:span><text:span text:style-name="Source_20_Text"><text:span text:style-name="T7"> is like the </text:span></text:span><text:span text:style-name="Source_20_Text"><text:span text:style-name="T8">"Find" (Ctrl + F)</text:span></text:span><text:span text:style-name="Source_20_Text"><text:span text:style-name="T7"> tool for Linux. It searches through text or files to find specific words or patterns.</text:span></text:span></text:p>
      <text:h text:style-name="P15" text:outline-level="2">The Basic Recipe</text:h>
      <text:p text:style-name="P16"><text:span text:style-name="Source_20_Text"><text:span text:style-name="T9">grep "word" filename</text:span></text:span></text:p>
      <text:list text:style-name="L4">
        <text:list-item>
          <text:p text:style-name="P17"><text:span text:style-name="Source_20_Text"><text:span text:style-name="T10">grep</text:span></text:span>: The command.</text:p>
        </text:list-item>
        <text:list-item>
          <text:p text:style-name="P17"><text:span text:style-name="Source_20_Text"><text:span text:style-name="T10">"word"</text:span></text:span>: What you are looking for.</text:p>
        </text:list-item>
        <text:list-item>
          <text:p text:style-name="P18"><text:span text:style-name="Source_20_Text"><text:span text:style-name="T10">filename</text:span></text:span>: Where to look.</text:p>
        </text:list-item>
      </text:list>
      <text:p text:style-name="P19"/>
      <text:h text:style-name="P15" text:outline-level="2">3 Simple Examples for Your Notes</text:h>
      <text:h text:style-name="P20" text:outline-level="2">1. Search inside a file</text:h>
      <text:p text:style-name="P16"><text:span text:style-name="Source_20_Text"><text:span text:style-name="T9">grep "pizza" menu.txt</text:span></text:span></text:p>
      <text:list text:style-name="L5">
        <text:list-item>
          <text:p text:style-name="P21"><text:span text:style-name="T3">Result:</text:span> It shows every line in <text:span text:style-name="Source_20_Text"><text:span text:style-name="T11">menu.txt</text:span></text:span> that contains the word "pizza."</text:p>
        </text:list-item>
      </text:list>
      <text:h text:style-name="P22" text:outline-level="2"><text:span text:style-name="T12">2. Search while ignoring Capital Letters (</text:span><text:span text:style-name="Source_20_Text"><text:span text:style-name="T13">-i</text:span></text:span><text:span text:style-name="T12">)</text:span></text:h>
      <text:p text:style-name="P16"><text:span text:style-name="Source_20_Text"><text:span text:style-name="T9">grep -i "apple" fruit.txt</text:span></text:span></text:p>
      <text:list text:style-name="L6">
        <text:list-item>
          <text:p text:style-name="P23"><text:span text:style-name="T3">Result:</text:span> It finds "apple", "Apple", and "APPLE". The <text:span text:style-name="Source_20_Text"><text:span text:style-name="T11">-i</text:span></text:span> stands for <text:span text:style-name="T3">I</text:span>gnore case.</text:p>
        </text:list-item>
      </text:list>
      <text:h text:style-name="P22" text:outline-level="2"><text:soft-page-break/><text:span text:style-name="T12">3. Using it with a Pipe (</text:span><text:span text:style-name="Source_20_Text"><text:span text:style-name="T13">|</text:span></text:span><text:span text:style-name="T12">)</text:span></text:h>
      <text:p text:style-name="P24"><text:span text:style-name="T14">This is the most common way to use it. Remember our </text:span><text:span text:style-name="Source_20_Text"><text:span text:style-name="T15">ls -l</text:span></text:span><text:span text:style-name="T16"> c</text:span><text:span text:style-name="T14">ommand?</text:span></text:p>
      <text:p text:style-name="P24"><text:span text:style-name="T14"><text:line-break/></text:span><text:span text:style-name="Source_20_Text"><text:span text:style-name="T15">ls -l /etc | grep "network"</text:span></text:span></text:p>
      <text:list text:style-name="L7">
        <text:list-item>
          <text:p text:style-name="P25"><text:span text:style-name="T17">Result:</text:span><text:span text:style-name="T18"> Instead of seeing hundreds of files, Linux only shows you files in the </text:span><text:span text:style-name="Source_20_Text"><text:span text:style-name="T19">/etc</text:span></text:span><text:span text:style-name="T18"> folder that have the word </text:span><text:span text:style-name="T17">"network"</text:span><text:span text:style-name="T18"> in their name.</text:span></text:p>
        </text:list-item>
      </text:list>
      <text:p text:style-name="P19"/>
      <text:h text:style-name="P15" text:outline-level="2">Handy Flags for Beginner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Flag</text:p>
          </table:table-cell>
          <table:table-cell table:style-name="Table2.A1" office:value-type="string">
            <text:p text:style-name="P2">What it does</text:p>
          </table:table-cell>
          <table:table-cell table:style-name="Table2.A1" office:value-type="string">
            <text:p text:style-name="P2">Simple Memory Trick</text:p>
          </table:table-cell>
        </table:table-row>
        <table:table-row>
          <table:table-cell table:style-name="Table2.A1" office:value-type="string">
            <text:p text:style-name="P26"><text:span text:style-name="Source_20_Text"><text:span text:style-name="T4">-i</text:span></text:span></text:p>
          </table:table-cell>
          <table:table-cell table:style-name="Table2.A1" office:value-type="string">
            <text:p text:style-name="P4">Ignores uppercase/lowercase</text:p>
          </table:table-cell>
          <table:table-cell table:style-name="Table2.A1" office:value-type="string">
            <text:p text:style-name="P4"><text:span text:style-name="T3">I</text:span>gnore case</text:p>
          </table:table-cell>
        </table:table-row>
        <table:table-row>
          <table:table-cell table:style-name="Table2.A1" office:value-type="string">
            <text:p text:style-name="P26"><text:span text:style-name="Source_20_Text"><text:span text:style-name="T4">-v</text:span></text:span></text:p>
          </table:table-cell>
          <table:table-cell table:style-name="Table2.A1" office:value-type="string">
            <text:p text:style-name="P4">Shows lines that <text:span text:style-name="T3">don't</text:span> match</text:p>
          </table:table-cell>
          <table:table-cell table:style-name="Table2.A1" office:value-type="string">
            <text:p text:style-name="P4">In<text:span text:style-name="T3">v</text:span>ert search</text:p>
          </table:table-cell>
        </table:table-row>
        <table:table-row>
          <table:table-cell table:style-name="Table2.A1" office:value-type="string">
            <text:p text:style-name="P26"><text:span text:style-name="Source_20_Text"><text:span text:style-name="T4">-n</text:span></text:span></text:p>
          </table:table-cell>
          <table:table-cell table:style-name="Table2.A1" office:value-type="string">
            <text:p text:style-name="P4">Shows the line number</text:p>
          </table:table-cell>
          <table:table-cell table:style-name="Table2.A1" office:value-type="string">
            <text:p text:style-name="P4"><text:span text:style-name="T3">N</text:span>umber the lines</text:p>
          </table:table-cell>
        </table:table-row>
        <table:table-row>
          <table:table-cell table:style-name="Table2.A1" office:value-type="string">
            <text:p text:style-name="P26"><text:span text:style-name="Source_20_Text"><text:span text:style-name="T4">-r</text:span></text:span></text:p>
          </table:table-cell>
          <table:table-cell table:style-name="Table2.A1" office:value-type="string">
            <text:p text:style-name="P4">Searches every file in a folder</text:p>
          </table:table-cell>
          <table:table-cell table:style-name="Table2.A1" office:value-type="string">
            <text:p text:style-name="P4"><text:span text:style-name="T3">R</text:span>ecursive (deep search)</text:p>
          </table:table-cell>
        </table:table-row>
      </table:table>
      <text:h text:style-name="P15" text:outline-level="2">The "Newbie" Analogy</text:h>
      <text:p text:style-name="P16"><text:span text:style-name="T16">Imagine you have a giant </text:span><text:a xlink:type="simple" xlink:href="https://www.gnu.org/software/grep/manual/grep.html" text:style-name="Internet_20_link" text:visited-style-name="Visited_20_Internet_20_Link"><text:span text:style-name="T16">stack of newspapers</text:span></text:a><text:span text:style-name="T16">. Using </text:span><text:span text:style-name="Source_20_Text"><text:span text:style-name="T15">grep</text:span></text:span><text:span text:style-name="T16"> is like having a highlighter that instantly marks every time your name is mentioned so you don't have to read the whole thing.</text:span></text:p>
      <text:p text:style-name="P27"><text:span text:style-name="T1"/></text:p>
      <text:p text:style-name="P11"><text:span text:style-name="Source_20_Text"><text:span text:style-name="T6"/></text:span></text:p>
      <text:p text:style-name="P28"/>
      <text:p text:style-name="P28"/>
      <text:p text:style-name="P28"/>
      <text:p text:style-name="P28"><text:soft-page-break/></text:p>
      <text:p text:style-name="P1"><text:span text:style-name="T1">The </text:span><text:span text:style-name="Source_20_Text"><text:span text:style-name="T2">file</text:span></text:span><text:span text:style-name="T1"> command tells you </text:span><text:span text:style-name="T3">exactly what a file is</text:span><text:span text:style-name="T1">, even if it doesn't have an extension (like </text:span><text:span text:style-name="Source_20_Text"><text:span text:style-name="T2">.jpg</text:span></text:span><text:span text:style-name="T1"> or </text:span><text:span text:style-name="Source_20_Text"><text:span text:style-name="T2">.txt</text:span></text:span><text:span text:style-name="T1">).</text:span></text:p>
      <text:p text:style-name="P1"><text:span text:style-name="T1">In Linux, you can name a file anything, but that doesn't change what's inside. The </text:span><text:span text:style-name="Source_20_Text"><text:span text:style-name="T2">file</text:span></text:span><text:span text:style-name="T1"> command peeks at the internal "signature" of the file to tell you the truth.</text:span></text:p>
      <text:h text:style-name="P5" text:outline-level="2">The Basic Recipe</text:h>
      <text:p text:style-name="P6"><text:span text:style-name="Source_20_Text"><text:span text:style-name="T2">file filename</text:span></text:span></text:p>
      <text:p text:style-name="Horizontal_20_Line"/>
      <text:h text:style-name="P5" text:outline-level="2">Simple Examples for Your Notes</text:h>
      <text:h text:style-name="P29" text:outline-level="2">1. Checking a text file</text:h>
      <text:p text:style-name="P6"><text:span text:style-name="Source_20_Text"><text:span text:style-name="T2">file notes.txt</text:span></text:span></text:p>
      <text:list text:style-name="L8">
        <text:list-item>
          <text:p text:style-name="P30"><text:span text:style-name="T3">Result:</text:span> <text:span text:style-name="Source_20_Text"><text:span text:style-name="T5">notes.txt: ASCII text</text:span></text:span> (This confirms it's just a simple text file).</text:p>
        </text:list-item>
      </text:list>
      <text:h text:style-name="P29" text:outline-level="2">2. Checking a mystery file</text:h>
      <text:p text:style-name="P6"><text:span text:style-name="T1">Imagine you have a file named </text:span><text:span text:style-name="Source_20_Text"><text:span text:style-name="T2">image</text:span></text:span><text:span text:style-name="T1"> with no extension.<text:line-break/></text:span><text:span text:style-name="Source_20_Text"><text:span text:style-name="T2">file image</text:span></text:span></text:p>
      <text:list text:style-name="L9">
        <text:list-item>
          <text:p text:style-name="P31"><text:span text:style-name="T3">Result:</text:span> <text:span text:style-name="Source_20_Text"><text:span text:style-name="T5">image: JPEG image data, JFIF standard 1.01</text:span></text:span> (Now you know it’s actually a photo!).</text:p>
        </text:list-item>
      </text:list>
      <text:h text:style-name="P29" text:outline-level="2">3. Checking a folder</text:h>
      <text:p text:style-name="P6"><text:span text:style-name="Source_20_Text"><text:span text:style-name="T2">file Test</text:span></text:span></text:p>
      <text:list text:style-name="L10">
        <text:list-item>
          <text:p text:style-name="P32"><text:span text:style-name="T3">Result:</text:span> <text:span text:style-name="Source_20_Text"><text:span text:style-name="T5">Test: directory</text:span></text:span> (It confirms "Test" is a folder, not a file).</text:p>
        </text:list-item>
      </text:list>
      <text:p text:style-name="Horizontal_20_Line"/>
      <text:h text:style-name="P5" text:outline-level="2"><text:soft-page-break/>Why is this useful?</text:h>
      <text:p text:style-name="P6"><text:span text:style-name="T1">Sometimes you'll download something from the internet or find a system file that has no extension. Instead of guessing and trying to open it with different apps, you run </text:span><text:span text:style-name="Source_20_Text"><text:span text:style-name="T2">file</text:span></text:span><text:span text:style-name="T1"> to see its </text:span><text:a xlink:type="simple" xlink:href="https://man7.org/linux/man-pages/man1/file.1.html" text:style-name="Internet_20_link" text:visited-style-name="Visited_20_Internet_20_Link"><text:span text:style-name="T3">true identity</text:span></text:a><text:span text:style-name="T1">.</text:span></text:p>
      <text:h text:style-name="P5" text:outline-level="2">Fun Fact</text:h>
      <text:p text:style-name="P6"><text:span text:style-name="T1">You can even use it on the </text:span><text:span text:style-name="Source_20_Text"><text:span text:style-name="T2">tar</text:span></text:span><text:span text:style-name="T1"> files we made earlier:<text:line-break/></text:span><text:span text:style-name="Source_20_Text"><text:span text:style-name="T2">file backup.tar</text:span></text:span></text:p>
      <text:list text:style-name="L11">
        <text:list-item>
          <text:p text:style-name="P33"><text:span text:style-name="T3">Result:</text:span> <text:span text:style-name="Source_20_Text"><text:span text:style-name="T5">backup.tar: POSIX tar archive</text:span></text:span></text:p>
        </text:list-item>
      </text:list>
      <text:p text:style-name="P6"><text:span text:style-name="T3">Pro Tip:</text:span><text:span text:style-name="T1"> If you want to check </text:span><text:span text:style-name="T3">all</text:span><text:span text:style-name="T1"> files in your current folder at once, just type </text:span><text:span text:style-name="Source_20_Text"><text:span text:style-name="T2">file *</text:span></text:span><text:span text:style-name="T1">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The <text:span text:style-name="Source_20_Text"><text:span text:style-name="T5">tar -tf</text:span></text:span> command lets you <text:span text:style-name="T3">peek inside</text:span> an archive without actually unpacking it.</text:p>
      <text:p text:style-name="P36">Think of it like looking at a <text:span text:style-name="T3">table of contents</text:span> or a packing list for a suitcase before you open it.</text:p>
      <text:h text:style-name="P37" text:outline-level="2">The Breakdown</text:h>
      <text:list text:style-name="L12">
        <text:list-item>
          <text:p text:style-name="P38"><text:span text:style-name="Source_20_Text"><text:span text:style-name="T4">-t</text:span></text:span>: <text:span text:style-name="T3">T</text:span>est or List (tells Linux: "Show me what's inside").</text:p>
        </text:list-item>
        <text:list-item>
          <text:p text:style-name="P39"><text:span text:style-name="Source_20_Text"><text:span text:style-name="T4">-f</text:span></text:span>: <text:span text:style-name="T3">F</text:span>ile (tells Linux: "The next thing I type is the name of the file").</text:p>
        </text:list-item>
      </text:list>
      <text:p text:style-name="P40"/>
      <text:h text:style-name="P37" text:outline-level="2">The Basic Recipe</text:h>
      <text:p text:style-name="P6"><text:span text:style-name="Source_20_Text"><text:span text:style-name="T2">tar -tf backup.tar</text:span></text:span></text:p>
      <text:list text:style-name="L13">
        <text:list-item>
          <text:p text:style-name="P41"><text:span text:style-name="Source_20_Text"><text:span text:style-name="T4">tar -tf</text:span></text:span>: The "peek inside" instruction.</text:p>
        </text:list-item>
        <text:list-item>
          <text:p text:style-name="P42"><text:span text:style-name="Source_20_Text"><text:span text:style-name="T4">backup.tar</text:span></text:span>: The name of the file you want to look at.</text:p>
        </text:list-item>
      </text:list>
      <text:p text:style-name="P40"/>
      <text:h text:style-name="P37" text:outline-level="2">Why use this?</text:h>
      <text:list text:style-name="L14">
        <text:list-item>
          <text:p text:style-name="P43"><text:span text:style-name="T3">Safety:</text:span> You don't want to accidentally dump 1,000 files onto your desktop. You check first!</text:p>
        </text:list-item>
        <text:list-item>
          <text:p text:style-name="P44"><text:span text:style-name="T3">Finding:</text:span> You can use it with <text:span text:style-name="Source_20_Text"><text:span text:style-name="T4">grep</text:span></text:span> (which we just learned) to see if one specific file is hidden inside a giant archive.</text:p>
        </text:list-item>
      </text:list>
      <text:h text:style-name="P37" text:outline-level="2">Simple Example for Your Notes</text:h>
      <text:p text:style-name="P6"><text:span text:style-name="T1">If you have a big archive and only want to see if "resume.pdf" is in there:<text:line-break/></text:span><text:span text:style-name="Source_20_Text"><text:span text:style-name="T2">tar -tf my_files.tar | grep "resume.pdf"</text:span></text:span></text:p>
      <text:h text:style-name="P37" text:outline-level="2"><text:soft-page-break/>Summary Table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Part</text:p>
          </table:table-cell>
          <table:table-cell table:style-name="Table3.A1" office:value-type="string">
            <text:p text:style-name="P2">Simple Action</text:p>
          </table:table-cell>
        </table:table-row>
        <table:table-row>
          <table:table-cell table:style-name="Table3.A1" office:value-type="string">
            <text:p text:style-name="P26"><text:span text:style-name="Source_20_Text"><text:span text:style-name="T4">tar -cvf</text:span></text:span></text:p>
          </table:table-cell>
          <table:table-cell table:style-name="Table3.A1" office:value-type="string">
            <text:p text:style-name="P4"><text:span text:style-name="T3">Pack</text:span> the suitcase</text:p>
          </table:table-cell>
        </table:table-row>
        <table:table-row>
          <table:table-cell table:style-name="Table3.A1" office:value-type="string">
            <text:p text:style-name="P26"><text:span text:style-name="Source_20_Text"><text:span text:style-name="T4">tar -tf</text:span></text:span></text:p>
          </table:table-cell>
          <table:table-cell table:style-name="Table3.A1" office:value-type="string">
            <text:p text:style-name="P4"><text:span text:style-name="T3">Look</text:span> at the packing list</text:p>
          </table:table-cell>
        </table:table-row>
        <table:table-row>
          <table:table-cell table:style-name="Table3.A1" office:value-type="string">
            <text:p text:style-name="P26"><text:span text:style-name="Source_20_Text"><text:span text:style-name="T4">tar -xvf</text:span></text:span></text:p>
          </table:table-cell>
          <table:table-cell table:style-name="Table3.A1" office:value-type="string">
            <text:p text:style-name="P4"><text:span text:style-name="T3">Unpack</text:span> the suitcase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36">This is the command you use to <text:span text:style-name="T3">unpack</text:span> or "extract" your files.</text:p>
      <text:p text:style-name="P1"><text:span text:style-name="T1">Following our suitcase analogy: if </text:span><text:span text:style-name="Source_20_Text"><text:span text:style-name="T2">-cvf</text:span></text:span><text:span text:style-name="T1"> was packing the suitcase, </text:span><text:span text:style-name="Source_20_Text"><text:span text:style-name="T2">-xvf</text:span></text:span><text:span text:style-name="T1"> is </text:span><text:span text:style-name="T3">opening it up and taking everything out.</text:span></text:p>
      <text:h text:style-name="P37" text:outline-level="2">The Breakdown</text:h>
      <text:list text:style-name="L15">
        <text:list-item>
          <text:p text:style-name="P45"><text:span text:style-name="Source_20_Text"><text:span text:style-name="T4">-x</text:span></text:span>: <text:span text:style-name="T3">E</text:span>xtract (tells Linux: "Take the files out of the archive").</text:p>
        </text:list-item>
        <text:list-item>
          <text:p text:style-name="P45"><text:span text:style-name="Source_20_Text"><text:span text:style-name="T4">-v</text:span></text:span>: <text:span text:style-name="T3">V</text:span>erbose (shows you a list of every file as it is being unpacked).</text:p>
        </text:list-item>
        <text:list-item>
          <text:p text:style-name="P46"><text:span text:style-name="Source_20_Text"><text:span text:style-name="T4">-f</text:span></text:span>: <text:span text:style-name="T3">F</text:span>ile (tells Linux: "The next word is the name of the archive I want to open").</text:p>
        </text:list-item>
      </text:list>
      <text:p text:style-name="P40"/>
      <text:h text:style-name="P37" text:outline-level="2">The Basic Recipe</text:h>
      <text:p text:style-name="P6"><text:span text:style-name="Source_20_Text"><text:span text:style-name="T2">tar -xvf backup.tar</text:span></text:span></text:p>
      <text:list text:style-name="L16">
        <text:list-item>
          <text:p text:style-name="P47"><text:span text:style-name="Source_20_Text"><text:span text:style-name="T4">tar -xvf</text:span></text:span>: The "unpack" instruction.</text:p>
        </text:list-item>
        <text:list-item>
          <text:p text:style-name="P48"><text:span text:style-name="Source_20_Text"><text:span text:style-name="T4">backup.tar</text:span></text:span>: The name of the file you are opening.</text:p>
        </text:list-item>
      </text:list>
      <text:p text:style-name="P40"/>
      <text:h text:style-name="P37" text:outline-level="2">2 Important Tips for Beginners</text:h>
      <text:list text:style-name="L17">
        <text:list-item>
          <text:p text:style-name="P49"><text:span text:style-name="T3">Where do the files go?</text:span><text:line-break/>By default, Linux will dump the files into the <text:span text:style-name="T3">exact folder you are currently in</text:span>. If the archive has 100 files, they will all appear in your current directory.</text:p>
        </text:list-item>
        <text:list-item>
          <text:p text:style-name="P50"><text:span text:style-name="T3">Extracting to a specific folder (</text:span><text:span text:style-name="Source_20_Text"><text:span text:style-name="T4">-C</text:span></text:span><text:span text:style-name="T3">)</text:span><text:line-break/>If you want to keep things tidy and put the files into a specific folder (like the <text:span text:style-name="Source_20_Text"><text:span text:style-name="T5">Test</text:span></text:span> folder we <text:soft-page-break/>made earlier), use the <text:span text:style-name="T3">Capital C flag</text:span>:<text:line-break/><text:span text:style-name="Source_20_Text"><text:span text:style-name="T5">tar -xvf backup.tar -C ./Test</text:span></text:span></text:p>
        </text:list-item>
      </text:list>
      <text:h text:style-name="P37" text:outline-level="2">The Complete "Tar" Cheat Sheet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Command</text:p>
          </table:table-cell>
          <table:table-cell table:style-name="Table4.A1" office:value-type="string">
            <text:p text:style-name="P2">Action</text:p>
          </table:table-cell>
          <table:table-cell table:style-name="Table4.A1" office:value-type="string">
            <text:p text:style-name="P2">Simple Memory Trick</text:p>
          </table:table-cell>
        </table:table-row>
        <table:table-row>
          <table:table-cell table:style-name="Table4.A1" office:value-type="string">
            <text:p text:style-name="P26"><text:span text:style-name="Source_20_Text"><text:span text:style-name="T5">tar -cvf</text:span></text:span></text:p>
          </table:table-cell>
          <table:table-cell table:style-name="Table4.A1" office:value-type="string">
            <text:p text:style-name="P3">Create</text:p>
          </table:table-cell>
          <table:table-cell table:style-name="Table4.A1" office:value-type="string">
            <text:p text:style-name="P4"><text:span text:style-name="T3">C</text:span>onstruct a file</text:p>
          </table:table-cell>
        </table:table-row>
        <table:table-row>
          <table:table-cell table:style-name="Table4.A1" office:value-type="string">
            <text:p text:style-name="P26"><text:span text:style-name="Source_20_Text"><text:span text:style-name="T5">tar -tf</text:span></text:span></text:p>
          </table:table-cell>
          <table:table-cell table:style-name="Table4.A1" office:value-type="string">
            <text:p text:style-name="P3">List</text:p>
          </table:table-cell>
          <table:table-cell table:style-name="Table4.A1" office:value-type="string">
            <text:p text:style-name="P4"><text:span text:style-name="T3">T</text:span>able of contents</text:p>
          </table:table-cell>
        </table:table-row>
        <table:table-row>
          <table:table-cell table:style-name="Table4.A1" office:value-type="string">
            <text:p text:style-name="P26"><text:span text:style-name="Source_20_Text"><text:span text:style-name="T5">tar -xvf</text:span></text:span></text:p>
          </table:table-cell>
          <table:table-cell table:style-name="Table4.A1" office:value-type="string">
            <text:p text:style-name="P3">Extract</text:p>
          </table:table-cell>
          <table:table-cell table:style-name="Table4.A1" office:value-type="string">
            <text:p text:style-name="P4"><text:span text:style-name="T3">X</text:span> marks the spot (dig it out)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2"/>
      <text:p text:style-name="P11"/>
      <text:p text:style-name="P34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12:02:38.470463644</meta:creation-date>
    <dc:date>2026-05-04T12:29:08.992343561</dc:date>
    <meta:editing-duration>PT26M36S</meta:editing-duration>
    <meta:editing-cycles>3</meta:editing-cycles>
    <meta:generator>LibreOffice/25.2.3.2$Linux_X86_64 LibreOffice_project/520$Build-2</meta:generator>
    <meta:document-statistic meta:table-count="4" meta:image-count="0" meta:object-count="0" meta:page-count="11" meta:paragraph-count="142" meta:word-count="1195" meta:character-count="6400" meta:non-whitespace-character-count="5380"/>
  </office:meta>
</office:document-meta>
</file>