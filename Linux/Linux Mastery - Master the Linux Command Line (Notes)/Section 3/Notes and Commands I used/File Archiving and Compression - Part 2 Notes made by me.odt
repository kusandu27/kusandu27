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465in" table:align="left"/>
    </style:style>
    <style:style style:name="Table1.A" style:family="table-column">
      <style:table-column-properties style:column-width="0.491in"/>
    </style:style>
    <style:style style:name="Table1.B" style:family="table-column">
      <style:table-column-properties style:column-width="0.7167in"/>
    </style:style>
    <style:style style:name="Table1.C" style:family="table-column">
      <style:table-column-properties style:column-width="1.4444in"/>
    </style:style>
    <style:style style:name="Table1.D" style:family="table-column">
      <style:table-column-properties style:column-width="0.8944in"/>
    </style:style>
    <style:style style:name="Table1.A1" style:family="table-cell">
      <style:table-cell-properties style:vertical-align="middle" fo:padding="0.0694in" fo:border="1pt solid #000000"/>
    </style:style>
    <style:style style:name="Table2" style:family="table">
      <style:table-properties style:width="4.7264in" table:align="left"/>
    </style:style>
    <style:style style:name="Table2.A" style:family="table-column">
      <style:table-column-properties style:column-width="0.9722in"/>
    </style:style>
    <style:style style:name="Table2.B" style:family="table-column">
      <style:table-column-properties style:column-width="0.8736in"/>
    </style:style>
    <style:style style:name="Table2.C" style:family="table-column">
      <style:table-column-properties style:column-width="2.8806in"/>
    </style:style>
    <style:style style:name="Table2.A1" style:family="table-cell">
      <style:table-cell-properties style:vertical-align="middle" fo:padding="0.0694in" fo:border="1pt solid #000000"/>
    </style:style>
    <style:style style:name="Table3" style:family="table">
      <style:table-properties style:width="4.1653in" table:align="left"/>
    </style:style>
    <style:style style:name="Table3.A" style:family="table-column">
      <style:table-column-properties style:column-width="0.984in"/>
    </style:style>
    <style:style style:name="Table3.B" style:family="table-column">
      <style:table-column-properties style:column-width="1.3556in"/>
    </style:style>
    <style:style style:name="Table3.C" style:family="table-column">
      <style:table-column-properties style:column-width="0.7167in"/>
    </style:style>
    <style:style style:name="Table3.D" style:family="table-column">
      <style:table-column-properties style:column-width="1.109in"/>
    </style:style>
    <style:style style:name="Table3.A1" style:family="table-cell">
      <style:table-cell-properties style:vertical-align="middle" fo:padding="0.0694in" fo:border="1pt solid #000000"/>
    </style:style>
    <style:style style:name="Table4" style:family="table">
      <style:table-properties style:width="4.3965in" table:align="left"/>
    </style:style>
    <style:style style:name="Table4.A" style:family="table-column">
      <style:table-column-properties style:column-width="0.3986in"/>
    </style:style>
    <style:style style:name="Table4.B" style:family="table-column">
      <style:table-column-properties style:column-width="0.641in"/>
    </style:style>
    <style:style style:name="Table4.C" style:family="table-column">
      <style:table-column-properties style:column-width="3.3569in"/>
    </style:style>
    <style:style style:name="Table4.A1" style:family="table-cell">
      <style:table-cell-properties style:vertical-align="middle" fo:padding="0.0694in" fo:border="1pt solid #000000"/>
    </style:style>
    <style:style style:name="P1" style:family="paragraph" style:parent-style-name="Standard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2" style:family="paragraph" style:parent-style-name="Standard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3" style:family="paragraph" style:parent-style-name="Heading_20_2">
      <style:paragraph-properties fo:margin-left="0in" fo:margin-right="0in" fo:text-indent="0in" style:auto-text-indent="false"/>
      <style:text-properties fo:font-size="15pt" fo:font-weight="bold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fo:font-weight="bold"/>
    </style:style>
    <style:style style:name="P7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fo:font-weight="bold"/>
    </style:style>
    <style:style style:name="P11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12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13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4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15" style:family="paragraph" style:parent-style-name="Table_20_Heading">
      <style:paragraph-properties fo:margin-left="0in" fo:margin-right="0in" fo:text-align="start" style:justify-single-word="false" fo:text-indent="0in" style:auto-text-indent="false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weight="bold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18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</style:style>
    <style:style style:name="P19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  <style:text-properties fo:font-weight="normal"/>
    </style:style>
    <style:style style:name="P20" style:family="paragraph" style:parent-style-name="Standard">
      <style:paragraph-properties fo:margin-left="0.1665in" fo:margin-right="0.1665in" fo:margin-top="0.1665in" fo:margin-bottom="0.1665in" style:contextual-spacing="false" fo:text-indent="0in" style:auto-text-indent="false" style:writing-mode="lr-tb"/>
      <style:text-properties fo:font-weight="normal"/>
    </style:style>
    <style:style style:name="P21" style:family="paragraph" style:parent-style-name="Heading_20_2">
      <style:paragraph-properties fo:margin-left="0in" fo:margin-right="0in" fo:margin-top="0.1665in" fo:margin-bottom="0.1665in" style:contextual-spacing="false" fo:line-height="115%" fo:text-indent="0in" style:auto-text-indent="false"/>
      <style:text-properties fo:font-size="15pt" fo:font-weight="bold"/>
    </style:style>
    <style:style style:name="P22" style:family="paragraph" style:parent-style-name="Text_20_body" style:list-style-name="L4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23" style:family="paragraph" style:parent-style-name="Text_20_body" style:list-style-name="L4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24" style:family="paragraph" style:parent-style-name="Text_20_body" style:list-style-name="L5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25" style:family="paragraph" style:parent-style-name="Horizontal_20_Line">
      <style:paragraph-properties fo:margin-top="0.1665in" fo:margin-bottom="0.1665in" style:contextual-spacing="false" fo:line-height="115%"/>
    </style:style>
    <style:style style:name="P26" style:family="paragraph" style:parent-style-name="Text_20_body" style:list-style-name="L6">
      <style:paragraph-properties fo:margin-top="0.1665in" fo:margin-bottom="0.1965in" style:contextual-spacing="false"/>
    </style:style>
    <style:style style:name="P27" style:family="paragraph" style:parent-style-name="Text_20_body" style:list-style-name="L7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28" style:family="paragraph" style:parent-style-name="Text_20_body" style:list-style-name="L8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29" style:family="paragraph" style:parent-style-name="Text_20_body" style:list-style-name="L8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30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</style:style>
    <style:style style:name="P31" style:family="paragraph" style:parent-style-name="Heading_20_2">
      <style:paragraph-properties fo:margin-left="0in" fo:margin-right="0in" fo:margin-top="0.1665in" fo:margin-bottom="0.1665in" style:contextual-spacing="false" fo:line-height="115%" fo:text-indent="0in" style:auto-text-indent="false" style:writing-mode="lr-tb"/>
    </style:style>
    <style:style style:name="P32" style:family="paragraph" style:parent-style-name="Text_20_body" style:list-style-name="L9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33" style:family="paragraph" style:parent-style-name="Text_20_body" style:list-style-name="L9">
      <style:paragraph-properties fo:margin-left="0in" fo:margin-right="0in" fo:margin-top="0.1665in" fo:margin-bottom="0in" style:contextual-spacing="false" fo:text-indent="0in" style:auto-text-indent="false"/>
    </style:style>
    <style:style style:name="P34" style:family="paragraph" style:parent-style-name="Text_20_body" style:list-style-name="L9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35" style:family="paragraph" style:parent-style-name="Text_20_body" style:list-style-name="L10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36" style:family="paragraph" style:parent-style-name="Text_20_body" style:list-style-name="L10">
      <style:paragraph-properties fo:margin-left="0in" fo:margin-right="0in" fo:margin-top="0.1665in" fo:margin-bottom="0in" style:contextual-spacing="false" fo:text-indent="0in" style:auto-text-indent="false"/>
    </style:style>
    <style:style style:name="P37" style:family="paragraph" style:parent-style-name="Text_20_body" style:list-style-name="L10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Heading_20_2">
      <style:paragraph-properties fo:margin-left="0in" fo:margin-right="0in" fo:margin-top="0.1665in" fo:margin-bottom="0.1665in" style:contextual-spacing="false" fo:line-height="115%" fo:text-indent="0in" style:auto-text-indent="false" style:writing-mode="lr-tb"/>
      <style:text-properties fo:font-weight="normal"/>
    </style:style>
    <style:style style:name="P40" style:family="paragraph" style:parent-style-name="Text_20_body" style:list-style-name="L11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41" style:family="paragraph" style:parent-style-name="Text_20_body" style:list-style-name="L11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42" style:family="paragraph" style:parent-style-name="Text_20_body" style:list-style-name="L12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43" style:family="paragraph" style:parent-style-name="Text_20_body" style:list-style-name="L12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44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45" style:family="paragraph" style:parent-style-name="Text_20_body" style:list-style-name="L13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46" style:family="paragraph" style:parent-style-name="Text_20_body" style:list-style-name="L13">
      <style:paragraph-properties fo:margin-left="0in" fo:margin-right="0in" fo:margin-top="0.1665in" fo:margin-bottom="0.1965in" style:contextual-spacing="false" fo:text-indent="0in" style:auto-text-indent="false" style:writing-mode="lr-tb"/>
    </style:style>
    <style:style style:name="P47" style:family="paragraph" style:parent-style-name="Text_20_body">
      <style:paragraph-properties fo:margin-top="0.1665in" fo:margin-bottom="0in" style:contextual-spacing="false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style="italic" fo:font-weight="normal"/>
    </style:style>
    <style:style style:name="T4" style:family="text">
      <style:text-properties fo:font-weight="normal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5" style:family="text">
      <style:text-properties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6" style:family="text">
      <style:text-properties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7" style:family="text">
      <style:text-properties fo:font-style="italic"/>
    </style:style>
    <style:style style:name="T8" style:family="text">
      <style:text-properties fo:font-style="italic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9" style:family="text">
      <style:text-properties fo:font-size="15pt" fo:font-weight="bold"/>
    </style:style>
    <style:style style:name="T10" style:family="text">
      <style:text-properties fo:font-size="15pt"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Both </text:span><text:span text:style-name="T2">gzip</text:span><text:span text:style-name="T1"> and </text:span><text:span text:style-name="T2">bzip2</text:span><text:span text:style-name="T1"> are used to "shrink" files (compression) to save space. In Linux, we usually use them </text:span><text:span text:style-name="Emphasis"><text:span text:style-name="T3">after</text:span></text:span><text:span text:style-name="T1"> we've bundled files together with </text:span><text:span text:style-name="Source_20_Text"><text:span text:style-name="T4">tar</text:span></text:span><text:span text:style-name="T1">.</text:span></text:p>
      <text:p text:style-name="P2">Here is how they differ and how to use them:</text:p>
      <text:h text:style-name="P3" text:outline-level="2">1. Gzip (Fast &amp; Popular)</text:h>
      <text:list text:style-name="L1">
        <text:list-item>
          <text:p text:style-name="P4"><text:span text:style-name="T2">The Vibe:</text:span> It's the standard. It’s fast and works on almost every system.</text:p>
        </text:list-item>
        <text:list-item>
          <text:p text:style-name="P5"><text:span text:style-name="T2">File Extension:</text:span> <text:span text:style-name="Source_20_Text"><text:span text:style-name="T5">.gz</text:span></text:span></text:p>
        </text:list-item>
        <text:list-item>
          <text:p text:style-name="P6">How to use it:</text:p>
          <text:list>
            <text:list-item>
              <text:p text:style-name="P5"><text:span text:style-name="T2">Compress:</text:span> <text:span text:style-name="Source_20_Text"><text:span text:style-name="T5">gzip file1.txt</text:span></text:span> (This turns it into <text:span text:style-name="Source_20_Text"><text:span text:style-name="T5">file1.txt.gz</text:span></text:span> and <text:span text:style-name="T2">deletes</text:span> the original).</text:p>
            </text:list-item>
            <text:list-item>
              <text:p text:style-name="P7"><text:span text:style-name="T2">Decompress:</text:span> <text:span text:style-name="Source_20_Text"><text:span text:style-name="T5">gunzip file1.txt.gz</text:span></text:span></text:p>
            </text:list-item>
          </text:list>
        </text:list-item>
      </text:list>
      <text:p text:style-name="Horizontal_20_Line"/>
      <text:h text:style-name="P3" text:outline-level="2">2. Bzip2 (Better Shrinking)</text:h>
      <text:list text:style-name="L2">
        <text:list-item>
          <text:p text:style-name="P8"><text:span text:style-name="T2">The Vibe:</text:span> It’s "heavy duty." It takes longer to run, but it makes the file even smaller than Gzip does.</text:p>
        </text:list-item>
        <text:list-item>
          <text:p text:style-name="P9"><text:span text:style-name="T2">File Extension:</text:span> <text:span text:style-name="Source_20_Text"><text:span text:style-name="T5">.bz2</text:span></text:span></text:p>
        </text:list-item>
        <text:list-item>
          <text:p text:style-name="P10">How to use it:</text:p>
          <text:list>
            <text:list-item>
              <text:p text:style-name="P9"><text:span text:style-name="T2">Compress:</text:span> <text:span text:style-name="Source_20_Text"><text:span text:style-name="T5">bzip2 file1.txt</text:span></text:span> (This turns it into <text:span text:style-name="Source_20_Text"><text:span text:style-name="T5">file1.txt.bz2</text:span></text:span>).</text:p>
            </text:list-item>
            <text:list-item>
              <text:p text:style-name="P11"><text:span text:style-name="T2">Decompress:</text:span> <text:span text:style-name="Source_20_Text"><text:span text:style-name="T5">bunzip2 file1.txt.bz2</text:span></text:span></text:p>
            </text:list-item>
          </text:list>
        </text:list-item>
      </text:list>
      <text:p text:style-name="Horizontal_20_Line"/>
      <text:h text:style-name="P3" text:outline-level="2">3. The "Pro" Way: Using them with Tar</text:h>
      <text:p text:style-name="P12"><text:span text:style-name="T1">You rarely use them alone. Usually, you tell </text:span><text:span text:style-name="Source_20_Text"><text:span text:style-name="T4">tar</text:span></text:span><text:span text:style-name="T1"> to compress the archive </text:span><text:span text:style-name="T2">while</text:span><text:span text:style-name="T1"> it's making it. This is why you see files like </text:span><text:span text:style-name="Source_20_Text"><text:span text:style-name="T4">.tar.gz</text:span></text:span><text:span text:style-name="T1">.</text:span></text:p>
      <text:list text:style-name="L3">
        <text:list-item>
          <text:p text:style-name="P13"><text:span text:style-name="T2">For Gzip (use </text:span><text:span text:style-name="Source_20_Text"><text:span text:style-name="T6">z</text:span></text:span><text:span text:style-name="T2">):</text:span><text:line-break/><text:span text:style-name="Source_20_Text"><text:span text:style-name="T5">tar -czvf backup.tar.gz ./Test</text:span></text:span><text:line-break/><text:span text:style-name="Emphasis"><text:span text:style-name="T7">(The </text:span></text:span><text:span text:style-name="Emphasis"><text:span text:style-name="Source_20_Text"><text:span text:style-name="T8">z</text:span></text:span></text:span><text:span text:style-name="Emphasis"><text:span text:style-name="T7"> tells tar: "Zip it up with Gzip")</text:span></text:span></text:p>
        </text:list-item>
        <text:list-item>
          <text:p text:style-name="P14"><text:span text:style-name="T2">For Bzip2 (use </text:span><text:span text:style-name="Source_20_Text"><text:span text:style-name="T6">j</text:span></text:span><text:span text:style-name="T2">):</text:span><text:line-break/><text:span text:style-name="Source_20_Text"><text:span text:style-name="T5">tar -cjvf backup.tar.bz2 ./Test</text:span></text:span><text:line-break/><text:span text:style-name="Emphasis"><text:span text:style-name="T7">(The </text:span></text:span><text:span text:style-name="Emphasis"><text:span text:style-name="Source_20_Text"><text:span text:style-name="T8">j</text:span></text:span></text:span><text:span text:style-name="Emphasis"><text:span text:style-name="T7"> tells tar: "Zip it up with Bzip2")</text:span></text:span></text:p>
        </text:list-item>
      </text:list>
      <text:h text:style-name="P3" text:outline-level="2"><text:soft-page-break/>Comparison for your no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Tool</text:p>
          </table:table-cell>
          <table:table-cell table:style-name="Table1.A1" office:value-type="string">
            <text:p text:style-name="P15">Speed</text:p>
          </table:table-cell>
          <table:table-cell table:style-name="Table1.A1" office:value-type="string">
            <text:p text:style-name="P15">Compression (Size)</text:p>
          </table:table-cell>
          <table:table-cell table:style-name="Table1.A1" office:value-type="string">
            <text:p text:style-name="P15">Flag in Tar</text:p>
          </table:table-cell>
        </table:table-row>
        <table:table-row>
          <table:table-cell table:style-name="Table1.A1" office:value-type="string">
            <text:p text:style-name="P16">Gzip</text:p>
          </table:table-cell>
          <table:table-cell table:style-name="Table1.A1" office:value-type="string">
            <text:p text:style-name="P17">🚀 Fast</text:p>
          </table:table-cell>
          <table:table-cell table:style-name="Table1.A1" office:value-type="string">
            <text:p text:style-name="P17">Good</text:p>
          </table:table-cell>
          <table:table-cell table:style-name="Table1.A1" office:value-type="string">
            <text:p text:style-name="P18"><text:span text:style-name="Source_20_Text"><text:span text:style-name="T5">-z</text:span></text:span></text:p>
          </table:table-cell>
        </table:table-row>
        <table:table-row>
          <table:table-cell table:style-name="Table1.A1" office:value-type="string">
            <text:p text:style-name="P16">Bzip2</text:p>
          </table:table-cell>
          <table:table-cell table:style-name="Table1.A1" office:value-type="string">
            <text:p text:style-name="P17">🐢 Slower</text:p>
          </table:table-cell>
          <table:table-cell table:style-name="Table1.A1" office:value-type="string">
            <text:p text:style-name="P17">Better (Smaller)</text:p>
          </table:table-cell>
          <table:table-cell table:style-name="Table1.A1" office:value-type="string">
            <text:p text:style-name="P18"><text:span text:style-name="Source_20_Text"><text:span text:style-name="T5">-j</text:span></text:span></text:p>
          </table:table-cell>
        </table:table-row>
      </table:table>
      <text:p text:style-name="P12"><text:span text:style-name="T2">Quick Tip:</text:span><text:span text:style-name="T1"> If you see a file ending in </text:span><text:span text:style-name="Source_20_Text"><text:span text:style-name="T4">.tgz</text:span></text:span><text:span text:style-name="T1">, that’s just a shorthand way of writing </text:span><text:span text:style-name="Source_20_Text"><text:span text:style-name="T4">.tar.gz</text:span></text:span><text:span text:style-name="T1">!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While <text:span text:style-name="Source_20_Text"><text:span text:style-name="T5">tar</text:span></text:span> is the "Linux way" to bundle files, the <text:span text:style-name="Source_20_Text"><text:span text:style-name="T6">zip</text:span></text:span> and <text:span text:style-name="Source_20_Text"><text:span text:style-name="T6">unzip</text:span></text:span> commands are used for standard <text:span text:style-name="Source_20_Text"><text:span text:style-name="T5">.zip</text:span></text:span> files (the same ones you see on Windows and Mac).</text:p>
      <text:h text:style-name="P21" text:outline-level="2">1. To Create a Zip File</text:h>
      <text:p text:style-name="P12"><text:span text:style-name="T1">The command is </text:span><text:span text:style-name="Source_20_Text"><text:span text:style-name="T4">zip</text:span></text:span><text:span text:style-name="T1">.</text:span></text:p>
      <text:p text:style-name="P12"><text:span text:style-name="T2">Simple Example:</text:span><text:span text:style-name="T1"><text:line-break/></text:span><text:span text:style-name="Source_20_Text"><text:span text:style-name="T4">zip my_archive.zip file1.txt file2.txt</text:span></text:span></text:p>
      <text:list text:style-name="L4">
        <text:list-item>
          <text:p text:style-name="P22"><text:span text:style-name="Source_20_Text"><text:span text:style-name="T6">my_archive.zip</text:span></text:span>: The name of the new zip file you are creating.</text:p>
        </text:list-item>
        <text:list-item>
          <text:p text:style-name="P23"><text:span text:style-name="Source_20_Text"><text:span text:style-name="T6">file1.txt file2.txt</text:span></text:span>: The items you want to put inside.</text:p>
        </text:list-item>
      </text:list>
      <text:p text:style-name="P12"><text:span text:style-name="T2">To zip an entire folder:</text:span><text:span text:style-name="T1"><text:line-break/></text:span><text:span text:style-name="Source_20_Text"><text:span text:style-name="T4">zip -r my_folder.zip Test/</text:span></text:span></text:p>
      <text:list text:style-name="L5">
        <text:list-item>
          <text:p text:style-name="P24"><text:span text:style-name="Source_20_Text"><text:span text:style-name="T6">-r</text:span></text:span>: Stands for <text:span text:style-name="T2">Recursive</text:span>. You <text:span text:style-name="T2">must</text:span> use this if you want to include everything <text:span text:style-name="Emphasis"><text:span text:style-name="T7">inside</text:span></text:span> the folder.</text:p>
        </text:list-item>
      </text:list>
      <text:p text:style-name="P25"/>
      <text:h text:style-name="P21" text:outline-level="2">2. To Unzip a File</text:h>
      <text:p text:style-name="P12"><text:span text:style-name="T1">The command is </text:span><text:span text:style-name="Source_20_Text"><text:span text:style-name="T4">unzip</text:span></text:span><text:span text:style-name="T1">.</text:span></text:p>
      <text:p text:style-name="P12"><text:span text:style-name="T2">Simple Example:</text:span><text:span text:style-name="T1"><text:line-break/></text:span><text:span text:style-name="Source_20_Text"><text:span text:style-name="T4">unzip my_archive.zip</text:span></text:span></text:p>
      <text:list text:style-name="L6">
        <text:list-item>
          <text:p text:style-name="P26">This extracts everything into your current folder.</text:p>
        </text:list-item>
      </text:list>
      <text:p text:style-name="P12"><text:soft-page-break/><text:span text:style-name="T2">To unzip into a specific folder:</text:span><text:span text:style-name="T1"><text:line-break/></text:span><text:span text:style-name="Source_20_Text"><text:span text:style-name="T4">unzip my_archive.zip -d ./my_new_folder</text:span></text:span></text:p>
      <text:list text:style-name="L7">
        <text:list-item>
          <text:p text:style-name="P27"><text:span text:style-name="Source_20_Text"><text:span text:style-name="T6">-d</text:span></text:span>: Stands for <text:span text:style-name="T2">Directory</text:span>. This is like the <text:span text:style-name="Source_20_Text"><text:span text:style-name="T5">-C</text:span></text:span> flag we used with <text:span text:style-name="Source_20_Text"><text:span text:style-name="T5">tar</text:span></text:span>. It tells Linux: "Put the files here."</text:p>
        </text:list-item>
      </text:list>
      <text:p text:style-name="P25"/>
      <text:h text:style-name="P21" text:outline-level="2">Key Differences for Your Note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Task</text:p>
          </table:table-cell>
          <table:table-cell table:style-name="Table2.A1" office:value-type="string">
            <text:p text:style-name="P15">Command</text:p>
          </table:table-cell>
          <table:table-cell table:style-name="Table2.A1" office:value-type="string">
            <text:p text:style-name="P15">Important Flag</text:p>
          </table:table-cell>
        </table:table-row>
        <table:table-row>
          <table:table-cell table:style-name="Table2.A1" office:value-type="string">
            <text:p text:style-name="P16">Zip a Folder</text:p>
          </table:table-cell>
          <table:table-cell table:style-name="Table2.A1" office:value-type="string">
            <text:p text:style-name="P18"><text:span text:style-name="Source_20_Text"><text:span text:style-name="T5">zip</text:span></text:span></text:p>
          </table:table-cell>
          <table:table-cell table:style-name="Table2.A1" office:value-type="string">
            <text:p text:style-name="P18"><text:span text:style-name="Source_20_Text"><text:span text:style-name="T6">-r</text:span></text:span> (must have this for folders!)</text:p>
          </table:table-cell>
        </table:table-row>
        <table:table-row>
          <table:table-cell table:style-name="Table2.A1" office:value-type="string">
            <text:p text:style-name="P16">Unzip</text:p>
          </table:table-cell>
          <table:table-cell table:style-name="Table2.A1" office:value-type="string">
            <text:p text:style-name="P18"><text:span text:style-name="Source_20_Text"><text:span text:style-name="T5">unzip</text:span></text:span></text:p>
          </table:table-cell>
          <table:table-cell table:style-name="Table2.A1" office:value-type="string">
            <text:p text:style-name="P18"><text:span text:style-name="Source_20_Text"><text:span text:style-name="T6">-d</text:span></text:span> (to choose where they go)</text:p>
          </table:table-cell>
        </table:table-row>
        <table:table-row>
          <table:table-cell table:style-name="Table2.A1" office:value-type="string">
            <text:p text:style-name="P16">See inside</text:p>
          </table:table-cell>
          <table:table-cell table:style-name="Table2.A1" office:value-type="string">
            <text:p text:style-name="P18"><text:span text:style-name="Source_20_Text"><text:span text:style-name="T5">unzip -l</text:span></text:span></text:p>
          </table:table-cell>
          <table:table-cell table:style-name="Table2.A1" office:value-type="string">
            <text:p text:style-name="P18"><text:span text:style-name="Source_20_Text"><text:span text:style-name="T6">-l</text:span></text:span> (Lists the contents without extracting)</text:p>
          </table:table-cell>
        </table:table-row>
      </table:table>
      <text:h text:style-name="P21" text:outline-level="2">Why use Zip instead of Tar?</text:h>
      <text:list text:style-name="L8">
        <text:list-item>
          <text:p text:style-name="P28"><text:span text:style-name="T2">Compatibility:</text:span> If you need to send a file to someone using <text:span text:style-name="T2">Windows</text:span>, use <text:span text:style-name="Source_20_Text"><text:span text:style-name="T5">.zip</text:span></text:span>.</text:p>
        </text:list-item>
        <text:list-item>
          <text:p text:style-name="P29"><text:span text:style-name="T2">Convenience:</text:span> <text:span text:style-name="Source_20_Text"><text:span text:style-name="T5">zip</text:span></text:span> compresses the files automatically (you don't need an extra step like <text:span text:style-name="Source_20_Text"><text:span text:style-name="T5">gzip</text:span></text:span>).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2">These are the "all-in-one" commands for <text:span text:style-name="T2">bundling and shrinking</text:span> files at the same time.</text:p>
      <text:p text:style-name="P1"><text:span text:style-name="T1">In your previous notes, we saw </text:span><text:span text:style-name="Source_20_Text"><text:span text:style-name="T4">tar -cvf</text:span></text:span><text:span text:style-name="T1"> (packing a suitcase). Adding </text:span><text:span text:style-name="Source_20_Text"><text:span text:style-name="T6">z</text:span></text:span><text:span text:style-name="T1"> or </text:span><text:span text:style-name="Source_20_Text"><text:span text:style-name="T6">j</text:span></text:span><text:span text:style-name="T1"> is like using a vacuum sealer to suck the air out so the suitcase is smaller.</text:span></text:p>
      <text:h text:style-name="P31" text:outline-level="2"><text:span text:style-name="T9">1. </text:span><text:span text:style-name="Source_20_Text"><text:span text:style-name="T10">tar -cvzf</text:span></text:span><text:span text:style-name="T9"> (The Fast One)</text:span></text:h>
      <text:list text:style-name="L9">
        <text:list-item>
          <text:p text:style-name="P32"><text:span text:style-name="T2">The Flag:</text:span> <text:span text:style-name="Source_20_Text"><text:span text:style-name="T5">z</text:span></text:span> stands for <text:span text:style-name="T2">gzip</text:span>.</text:p>
        </text:list-item>
        <text:list-item>
          <text:p text:style-name="P32"><text:span text:style-name="T2">The File Extension:</text:span> Usually ends in <text:span text:style-name="Source_20_Text"><text:span text:style-name="T6">.tar.gz</text:span></text:span> or <text:span text:style-name="Source_20_Text"><text:span text:style-name="T6">.tgz</text:span></text:span>.</text:p>
        </text:list-item>
        <text:list-item>
          <text:p text:style-name="P33"><text:span text:style-name="T2">When to use it:</text:span> When you want it done <text:span text:style-name="T2">fast</text:span>. It’s the most common way to compress files in Linux.</text:p>
        </text:list-item>
        <text:list-item>
          <text:p text:style-name="P34"><text:span text:style-name="T2">Example:</text:span><text:line-break/><text:span text:style-name="Source_20_Text"><text:span text:style-name="T5">tar -cvzf backup.tar.gz ./Test</text:span></text:span><text:line-break/><text:span text:style-name="Emphasis"><text:span text:style-name="T7">(Creates a compressed bundle of the "Test" folder using Gzip).</text:span></text:span></text:p>
        </text:list-item>
      </text:list>
      <text:p text:style-name="P25"/>
      <text:h text:style-name="P31" text:outline-level="2"><text:span text:style-name="T9">2. </text:span><text:span text:style-name="Source_20_Text"><text:span text:style-name="T10">tar -cvjf</text:span></text:span><text:span text:style-name="T9"> (The Small One)</text:span></text:h>
      <text:list text:style-name="L10">
        <text:list-item>
          <text:p text:style-name="P35"><text:span text:style-name="T2">The Flag:</text:span> <text:span text:style-name="Source_20_Text"><text:span text:style-name="T5">j</text:span></text:span> stands for <text:span text:style-name="T2">bzip2</text:span>.</text:p>
        </text:list-item>
        <text:list-item>
          <text:p text:style-name="P35"><text:span text:style-name="T2">The File Extension:</text:span> Usually ends in <text:span text:style-name="Source_20_Text"><text:span text:style-name="T6">.tar.bz2</text:span></text:span>.</text:p>
        </text:list-item>
        <text:list-item>
          <text:p text:style-name="P36"><text:span text:style-name="T2">When to use it:</text:span> When you want the <text:span text:style-name="T2">smallest file size possible</text:span> and don't mind waiting a few extra seconds for it to finish.</text:p>
        </text:list-item>
        <text:list-item>
          <text:p text:style-name="P37"><text:span text:style-name="T2">Example:</text:span><text:line-break/><text:span text:style-name="Source_20_Text"><text:span text:style-name="T5">tar -cvjf backup.tar.bz2 ./Test</text:span></text:span><text:line-break/><text:span text:style-name="Emphasis"><text:span text:style-name="T7">(Creates a highly-compressed bundle of the "Test" folder using Bzip2).</text:span></text:span></text:p>
        </text:list-item>
      </text:list>
      <text:p text:style-name="P25"/>
      <text:h text:style-name="P21" text:outline-level="2"><text:soft-page-break/>Note-Taking Comparison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5">Command</text:p>
          </table:table-cell>
          <table:table-cell table:style-name="Table3.A1" office:value-type="string">
            <text:p text:style-name="P15">Compression Tool</text:p>
          </table:table-cell>
          <table:table-cell table:style-name="Table3.A1" office:value-type="string">
            <text:p text:style-name="P15">Speed</text:p>
          </table:table-cell>
          <table:table-cell table:style-name="Table3.A1" office:value-type="string">
            <text:p text:style-name="P15">Resulting Size</text:p>
          </table:table-cell>
        </table:table-row>
        <table:table-row>
          <table:table-cell table:style-name="Table3.A1" office:value-type="string">
            <text:p text:style-name="P18"><text:span text:style-name="Source_20_Text"><text:span text:style-name="T5">tar -cvzf</text:span></text:span></text:p>
          </table:table-cell>
          <table:table-cell table:style-name="Table3.A1" office:value-type="string">
            <text:p text:style-name="P16">Gzip</text:p>
          </table:table-cell>
          <table:table-cell table:style-name="Table3.A1" office:value-type="string">
            <text:p text:style-name="P17">🚀 Fast</text:p>
          </table:table-cell>
          <table:table-cell table:style-name="Table3.A1" office:value-type="string">
            <text:p text:style-name="P17">Small</text:p>
          </table:table-cell>
        </table:table-row>
        <table:table-row>
          <table:table-cell table:style-name="Table3.A1" office:value-type="string">
            <text:p text:style-name="P18"><text:span text:style-name="Source_20_Text"><text:span text:style-name="T5">tar -cvjf</text:span></text:span></text:p>
          </table:table-cell>
          <table:table-cell table:style-name="Table3.A1" office:value-type="string">
            <text:p text:style-name="P16">Bzip2</text:p>
          </table:table-cell>
          <table:table-cell table:style-name="Table3.A1" office:value-type="string">
            <text:p text:style-name="P17">🐢 Slower</text:p>
          </table:table-cell>
          <table:table-cell table:style-name="Table3.A1" office:value-type="string">
            <text:p text:style-name="P38">Smallest</text:p>
          </table:table-cell>
        </table:table-row>
      </table:table>
      <text:p text:style-name="P12"><text:span text:style-name="T2">Beginner Tip:</text:span><text:span text:style-name="T1"> To </text:span><text:span text:style-name="T2">unpack</text:span><text:span text:style-name="T1"> these, you just swap the </text:span><text:span text:style-name="Source_20_Text"><text:span text:style-name="T4">c</text:span></text:span><text:span text:style-name="T1"> (create) for an </text:span><text:span text:style-name="Source_20_Text"><text:span text:style-name="T4">x</text:span></text:span><text:span text:style-name="T1"> (extract). Linux is smart—if you type </text:span><text:span text:style-name="Source_20_Text"><text:span text:style-name="T4">tar -xvf backup.tar.gz</text:span></text:span><text:span text:style-name="T1">, it usually figures out it needs to unzip it automatically, but you can also use </text:span><text:span text:style-name="Source_20_Text"><text:span text:style-name="T4">tar -xvzf</text:span></text:span><text:span text:style-name="T1"> to be specific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These are the <text:span text:style-name="T2">unpacking</text:span> versions of the commands you just learned. While <text:span text:style-name="Source_20_Text"><text:span text:style-name="T5">-c</text:span></text:span> <text:span text:style-name="T2">creates</text:span> the archive, <text:span text:style-name="Source_20_Text"><text:span text:style-name="T5">-x</text:span></text:span> <text:span text:style-name="T2">extracts</text:span> it (takes everything out).</text:p>
      <text:p text:style-name="P1"><text:span text:style-name="T1">In most modern Linux systems, you can just use </text:span><text:span text:style-name="Source_20_Text"><text:span text:style-name="T4">tar -xvf</text:span></text:span><text:span text:style-name="T1">, and Linux will figure out the compression for you. But it is good practice for your notes to know the specific flags:</text:span></text:p>
      <text:h text:style-name="P39" text:outline-level="2"><text:span text:style-name="T9">1. </text:span><text:span text:style-name="Source_20_Text"><text:span text:style-name="T10">tar -xvzf</text:span></text:span><text:span text:style-name="T9"> (Unpack a Gzip file)</text:span></text:h>
      <text:list text:style-name="L11">
        <text:list-item>
          <text:p text:style-name="P40"><text:span text:style-name="T2">The Flag:</text:span> <text:span text:style-name="Source_20_Text"><text:span text:style-name="T5">z</text:span></text:span> tells tar to use <text:span text:style-name="T2">Gzip</text:span> to decompress.</text:p>
        </text:list-item>
        <text:list-item>
          <text:p text:style-name="P40"><text:span text:style-name="T2">Use on:</text:span> Files ending in <text:span text:style-name="Source_20_Text"><text:span text:style-name="T5">.tar.gz</text:span></text:span> or <text:span text:style-name="Source_20_Text"><text:span text:style-name="T5">.tgz</text:span></text:span>.</text:p>
        </text:list-item>
        <text:list-item>
          <text:p text:style-name="P41"><text:span text:style-name="T2">Example:</text:span><text:line-break/><text:span text:style-name="Source_20_Text"><text:span text:style-name="T5">tar -xvzf backup.tar.gz</text:span></text:span><text:line-break/><text:span text:style-name="Emphasis"><text:span text:style-name="T7">(This "un-vacuums" the Gzip layer and then unpacks the files.)</text:span></text:span></text:p>
        </text:list-item>
      </text:list>
      <text:p text:style-name="P25"/>
      <text:h text:style-name="P39" text:outline-level="2"><text:span text:style-name="T9">2. </text:span><text:span text:style-name="Source_20_Text"><text:span text:style-name="T10">tar -xvjf</text:span></text:span><text:span text:style-name="T9"> (Unpack a Bzip2 file)</text:span></text:h>
      <text:list text:style-name="L12">
        <text:list-item>
          <text:p text:style-name="P42"><text:span text:style-name="T2">The Flag:</text:span> <text:span text:style-name="Source_20_Text"><text:span text:style-name="T5">j</text:span></text:span> tells tar to use <text:span text:style-name="T2">Bzip2</text:span> to decompress.</text:p>
        </text:list-item>
        <text:list-item>
          <text:p text:style-name="P42"><text:span text:style-name="T2">Use on:</text:span> Files ending in <text:span text:style-name="Source_20_Text"><text:span text:style-name="T5">.tar.bz2</text:span></text:span>.</text:p>
        </text:list-item>
        <text:list-item>
          <text:p text:style-name="P43"><text:span text:style-name="T2">Example:</text:span><text:line-break/><text:span text:style-name="Source_20_Text"><text:span text:style-name="T5">tar -xvjf backup.tar.bz2</text:span></text:span><text:line-break/><text:span text:style-name="Emphasis"><text:span text:style-name="T7">(This handles the heavy-duty compression used by Bzip2 to get your files out.)</text:span></text:span></text:p>
        </text:list-item>
      </text:list>
      <text:p text:style-name="P25"/>
      <text:h text:style-name="P21" text:outline-level="2">Summary for your Notes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>Part</text:p>
          </table:table-cell>
          <table:table-cell table:style-name="Table4.A1" office:value-type="string">
            <text:p text:style-name="P15">Action</text:p>
          </table:table-cell>
          <table:table-cell table:style-name="Table4.A1" office:value-type="string">
            <text:p text:style-name="P15">Simple Meaning</text:p>
          </table:table-cell>
        </table:table-row>
        <table:table-row>
          <table:table-cell table:style-name="Table4.A1" office:value-type="string">
            <text:p text:style-name="P18"><text:span text:style-name="Source_20_Text"><text:span text:style-name="T6">-x</text:span></text:span></text:p>
          </table:table-cell>
          <table:table-cell table:style-name="Table4.A1" office:value-type="string">
            <text:p text:style-name="P16">Extract</text:p>
          </table:table-cell>
          <table:table-cell table:style-name="Table4.A1" office:value-type="string">
            <text:p text:style-name="P17">Pull the files out.</text:p>
          </table:table-cell>
        </table:table-row>
        <text:soft-page-break/>
        <table:table-row>
          <table:table-cell table:style-name="Table4.A1" office:value-type="string">
            <text:p text:style-name="P18"><text:span text:style-name="Source_20_Text"><text:span text:style-name="T6">-v</text:span></text:span></text:p>
          </table:table-cell>
          <table:table-cell table:style-name="Table4.A1" office:value-type="string">
            <text:p text:style-name="P16">Verbose</text:p>
          </table:table-cell>
          <table:table-cell table:style-name="Table4.A1" office:value-type="string">
            <text:p text:style-name="P17">Show me the names of files as they come out.</text:p>
          </table:table-cell>
        </table:table-row>
        <table:table-row>
          <table:table-cell table:style-name="Table4.A1" office:value-type="string">
            <text:p text:style-name="P18"><text:span text:style-name="Source_20_Text"><text:span text:style-name="T6">-z</text:span></text:span></text:p>
          </table:table-cell>
          <table:table-cell table:style-name="Table4.A1" office:value-type="string">
            <text:p text:style-name="P16">Gzip</text:p>
          </table:table-cell>
          <table:table-cell table:style-name="Table4.A1" office:value-type="string">
            <text:p text:style-name="P18">Handle the <text:span text:style-name="Source_20_Text"><text:span text:style-name="T5">.gz</text:span></text:span> format.</text:p>
          </table:table-cell>
        </table:table-row>
        <table:table-row>
          <table:table-cell table:style-name="Table4.A1" office:value-type="string">
            <text:p text:style-name="P18"><text:span text:style-name="Source_20_Text"><text:span text:style-name="T6">-j</text:span></text:span></text:p>
          </table:table-cell>
          <table:table-cell table:style-name="Table4.A1" office:value-type="string">
            <text:p text:style-name="P16">Bzip2</text:p>
          </table:table-cell>
          <table:table-cell table:style-name="Table4.A1" office:value-type="string">
            <text:p text:style-name="P18">Handle the <text:span text:style-name="Source_20_Text"><text:span text:style-name="T5">.bz2</text:span></text:span> format.</text:p>
          </table:table-cell>
        </table:table-row>
        <table:table-row>
          <table:table-cell table:style-name="Table4.A1" office:value-type="string">
            <text:p text:style-name="P18"><text:span text:style-name="Source_20_Text"><text:span text:style-name="T6">-f</text:span></text:span></text:p>
          </table:table-cell>
          <table:table-cell table:style-name="Table4.A1" office:value-type="string">
            <text:p text:style-name="P16">File</text:p>
          </table:table-cell>
          <table:table-cell table:style-name="Table4.A1" office:value-type="string">
            <text:p text:style-name="P38">"The very next word is the name of my archive."</text:p>
          </table:table-cell>
        </table:table-row>
      </table:table>
      <text:h text:style-name="P21" text:outline-level="2">The "Newbie" Rule of Thumb</text:h>
      <text:p text:style-name="P44">Always look at the <text:span text:style-name="T2">extension</text:span> of the file you downloaded:</text:p>
      <text:list text:style-name="L13">
        <text:list-item>
          <text:p text:style-name="P45">Ends in <text:span text:style-name="Source_20_Text"><text:span text:style-name="T5">.gz</text:span></text:span>? Use <text:span text:style-name="Source_20_Text"><text:span text:style-name="T6">z</text:span></text:span>.</text:p>
        </text:list-item>
        <text:list-item>
          <text:p text:style-name="P46">Ends in <text:span text:style-name="Source_20_Text"><text:span text:style-name="T5">.bz2</text:span></text:span>? Use <text:span text:style-name="Source_20_Text"><text:span text:style-name="T6">j</text:span></text:span>.</text:p>
        </text:list-item>
      </text:list>
      <text:p text:style-name="P12"><text:span text:style-name="T2">Pro Tip:</text:span><text:span text:style-name="T1"> Remember the </text:span><text:span text:style-name="Source_20_Text"><text:span text:style-name="T6">-C</text:span></text:span><text:span text:style-name="T1"> flag from earlier? You can combine it here too!<text:line-break/></text:span><text:span text:style-name="Source_20_Text"><text:span text:style-name="T4">tar -xvzf backup.tar.gz -C ./MyFolder</text:span></text:span><text:span text:style-name="T1"> will extract everything directly into </text:span><text:span text:style-name="Source_20_Text"><text:span text:style-name="T4">MyFolder</text:span></text:span><text:span text:style-name="T1">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2"><text:span text:style-name="T1"/></text:p>
      <text:p text:style-name="P47"/>
      <text:p text:style-name="P19"/>
      <text:p text:style-name="P47"/>
      <text:p text:style-name="P30"/>
      <text:p text:style-name="P19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4T14:02:32.108846630</meta:creation-date>
    <dc:date>2026-05-04T14:38:06.905980755</dc:date>
    <meta:editing-duration>PT35M43S</meta:editing-duration>
    <meta:editing-cycles>3</meta:editing-cycles>
    <meta:generator>LibreOffice/25.2.3.2$Linux_X86_64 LibreOffice_project/520$Build-2</meta:generator>
    <meta:document-statistic meta:table-count="4" meta:image-count="0" meta:object-count="0" meta:page-count="9" meta:paragraph-count="122" meta:word-count="930" meta:character-count="4996" meta:non-whitespace-character-count="4224"/>
  </office:meta>
</office:document-meta>
</file>