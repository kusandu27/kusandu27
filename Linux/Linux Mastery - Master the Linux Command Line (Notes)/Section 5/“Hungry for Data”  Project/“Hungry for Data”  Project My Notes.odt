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7000002310AC503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9fce" officeooo:paragraph-rsid="001a9fce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a07f7" officeooo:paragraph-rsid="001a9fce" fo:background-color="#ffff00" style:font-weight-asian="bold" style:font-weight-complex="bold"/>
    </style:style>
    <style:style style:name="P3" style:family="paragraph" style:parent-style-name="Standard">
      <style:text-properties officeooo:rsid="001a07f7" officeooo:paragraph-rsid="001a9fce"/>
    </style:style>
    <style:style style:name="P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officeooo:rsid="001a07f7"/>
    </style:style>
    <style:style style:name="P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 officeooo:rsid="001a07f7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1a07f7"/>
    </style:style>
    <style:style style:name="P7" style:family="paragraph" style:parent-style-name="Text_20_body" style:list-style-name="L1">
      <style:paragraph-properties fo:margin-left="0in" fo:margin-right="0in" fo:text-indent="0in" style:auto-text-indent="false" style:writing-mode="lr-tb"/>
      <style:text-properties officeooo:rsid="001a07f7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1a07f7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1a07f7" officeooo:paragraph-rsid="001a9fce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1a9fce" officeooo:paragraph-rsid="001a9fce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1a9fce"/>
    </style:style>
    <style:style style:name="P12" style:family="paragraph" style:parent-style-name="Standard">
      <style:text-properties officeooo:paragraph-rsid="001ae72b"/>
    </style:style>
    <style:style style:name="P1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style:font-name="monospace" fo:font-size="10.5pt" fo:font-weight="bold" officeooo:rsid="001ae72b" loext:padding-left="0in" loext:padding-right="0in" loext:padding-top="0in" loext:padding-bottom="0.0193in" loext:border-left="none" loext:border-right="none" loext:border-top="none" loext:border-bottom="0.06pt solid #2c2e35"/>
    </style:style>
    <style:style style:name="P1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style:font-name="monospace" fo:font-size="10.5pt" fo:font-weight="normal" officeooo:rsid="001ae72b" loext:padding-left="0in" loext:padding-right="0in" loext:padding-top="0in" loext:padding-bottom="0.0193in" loext:border-left="none" loext:border-right="none" loext:border-top="none" loext:border-bottom="0.06pt solid #2c2e35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monospace" fo:font-size="10.5pt" officeooo:rsid="001ae72b" loext:padding-left="0in" loext:padding-right="0in" loext:padding-top="0in" loext:padding-bottom="0.0193in" loext:border-left="none" loext:border-right="none" loext:border-top="none" loext:border-bottom="0.06pt solid #2c2e35"/>
    </style:style>
    <style:style style:name="P16" style:family="paragraph" style:parent-style-name="Text_20_body" style:list-style-name="L2">
      <style:paragraph-properties fo:margin-left="0in" fo:margin-right="0in" fo:text-indent="0in" style:auto-text-indent="false" style:writing-mode="lr-tb"/>
      <style:text-properties style:font-name="monospace" fo:font-size="10.5pt" officeooo:rsid="001ae72b" loext:padding-left="0in" loext:padding-right="0in" loext:padding-top="0in" loext:padding-bottom="0.0193in" loext:border-left="none" loext:border-right="none" loext:border-top="none" loext:border-bottom="0.06pt solid #2c2e35"/>
    </style:style>
    <style:style style:name="P1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style:font-name="monospace" fo:font-size="10.5pt" officeooo:rsid="001ae72b" loext:padding-left="0in" loext:padding-right="0in" loext:padding-top="0in" loext:padding-bottom="0.0193in" loext:border-left="none" loext:border-right="none" loext:border-top="none" loext:border-bottom="0.06pt solid #2c2e35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monospace" fo:font-size="10.5pt" officeooo:rsid="001ae72b" loext:padding-left="0in" loext:padding-right="0in" loext:padding-top="0in" loext:padding-bottom="0.0193in" loext:border-left="none" loext:border-right="none" loext:border-top="none" loext:border-bottom="0.06pt solid #2c2e35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font-weight="bold"/>
    </style:style>
    <style:style style:name="T6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7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8" style:family="text">
      <style:text-properties officeooo:rsid="001a9fce"/>
    </style:style>
    <style:style style:name="T9" style:family="text">
      <style:text-properties style:text-line-through-style="none" style:text-line-through-type="none" style:font-name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10" style:family="text">
      <style:text-properties style:text-line-through-style="none" style:text-line-through-type="none" style:font-name="monospace" fo:font-size="10.5pt" style:text-underline-style="none" fo:font-weight="normal" officeooo:rsid="001b1dc7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11" style:family="text">
      <style:text-properties style:text-line-through-style="none" style:text-line-through-type="none" style:font-name="monospace" fo:font-size="10.5pt" style:text-underline-style="none" fo:font-weight="normal" officeooo:rsid="001ae72b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12" style:family="text">
      <style:text-properties style:text-line-through-style="none" style:text-line-through-type="none" style:font-name="monospace" fo:font-size="15pt" style:text-underline-style="none" fo:font-weight="bold" officeooo:rsid="001ae72b" style:text-blinking="false" loext:padding-left="0in" loext:padding-right="0in" loext:padding-top="0in" loext:padding-bottom="0.0193in" loext:border-left="none" loext:border-right="none" loext:border-top="none" loext:border-bottom="0.06pt solid #2c2e35"/>
    </style:style>
    <style:style style:name="T13" style:family="text">
      <style:text-properties fo:background-color="#ffff00" loext:char-shading-value="0"/>
    </style:style>
    <style:style style:name="T14" style:family="text">
      <style:text-properties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 </text:p>
      <text:p text:style-name="P2"/>
      <text:p text:style-name="P3"><text:span text:style-name="T1"><text:s/>nano hungry.sh</text:span><text:line-break/><text:line-break/><text:span text:style-name="T2">#!/bin/bash<text:line-break/><text:line-break/>echo “I am hungry. Feed me data.” &gt;&gt; ~/demands.txt<text:line-break/><text:line-break/>date &gt;&gt; ~/demands.log</text:span></text:p>
      <text:p text:style-name="P3"><text:line-break/></text:p>
      <text:p text:style-name="P4"><text:span text:style-name="T3">My </text:span><text:span text:style-name="Source_20_Text"><text:span text:style-name="T4">hungry.sh</text:span></text:span><text:span text:style-name="T3"> Command Breakdow</text:span><text:span text:style-name="T5">n</text:span></text:p>
      <text:p text:style-name="P5">Here is how I built the script to handle data demands and logging:</text:p>
      <text:list text:style-name="L1">
        <text:list-item>
          <text:p text:style-name="P6"><text:span text:style-name="Source_20_Text"><text:span text:style-name="T6">#!/bin/bash</text:span></text:span>: The <text:a xlink:type="simple" xlink:href="https://linuxhandbook.com/shebang/" text:style-name="Internet_20_link" text:visited-style-name="Visited_20_Internet_20_Link">shebang</text:a> that tells my system to use the Bash interpreter to run these commands.</text:p>
        </text:list-item>
        <text:list-item>
          <text:p text:style-name="P6"><text:span text:style-name="Source_20_Text"><text:span text:style-name="T6">echo "I am hungry. Feed me data."</text:span></text:span>: This is the <text:a xlink:type="simple" xlink:href="https://www.gnu.org/software/bash/manual/html_node/Shell-Builtin-Commands.html" text:style-name="Internet_20_link" text:visited-style-name="Visited_20_Internet_20_Link">output command</text:a>. It prints the specific text I want to save.</text:p>
        </text:list-item>
        <text:list-item>
          <text:p text:style-name="P6"><text:span text:style-name="Source_20_Text"><text:span text:style-name="T6">&gt;&gt;</text:span></text:span>: The <text:span text:style-name="T5">Append Redirection</text:span> symbol. This was the "secret sauce"—it ensures that every time I run the script, it adds a new line to the file instead of <text:a xlink:type="simple" xlink:href="https://www.digitalocean.com/community/tutorials/an-introduction-to-linux-i-o-redirection" text:style-name="Internet_20_link" text:visited-style-name="Visited_20_Internet_20_Link">deleting the old ones</text:a>.</text:p>
        </text:list-item>
        <text:list-item>
          <text:p text:style-name="P6"><text:span text:style-name="Source_20_Text"><text:span text:style-name="T6">~/demands.txt</text:span></text:span>: This points to a file in my home directory (<text:span text:style-name="Source_20_Text"><text:span text:style-name="T7">~</text:span></text:span>).</text:p>
        </text:list-item>
        <text:list-item>
          <text:p text:style-name="P6"><text:span text:style-name="Source_20_Text"><text:span text:style-name="T6">date</text:span></text:span>: A standard command that pulls the current <text:a xlink:type="simple" xlink:href="https://man7.org/linux/man-pages/man1/chmod.1.html" text:style-name="Internet_20_link" text:visited-style-name="Visited_20_Internet_20_Link">system date and time</text:a>.</text:p>
        </text:list-item>
        <text:list-item>
          <text:p text:style-name="P7"><text:span text:style-name="Source_20_Text"><text:span text:style-name="T6">&gt;&gt; ~/demands.log</text:span></text:span>: This sends that timestamp into a separate log file, appending it to the bottom so I can track every time the script was triggered.</text:p>
        </text:list-item>
      </text:list>
      <text:p text:style-name="P5"><text:span text:style-name="T5">Summary:</text:span> I created a simple automation that maintains a history of "demands" and a matching log of "timestamps" without ever losing previous data.</text:p>
      <text:p text:style-name="P5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/>
      <text:p text:style-name="P10">Task 2</text:p>
      <text:p text:style-name="P11"/>
      <text:p text:style-name="P11">crontab -e</text:p>
      <text:p text:style-name="P11"/>
      <text:p text:style-name="P11"><text:span text:style-name="T8">then,<text:line-break/><text:line-break/><text:line-break/></text:span><text:span text:style-name="Source_20_Text"><text:span text:style-name="T9">* * * * * /home/</text:span></text:span><text:span text:style-name="Source_20_Text"><text:span text:style-name="T10">AT-ST</text:span></text:span><text:span text:style-name="Source_20_Text"><text:span text:style-name="T9">/hungry.sh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<text:line-break/><text:line-break/></text:span></text:span></text:p>
      <text:p text:style-name="P12"><draw:frame draw:style-name="fr1" draw:name="Image1" text:anchor-type="char" svg:width="6.9252in" svg:height="4.2272in" draw:z-index="0"><draw:image xlink:href="Pictures/1000000100000397000002310AC50361.png" xlink:type="simple" xlink:show="embed" xlink:actuate="onLoad" draw:mime-type="image/png"/></draw:frame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oft-page-break/><text:span text:style-name="Source_20_Text"><text:span text:style-name="T11"/></text:span></text:p>
      <text:p text:style-name="P12"><text:span text:style-name="Source_20_Text"><text:span text:style-name="T12"/></text:span></text:p>
      <text:p text:style-name="P13">How I Completed Task 2</text:p>
      <text:p text:style-name="P14">To satisfy my computer's hunger for data, I set up a recurring schedule using the system’s built-in automation tool. Here is the breakdown:</text:p>
      <text:list text:style-name="L2">
        <text:list-item>
          <text:p text:style-name="P15"><text:span text:style-name="Source_20_Text"><text:span text:style-name="T6">crontab -e</text:span></text:span>: I used this command to open my personal <text:a xlink:type="simple" xlink:href="https://man7.org/linux/man-pages/man1/chmod.1.html" text:style-name="Internet_20_link" text:visited-style-name="Visited_20_Internet_20_Link"><text:span text:style-name="T13">cron table</text:span></text:a><text:span text:style-name="T13"> (</text:span>the schedule list). The <text:span text:style-name="Source_20_Text"><text:span text:style-name="T7">-e</text:span></text:span> flag stands for <text:span text:style-name="T5">edit</text:span>, allowing me to add new automated tasks.</text:p>
        </text:list-item>
        <text:list-item>
          <text:p text:style-name="P15"><text:span text:style-name="T5">The Five Stars (</text:span><text:span text:style-name="Source_20_Text"><text:span text:style-name="T6">* * * * *</text:span></text:span><text:span text:style-name="T5">)</text:span>: This is the cron timing syntax for "<text:span text:style-name="T5">Every Minute</text:span>."</text:p>
          <text:list>
            <text:list-item>
              <text:p text:style-name="P15">Since every column (minute, hour, day of month, month, day of week) is a wildcard (<text:span text:style-name="Source_20_Text"><text:span text:style-name="T7">*</text:span></text:span>), the task triggers at the start of every single minute, 24/7.</text:p>
            </text:list-item>
          </text:list>
        </text:list-item>
        <text:list-item>
          <text:p text:style-name="P15"><text:span text:style-name="Source_20_Text"><text:span text:style-name="T6">/home/YOUR_USERNAME/hungry.sh</text:span></text:span>: I provided the <text:span text:style-name="T5">Absolute Path</text:span> to the script.</text:p>
          <text:list>
            <text:list-item>
              <text:p text:style-name="P15"><text:span text:style-name="T5">Why?</text:span> Unlike a human, <text:a xlink:type="simple" xlink:href="https://cronitor.io/guides/cron-job-working-directory" text:style-name="Internet_20_link" text:visited-style-name="Visited_20_Internet_20_Link">Cron doesn't know</text:a> what folder it is currently in. By giving the full address starting from the root (<text:span text:style-name="Source_20_Text"><text:span text:style-name="T7">/</text:span></text:span>), I ensured the system can find and run my script regardless of its "location."</text:p>
            </text:list-item>
          </text:list>
        </text:list-item>
        <text:list-item>
          <text:p text:style-name="P16"><text:span text:style-name="T5">Execution</text:span>: By saving the file, I "installed" the new crontab. Now, my <text:span text:style-name="Source_20_Text"><text:span text:style-name="T7">demands.txt</text:span></text:span> and <text:span text:style-name="Source_20_Text"><text:span text:style-name="T7">demands.log</text:span></text:span> files will grow every 60 seconds as the script appends new data automatically.</text:p>
        </text:list-item>
      </text:list>
      <text:p text:style-name="P17"><text:span text:style-name="T5">Summary:</text:span><text:span text:style-name="T14"> I successfully linked a custom script to a </text:span><text:a xlink:type="simple" xlink:href="https://en.wikipedia.org/wiki/Cron" text:style-name="Internet_20_link" text:visited-style-name="Visited_20_Internet_20_Link"><text:span text:style-name="T14">system daemon</text:span></text:a><text:span text:style-name="T14"> to achieve 100% automated logging.</text:span></text:p>
      <text:p text:style-name="P14"/>
      <text:p text:style-name="P18"/>
      <text:p text:style-name="P12"><text:span text:style-name="Source_20_Text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4:30:25.445805151</meta:creation-date>
    <meta:generator>LibreOffice/25.2.3.2$Linux_X86_64 LibreOffice_project/520$Build-2</meta:generator>
    <dc:date>2026-05-06T14:57:09.023491527</dc:date>
    <meta:editing-duration>PT15M10S</meta:editing-duration>
    <meta:editing-cycles>3</meta:editing-cycles>
    <meta:document-statistic meta:table-count="0" meta:image-count="1" meta:object-count="0" meta:page-count="3" meta:paragraph-count="25" meta:word-count="389" meta:character-count="2166" meta:non-whitespace-character-count="1803"/>
  </office:meta>
</office:document-meta>
</file>