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0354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3.404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size="20pt" style:text-underline-style="solid" style:text-underline-width="auto" style:text-underline-color="font-color" fo:font-weight="bold" style:font-size-asian="20pt" style:font-size-complex="20pt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3" style:family="paragraph" style:parent-style-name="Heading_20_2">
      <style:paragraph-properties fo:margin-left="0in" fo:margin-right="0in" fo:text-indent="0in" style:auto-text-indent="false"/>
      <style:text-properties fo:font-size="12pt" fo:font-weight="bold"/>
    </style:style>
    <style:style style:name="P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9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Standard">
      <style:text-properties officeooo:rsid="0010f045" officeooo:paragraph-rsid="0010f045"/>
    </style:style>
    <style:style style:name="P15" style:family="paragraph" style:parent-style-name="Heading_20_2">
      <style:paragraph-properties fo:margin-left="0in" fo:margin-right="0in" fo:text-indent="0in" style:auto-text-indent="false"/>
      <style:text-properties fo:font-size="15pt" fo:font-weight="bold" officeooo:rsid="0010f045"/>
    </style:style>
    <style:style style:name="P1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officeooo:rsid="0010f045"/>
    </style:style>
    <style:style style:name="P17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/>
      <style:text-properties fo:font-weight="normal" officeooo:rsid="0010f045"/>
    </style:style>
    <style:style style:name="P18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 officeooo:rsid="0010f045"/>
    </style:style>
    <style:style style:name="P19" style:family="paragraph" style:parent-style-name="Preformatted_20_Text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fo:color="#80868b" loext:opacity="100%" fo:font-style="italic" officeooo:rsid="0010f045"/>
    </style:style>
    <style:style style:name="P20" style:family="paragraph" style:parent-style-name="Preformatted_20_Text">
      <style:paragraph-properties fo:margin-top="0.1665in" fo:margin-bottom="0.1665in" style:contextual-spacing="false" fo:line-height="115%" style:writing-mode="lr-tb"/>
      <style:text-properties officeooo:rsid="0010f045"/>
    </style:style>
    <style:style style:name="P21" style:family="paragraph" style:parent-style-name="Preformatted_20_Text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officeooo:rsid="0010f045"/>
    </style:style>
    <style:style style:name="P22" style:family="paragraph" style:parent-style-name="Preformatted_20_Text">
      <style:paragraph-properties fo:margin-top="0.1665in" fo:margin-bottom="0.1665in" style:contextual-spacing="false" fo:line-height="115%" style:writing-mode="lr-tb"/>
      <style:text-properties fo:color="#cccccc" loext:opacity="100%" officeooo:rsid="0010f045" fo:background-color="transparent"/>
    </style:style>
    <style:style style:name="P23" style:family="paragraph" style:parent-style-name="Preformatted_20_Text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officeooo:rsid="0010f045" officeooo:paragraph-rsid="0014214d"/>
    </style:style>
    <style:style style:name="P24" style:family="paragraph" style:parent-style-name="Horizontal_20_Line">
      <style:paragraph-properties fo:margin-top="0.1665in" fo:margin-bottom="0.1665in" style:contextual-spacing="false" fo:line-height="115%"/>
      <style:text-properties officeooo:rsid="0010f045"/>
    </style:style>
    <style:style style:name="P25" style:family="paragraph" style:parent-style-name="Text_20_body" style:list-style-name="L4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26" style:family="paragraph" style:parent-style-name="Text_20_body" style:list-style-name="L4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27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weight="normal" officeooo:rsid="0010f045"/>
    </style:style>
    <style:style style:name="P28" style:family="paragraph" style:parent-style-name="Text_20_body">
      <style:paragraph-properties fo:margin-left="0in" fo:margin-right="0in" fo:margin-top="0.1665in" fo:margin-bottom="0.1665in" style:contextual-spacing="false" fo:line-height="115%" fo:text-indent="0in" style:auto-text-indent="false"/>
      <style:text-properties fo:font-weight="normal" officeooo:rsid="0010f045"/>
    </style:style>
    <style:style style:name="P2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 officeooo:rsid="0010f045"/>
    </style:style>
    <style:style style:name="P30" style:family="paragraph" style:parent-style-name="Text_20_body" style:list-style-name="L5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31" style:family="paragraph" style:parent-style-name="Text_20_body" style:list-style-name="L5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32" style:family="paragraph" style:parent-style-name="Text_20_body" style:list-style-name="L6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33" style:family="paragraph" style:parent-style-name="Text_20_body" style:list-style-name="L6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3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 officeooo:rsid="0010f045"/>
    </style:style>
    <style:style style:name="P35" style:family="paragraph" style:parent-style-name="Text_20_body" style:list-style-name="L7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36" style:family="paragraph" style:parent-style-name="Text_20_body" style:list-style-name="L7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37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 officeooo:rsid="0010f045"/>
    </style:style>
    <style:style style:name="P38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39" style:family="paragraph" style:parent-style-name="Text_20_body" style:list-style-name="L8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40" style:family="paragraph" style:parent-style-name="Text_20_body" style:list-style-name="L8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41" style:family="paragraph" style:parent-style-name="Text_20_body">
      <style:paragraph-properties fo:margin-top="0.1665in" fo:margin-bottom="0.1665in" style:contextual-spacing="false" fo:line-height="115%"/>
      <style:text-properties officeooo:rsid="0010f045"/>
    </style:style>
    <style:style style:name="P42" style:family="paragraph" style:parent-style-name="Standard">
      <style:paragraph-properties fo:margin-top="0.1665in" fo:margin-bottom="0.1665in" style:contextual-spacing="false" fo:line-height="115%"/>
      <style:text-properties officeooo:rsid="0010f045"/>
    </style:style>
    <style:style style:name="P43" style:family="paragraph" style:parent-style-name="Text_20_body" style:list-style-name="L9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44" style:family="paragraph" style:parent-style-name="Text_20_body" style:list-style-name="L9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45" style:family="paragraph" style:parent-style-name="Text_20_body" style:list-style-name="L10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/>
    </style:style>
    <style:style style:name="P46" style:family="paragraph" style:parent-style-name="Text_20_body" style:list-style-name="L10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47" style:family="paragraph" style:parent-style-name="Text_20_body" style:list-style-name="L11">
      <style:paragraph-properties fo:margin-left="0in" fo:margin-right="0in" fo:margin-top="0.1665in" fo:margin-bottom="0in" style:contextual-spacing="false" fo:text-indent="0in" style:auto-text-indent="false"/>
      <style:text-properties officeooo:rsid="0010f045"/>
    </style:style>
    <style:style style:name="P48" style:family="paragraph" style:parent-style-name="Text_20_body" style:list-style-name="L11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/>
    </style:style>
    <style:style style:name="P49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</style:style>
    <style:style style:name="P52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officeooo:rsid="0010f045"/>
    </style:style>
    <style:style style:name="P53" style:family="paragraph" style:parent-style-name="Text_20_body">
      <style:paragraph-properties fo:margin-left="0in" fo:margin-right="0in" fo:margin-top="0.1665in" fo:margin-bottom="0.1665in" style:contextual-spacing="false" fo:line-height="115%" fo:text-indent="0in" style:auto-text-indent="false"/>
      <style:text-properties officeooo:rsid="0010f045"/>
    </style:style>
    <style:style style:name="P54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/>
      <style:text-properties officeooo:rsid="0010f045"/>
    </style:style>
    <style:style style:name="P55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color="#cccccc" loext:opacity="100%" fo:font-size="15pt" fo:font-weight="bold" officeooo:rsid="0010f045" fo:background-color="transparent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5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57" style:family="paragraph" style:parent-style-name="Text_20_body" style:list-style-name="L12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58" style:family="paragraph" style:parent-style-name="Text_20_body" style:list-style-name="L12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5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color="#cccccc" loext:opacity="100%" fo:font-weight="normal" officeooo:rsid="0010f045" fo:background-color="transparent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color="#cccccc" loext:opacity="100%" fo:font-weight="bold" officeooo:rsid="0010f045" fo:background-color="transparent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1" style:family="paragraph" style:parent-style-name="Preformatted_20_Text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2" style:family="paragraph" style:parent-style-name="Quotations">
      <style:paragraph-properties fo:margin-left="0.5602in" fo:margin-right="0.5602in" fo:margin-top="0.1665in" fo:margin-bottom="0.1665in" style:contextual-spacing="false" fo:line-height="115%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3" style:family="paragraph" style:parent-style-name="Quotations">
      <style:paragraph-properties fo:margin-left="0.5602in" fo:margin-right="0.5602in" fo:margin-top="0.1665in" fo:margin-bottom="0.1665in" style:contextual-spacing="false" fo:line-height="115%" fo:text-indent="0in" style:auto-text-indent="false"/>
      <style:text-properties fo:font-weight="normal" officeooo:rsid="0010f045" fo:background-color="transparent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4" style:family="paragraph" style:parent-style-name="Horizontal_20_Line">
      <style:paragraph-properties fo:margin-top="0.1665in" fo:margin-bottom="0.1665in" style:contextual-spacing="false" fo:line-height="115%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5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6" style:family="paragraph" style:parent-style-name="Text_20_body" style:list-style-name="L13">
      <style:paragraph-properties fo:margin-left="0in" fo:margin-right="0in" fo:margin-top="0.1665in" fo:margin-bottom="0in" style:contextual-spacing="false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7" style:family="paragraph" style:parent-style-name="Text_20_body" style:list-style-name="L13">
      <style:paragraph-properties fo:margin-left="0in" fo:margin-right="0in" fo:margin-top="0.1665in" fo:margin-bottom="0.1965in" style:contextual-spacing="false" fo:text-indent="0in" style:auto-text-indent="false" style:writing-mode="lr-tb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8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69" style:family="paragraph" style:parent-style-name="Text_20_body">
      <style:paragraph-properties fo:margin-top="0.1665in" fo:margin-bottom="0in" style:contextual-spacing="false"/>
      <style:text-properties officeooo:rsid="0010f045" fo:background-color="#f4f6f7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P7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officeooo:rsid="0010f045"/>
    </style:style>
    <style:style style:name="P7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 officeooo:rsid="0010f045"/>
    </style:style>
    <style:style style:name="P72" style:family="paragraph" style:parent-style-name="Text_20_body">
      <style:paragraph-properties fo:margin-top="0.1665in" fo:margin-bottom="0in" style:contextual-spacing="false"/>
      <style:text-properties officeooo:rsid="0010f045"/>
    </style:style>
    <style:style style:name="P73" style:family="paragraph" style:parent-style-name="Text_20_body">
      <style:paragraph-properties fo:margin-top="0in" fo:margin-bottom="0in" style:contextual-spacing="false"/>
      <style:text-properties officeooo:rsid="0010f045"/>
    </style:style>
    <style:style style:name="T1" style:family="text">
      <style:text-properties officeooo:rsid="0010f045"/>
    </style:style>
    <style:style style:name="T2" style:family="text">
      <style:text-properties fo:font-weight="normal"/>
    </style:style>
    <style:style style:name="T3" style:family="text">
      <style:text-properties fo:font-style="italic" fo:font-weight="normal"/>
    </style:style>
    <style:style style:name="T4" style:family="text">
      <style:text-properties fo:font-weight="bold"/>
    </style:style>
    <style:style style:name="T5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7" style:family="text">
      <style:text-properties fo:font-size="15pt" fo:font-weight="bold" officeooo:rsid="00124786" style:font-size-asian="15pt" style:font-weight-asian="bold" style:font-size-complex="15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0" style:family="text">
      <style:text-properties fo:background-color="#f4f6f7" loext:char-shading-value="0" loext:padding="0in" loext:border="none"/>
    </style:style>
    <style:style style:name="T11" style:family="text">
      <style:text-properties fo:color="#188038" loext:opacity="100%" fo:background-color="#f4f6f7" loext:char-shading-value="0" loext:padding="0in" loext:border="none"/>
    </style:style>
    <style:style style:name="T12" style:family="text">
      <style:text-properties fo:background-color="transparent" loext:char-shading-value="0" loext:padding="0in" loext:border="none"/>
    </style:style>
    <style:style style:name="T13" style:family="text">
      <style:text-properties fo:color="#cccccc" loext:opacity="100%" fo:background-color="transparent" loext:char-shading-value="0" loext:padding="0in" loext:border="none"/>
    </style:style>
    <style:style style:name="T14" style:family="text">
      <style:text-properties fo:color="#cccccc" loext:opacity="100%" style:text-line-through-style="none" style:text-line-through-type="none" fo:font-family="monospace" fo:font-size="10.5pt" style:text-underline-style="none" fo:font-weight="normal" style:text-blinking="false" fo:background-color="transparent" loext:char-shading-value="0" loext:padding="0in" loext:border="none"/>
    </style:style>
    <style:style style:name="T15" style:family="text">
      <style:text-properties fo:color="#cccccc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6" style:family="text">
      <style:text-properties fo:background-color="#ffff00" loext:char-shading-value="0"/>
    </style:style>
    <style:style style:name="T17" style:family="text">
      <style:text-properties fo:font-weight="normal" officeooo:rsid="00143d67"/>
    </style:style>
    <style:style style:name="T18" style:family="text">
      <style:text-properties fo:font-weight="normal" fo:background-color="#ffff00" loext:char-shading-value="0"/>
    </style:style>
    <style:style style:name="T19" style:family="text">
      <style:text-properties fo:color="#cccccc" loext:opacity="100%" fo:font-weight="normal" fo:background-color="transparent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20" style:family="text">
      <style:text-properties fo:color="#cccccc" loext:opacity="100%" fo:font-weight="normal" fo:background-color="transparent" loext:char-shading-value="0"/>
    </style:style>
    <style:style style:name="T21" style:family="text">
      <style:text-properties fo:color="#cccccc" loext:opacity="100%" fo:font-weight="bold" fo:background-color="transparent" loext:char-shading-value="0"/>
    </style:style>
    <style:style style:name="T22" style:family="text">
      <style:text-properties fo:color="#cccccc" loext:opacity="100%" fo:background-color="transparent" loext:char-shading-value="0"/>
    </style:style>
    <style:style style:name="T23" style:family="text">
      <style:text-properties fo:font-weight="bold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cheduled Automation Using Cron - Part <text:span text:style-name="T1">2</text:span></text:p>
      <text:p text:style-name="P2"><text:span text:style-name="T2">Sometimes you don't want a task to run </text:span><text:span text:style-name="Emphasis"><text:span text:style-name="T3">every</text:span></text:span><text:span text:style-name="T2"> minute or just </text:span><text:span text:style-name="Emphasis"><text:span text:style-name="T3">one</text:span></text:span><text:span text:style-name="T2"> specific minute. You can use </text:span><text:span text:style-name="T4">lists</text:span><text:span text:style-name="T2"> and </text:span><text:span text:style-name="T4">intervals</text:span><text:span text:style-name="T2"> to be more precise.</text:span></text:p>
      <text:p text:style-name="Horizontal_20_Line"/>
      <text:h text:style-name="P3" text:outline-level="2">1. Using Lists (Commas)</text:h>
      <text:p text:style-name="P4"><text:span text:style-name="Source_20_Text"><text:span text:style-name="T5">2,15,32,45 12,15,17,18 * * * echo "hello"</text:span></text:span></text:p>
      <text:list text:style-name="L1">
        <text:list-item>
          <text:p text:style-name="P5"><text:span text:style-name="Source_20_Text"><text:span text:style-name="T6">2,15,32,45</text:span></text:span>: This runs the command at exactly the 2nd, 15th, 32nd, and 45th minute of the hour.</text:p>
        </text:list-item>
        <text:list-item>
          <text:p text:style-name="P5"><text:span text:style-name="Source_20_Text"><text:span text:style-name="T6">12,15,17,18</text:span></text:span>: This tells it to run only during the 12 PM, 3 PM, 5 PM, and 6 PM hours.</text:p>
        </text:list-item>
        <text:list-item>
          <text:p text:style-name="P6"><text:span text:style-name="Source_20_Text"><text:span text:style-name="T6">* * *</text:span></text:span>: Every day, month, and day of the week.</text:p>
        </text:list-item>
      </text:list>
      <text:p text:style-name="P7"><text:span text:style-name="T4">Summary:</text:span> This command will fire 4 times an hour (at the specific minutes listed), but only during those 4 specific hours of the day.</text:p>
      <text:p text:style-name="Horizontal_20_Line"/>
      <text:h text:style-name="P3" text:outline-level="2">2. Using Intervals (Steps)</text:h>
      <text:p text:style-name="P4"><text:span text:style-name="Source_20_Text"><text:span text:style-name="T5">*/15 * * * *</text:span></text:span></text:p>
      <text:list text:style-name="L2">
        <text:list-item>
          <text:p text:style-name="P8"><text:span text:style-name="Source_20_Text"><text:span text:style-name="T6">*/</text:span></text:span>: This <text:a xlink:type="simple" xlink:href="https://linux.die.net/man/5/crontab" text:style-name="Internet_20_link" text:visited-style-name="Visited_20_Internet_20_Link">slash operator</text:a> represents a <text:span text:style-name="T4">step</text:span> or "every X amount of time."</text:p>
        </text:list-item>
        <text:list-item>
          <text:p text:style-name="P8"><text:span text:style-name="Source_20_Text"><text:span text:style-name="T6">15</text:span></text:span>: The number of units.</text:p>
        </text:list-item>
        <text:list-item>
          <text:p text:style-name="P9"><text:span text:style-name="Source_20_Text"><text:span text:style-name="T6">*/15</text:span></text:span>: In the minute column, this means <text:span text:style-name="T4">"every 15 minutes"</text:span> (starting from 0, then 15, 30, and 45).</text:p>
        </text:list-item>
      </text:list>
      <text:p text:style-name="P4"><text:span text:style-name="T4">Summary:</text:span><text:span text:style-name="T2"> This is a cleaner way of writing </text:span><text:span text:style-name="Source_20_Text"><text:span text:style-name="T5">0,15,30,45</text:span></text:span><text:span text:style-name="T2">. It’s very common for tasks like </text:span><text:a xlink:type="simple" xlink:href="https://www.hostinger.com/tutorials/cron-job" text:style-name="Internet_20_link" text:visited-style-name="Visited_20_Internet_20_Link"><text:span text:style-name="T2">database backups</text:span></text:a><text:span text:style-name="T2"> or system health checks.</text:span></text:p>
      <text:p text:style-name="Horizontal_20_Line"/>
      <text:p text:style-name="P4"><text:span text:style-name="T4">Quick Tip:</text:span><text:span text:style-name="T2"> If you want to check your work, you can use </text:span><text:span text:style-name="Source_20_Text"><text:span text:style-name="T6">crontab -l</text:span></text:span><text:span text:style-name="T2"> (List) to see all your active scheduled jobs without opening the editor.</text:span></text:p>
      <text:p text:style-name="P7"/>
      <text:p text:style-name="P10"><text:soft-page-break/></text:p>
      <text:p text:style-name="P4"><text:span text:style-name="Source_20_Text"><text:span text:style-name="T6">59 23 * JAN,DEC SUN echo "beacouse we can"</text:span></text:span></text:p>
      <text:list text:style-name="L3">
        <text:list-item>
          <text:p text:style-name="P11"><text:span text:style-name="Source_20_Text"><text:span text:style-name="T6">59</text:span></text:span>: At the 59th minute...</text:p>
        </text:list-item>
        <text:list-item>
          <text:p text:style-name="P11"><text:span text:style-name="Source_20_Text"><text:span text:style-name="T6">23</text:span></text:span>: ...of the 23rd hour (11:59 PM).</text:p>
        </text:list-item>
        <text:list-item>
          <text:p text:style-name="P11"><text:span text:style-name="Source_20_Text"><text:span text:style-name="T6">*</text:span></text:span>: On any day of the month...</text:p>
        </text:list-item>
        <text:list-item>
          <text:p text:style-name="P11"><text:span text:style-name="Source_20_Text"><text:span text:style-name="T6">JAN,DEC</text:span></text:span>: ...but only during the months of <text:span text:style-name="T4">January</text:span> or <text:span text:style-name="T4">December</text:span>.</text:p>
        </text:list-item>
        <text:list-item>
          <text:p text:style-name="P11"><text:span text:style-name="Source_20_Text"><text:span text:style-name="T6">SUN</text:span></text:span>: ...and only if that day happens to be a <text:span text:style-name="T4">Sunday</text:span>.</text:p>
        </text:list-item>
        <text:list-item>
          <text:p text:style-name="P12"><text:span text:style-name="Source_20_Text"><text:span text:style-name="T6">echo "beacouse we can"</text:span></text:span>: The <text:a xlink:type="simple" xlink:href="https://www.gnu.org/software/bash/manual/html_node/Shell-Builtin-Commands.html" text:style-name="Internet_20_link" text:visited-style-name="Visited_20_Internet_20_Link">command</text:a> that will run. [1] </text:p>
        </text:list-item>
      </text:list>
      <text:p text:style-name="P7"><text:span text:style-name="T4">Summary:</text:span> This script will run at <text:span text:style-name="T4">11:59 PM every Sunday in January and December</text:span>. It is a great example of combining specific months and specific days of the week to create a very narrow execution window.</text:p>
      <text:p text:style-name="P4"><text:span text:style-name="T4">Note:</text:span><text:span text:style-name="T2"> If you ever need to see which jobs you have scheduled without editing them, you can run </text:span><text:span text:style-name="Source_20_Text"><text:span text:style-name="T6">crontab -l</text:span></text:span><text:span text:style-name="T2"> to </text:span><text:a xlink:type="simple" xlink:href="https://man7.org/linux/man-pages/man1/chmod.1.html" text:style-name="Internet_20_link" text:visited-style-name="Visited_20_Internet_20_Link"><text:span text:style-name="T2">list</text:span></text:a><text:span text:style-name="T2"> them.</text:span></text:p>
      <text:p text:style-name="P2"/>
      <text:p text:style-name="P13"/>
      <text:p text:style-name="P14">Great Website I learned much from - <text:a xlink:type="simple" xlink:href="https://crontab.guru/" text:style-name="Internet_20_link" text:visited-style-name="Visited_20_Internet_20_Link">https://crontab.guru/</text:a><text:line-break/><text:line-break/><text:lin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7">A </text:span><text:span text:style-name="T8">great automation project </text:span><text:span text:style-name="T7">I did</text:span><text:span text:style-name="T8">! </text:span><text:span text:style-name="T2"><text:line-break/><text:line-break/>To back up your </text:span><text:span text:style-name="T4">customizations</text:span><text:span text:style-name="T2"> (themes, icons, wallpaper, and system tweaks) without your large personal files, we use a tool called </text:span><text:span text:style-name="Source_20_Text"><text:span text:style-name="T6">dconf</text:span></text:span><text:span text:style-name="T2"> and target specific hidden folders in your home directory. </text:span></text:p>
      <text:h text:style-name="P15" text:outline-level="2">The Backup Script</text:h>
      <text:p text:style-name="P16"><text:span text:style-name="T2"/></text:p>
      <text:p text:style-name="P17">You are very close! There is just one tiny typo at the end of your <text:span text:style-name="Source_20_Text"><text:span text:style-name="T9">tar</text:span></text:span> command, and we need to adjust how your script names files to ensure it <text:span text:style-name="T4">overwrites</text:span> the old backup instead of creating new ones every month.</text:p>
      <text:h text:style-name="P18" text:outline-level="2">The Updated Script</text:h>
      <text:p text:style-name="P19"><text:span text:style-name="Source_20_Text"><text:span text:style-name="T10">#!/bin/bash</text:span></text:span></text:p>
      <text:p text:style-name="P20"/>
      <text:p text:style-name="P21"><text:span text:style-name="Source_20_Text"><text:span text:style-name="T10">BACKUP_DIR=</text:span></text:span><text:span text:style-name="Source_20_Text"><text:span text:style-name="T11">"$HOME/backups"</text:span></text:span></text:p>
      <text:p text:style-name="P19"><text:span text:style-name="Source_20_Text"><text:span text:style-name="T12"># We removed the $DATE from the filename so it stays the same every month</text:span></text:span></text:p>
      <text:p text:style-name="P19"><text:span text:style-name="Source_20_Text"><text:span text:style-name="T12"># This forces the computer to overwrite the old "monthly" file with the new data.</text:span></text:span></text:p>
      <text:p text:style-name="P20"/>
      <text:p text:style-name="P21"><text:span text:style-name="Source_20_Text"><text:span text:style-name="T12">m</text:span></text:span><text:span text:style-name="Source_20_Text"><text:span text:style-name="T13">kdir -p </text:span></text:span><text:span text:style-name="Source_20_Text"><text:span text:style-name="T13">"$BACKUP_DIR"</text:span></text:span></text:p>
      <text:p text:style-name="P22"/>
      <text:p text:style-name="P19"><text:span text:style-name="Source_20_Text"><text:span text:style-name="T13"># 1. Overwrites the previous settings file</text:span></text:span></text:p>
      <text:p text:style-name="P21"><text:span text:style-name="Source_20_Text"><text:span text:style-name="T13">dconf dump / &gt; "$BACKUP_DIR/monthly_settings_backup.ini"</text:span></text:span></text:p>
      <text:p text:style-name="P22"/>
      <text:p text:style-name="P19"><text:soft-page-break/><text:span text:style-name="Source_20_Text"><text:span text:style-name="T13"># 2. Overwrites the previous zipped appearance files</text:span></text:span></text:p>
      <text:p text:style-name="P19"><text:span text:style-name="Source_20_Text"><text:span text:style-name="T13"># (Fixed: removed the extra '&gt;' at the end)</text:span></text:span></text:p>
      <text:p text:style-name="P21"><text:span text:style-name="Source_20_Text"><text:span text:style-name="T13">tar -czf "$BACKUP_DIR/monthly_appearance.tar.gz" -C "$HOME" .themes .icons .local/share/themes .local/share/icons 2&gt;/dev/null</text:span></text:span></text:p>
      <text:p text:style-name="P22"/>
      <text:p text:style-name="P21"><text:span text:style-name="Source_20_Text"><text:span text:style-name="T13">echo "Monthly customization backup complete!"</text:span></text:span></text:p>
      <text:p text:style-name="P21"><text:span text:style-name="Source_20_Text"><text:span text:style-name="T13"/></text:span></text:p>
      <text:p text:style-name="P23"><text:span text:style-name="Source_20_Text"><text:span text:style-name="T14"># The Desktop Notification</text:span></text:span><text:span text:style-name="Source_20_Text"><text:span text:style-name="T15"> </text:span></text:span></text:p>
      <text:p text:style-name="P23"><text:span text:style-name="Source_20_Text"><text:span text:style-name="T14">notify-send "Backup Complete"</text:span></text:span><text:span text:style-name="Source_20_Text"><text:span text:style-name="T15"> </text:span></text:span><text:span text:style-name="Source_20_Text"><text:span text:style-name="T14">"Your monthly system tweaks have been saved to $BACKUP_DIR"</text:span></text:span><text:span text:style-name="Source_20_Text"><text:span text:style-name="T15"> </text:span></text:span><text:span text:style-name="Source_20_Text"><text:span text:style-name="T14">--icon=drive-harddisk</text:span></text:span></text:p>
      <text:p text:style-name="P24"/>
      <text:h text:style-name="P18" text:outline-level="2">Notes Breakdown</text:h>
      <text:list text:style-name="L4">
        <text:list-item>
          <text:p text:style-name="P25"><text:span text:style-name="T4">Fixed the </text:span><text:span text:style-name="Source_20_Text"><text:span text:style-name="T6">tar</text:span></text:span><text:span text:style-name="T4"> command:</text:span> In your version, you had a <text:span text:style-name="Source_20_Text"><text:span text:style-name="T9">&gt;</text:span></text:span> at the end of the <text:span text:style-name="Source_20_Text"><text:span text:style-name="T9">tar</text:span></text:span> line. In Linux, <text:span text:style-name="Source_20_Text"><text:span text:style-name="T9">tar</text:span></text:span> uses the <text:span text:style-name="Source_20_Text"><text:span text:style-name="T9">-f</text:span></text:span> (file) flag to specify the destination, so you don't need the <text:span text:style-name="Source_20_Text"><text:span text:style-name="T9">&gt;</text:span></text:span> symbol there.</text:p>
        </text:list-item>
        <text:list-item>
          <text:p text:style-name="P25"><text:span text:style-name="T4">The Overwrite Strategy:</text:span> By naming the files <text:span text:style-name="Source_20_Text"><text:span text:style-name="T9">monthly_settings_backup.ini</text:span></text:span> instead of using <text:span text:style-name="Source_20_Text"><text:span text:style-name="T9">$DATE</text:span></text:span>, the script will find the file from last month and <text:span text:style-name="T4">replace it</text:span> with the new one. This keeps your storage usage constant [1, 2].</text:p>
        </text:list-item>
        <text:list-item>
          <text:p text:style-name="P26"><text:span text:style-name="Source_20_Text"><text:span text:style-name="T6">.local/share/icons</text:span></text:span>: I added this folder to your <text:span text:style-name="Source_20_Text"><text:span text:style-name="T9">tar</text:span></text:span> command because many modern Linux themes store icons there as well.</text:p>
        </text:list-item>
      </text:list>
      <text:p text:style-name="P24"/>
      <text:h text:style-name="P27" text:outline-level="2"/>
      <text:p text:style-name="P28"/>
      <text:p text:style-name="P28"><text:soft-page-break/></text:p>
      <text:h text:style-name="P18" text:outline-level="2">Bash Script Breakdown</text:h>
      <text:p text:style-name="P29">Here is exactly what happens when this script runs:</text:p>
      <text:list text:style-name="L5">
        <text:list-item>
          <text:p text:style-name="P30"><text:span text:style-name="Source_20_Text"><text:span text:style-name="T6">BACKUP_DIR="$HOME/backups"</text:span></text:span>: Creates a variable so the script knows exactly where to put your files.</text:p>
        </text:list-item>
        <text:list-item>
          <text:p text:style-name="P30"><text:span text:style-name="Source_20_Text"><text:span text:style-name="T6">mkdir -p</text:span></text:span>: Ensures the folder exists. If it’s already there, it moves on without complaining.</text:p>
        </text:list-item>
        <text:list-item>
          <text:p text:style-name="P30"><text:span text:style-name="Source_20_Text"><text:span text:style-name="T6">dconf dump / &gt; ...</text:span></text:span>: Grabs all your system settings (wallpaper, fonts, button layouts) and writes them into one small text file. The <text:span text:style-name="Source_20_Text"><text:span text:style-name="T9">&gt;</text:span></text:span> symbol <text:span text:style-name="T4">overwrites</text:span> last month's file.</text:p>
        </text:list-item>
        <text:list-item>
          <text:p text:style-name="P30"><text:span text:style-name="Source_20_Text"><text:span text:style-name="T6">tar -czf ...</text:span></text:span>: Compresses your actual theme and icon folders into a "zip-like" <text:span text:style-name="Source_20_Text"><text:span text:style-name="T9">.tar.gz</text:span></text:span> file. It uses absolute paths from your <text:span text:style-name="Source_20_Text"><text:span text:style-name="T9">$HOME</text:span></text:span> to find the hidden folders.</text:p>
        </text:list-item>
        <text:list-item>
          <text:p text:style-name="P31"><text:span text:style-name="Source_20_Text"><text:span text:style-name="T6">notify-send</text:span></text:span>: Triggers a <text:a xlink:type="simple" xlink:href="https://ss64.com/bash/notify-send.html" text:style-name="Internet_20_link" text:visited-style-name="Visited_20_Internet_20_Link"><text:span text:style-name="T16">desktop notification</text:span></text:a> so you get a visual "thumbs up" that the task is finished.</text:p>
        </text:list-item>
      </text:list>
      <text:p text:style-name="P24"/>
      <text:h text:style-name="P18" text:outline-level="2">How to Schedule it (The Cron Way)</text:h>
      <text:p text:style-name="P29">To make this run every <text:span text:style-name="T4">20th of every month</text:span> at <text:span text:style-name="T4">11:30 PM</text:span>, follow these steps:</text:p>
      <text:list text:style-name="L6">
        <text:list-item>
          <text:p text:style-name="P32">Open your terminal and type: <text:span text:style-name="Source_20_Text"><text:span text:style-name="T9">crontab -e</text:span></text:span></text:p>
        </text:list-item>
        <text:list-item>
          <text:p text:style-name="P32">Scroll to the very bottom and paste this line:<text:line-break/><text:span text:style-name="Source_20_Text"><text:span text:style-name="T9">30 23 20 * * /home/YOUR_USERNAME/backups/backup.sh</text:span></text:span></text:p>
        </text:list-item>
        <text:list-item>
          <text:p text:style-name="P33"><text:span text:style-name="T4">Save and Exit</text:span> (<text:span text:style-name="Source_20_Text"><text:span text:style-name="T9">Ctrl+O</text:span></text:span>, <text:span text:style-name="Source_20_Text"><text:span text:style-name="T9">Enter</text:span></text:span>, <text:span text:style-name="Source_20_Text"><text:span text:style-name="T9">Ctrl+X</text:span></text:span> if using nano).</text:p>
        </text:list-item>
      </text:list>
      <text:p text:style-name="P34">The Schedule Explained:</text:p>
      <text:list text:style-name="L7">
        <text:list-item>
          <text:p text:style-name="P35"><text:span text:style-name="Source_20_Text"><text:span text:style-name="T6">30</text:span></text:span>: The 30th minute.</text:p>
        </text:list-item>
        <text:list-item>
          <text:p text:style-name="P35"><text:soft-page-break/><text:span text:style-name="Source_20_Text"><text:span text:style-name="T6">23</text:span></text:span>: The 23rd hour (11 PM).</text:p>
        </text:list-item>
        <text:list-item>
          <text:p text:style-name="P35"><text:span text:style-name="Source_20_Text"><text:span text:style-name="T6">20</text:span></text:span>: The 20th day of the month.</text:p>
        </text:list-item>
        <text:list-item>
          <text:p text:style-name="P36"><text:span text:style-name="Source_20_Text"><text:span text:style-name="T6">* *</text:span></text:span>: Every month and every day of the week.</text:p>
        </text:list-item>
      </text:list>
      <text:p text:style-name="P16"><text:span text:style-name="T4">Quick Tip:</text:span><text:span text:style-name="T2"> Make sure you replace </text:span><text:span text:style-name="Source_20_Text"><text:span text:style-name="T5">YOUR_USERNAME</text:span></text:span><text:span text:style-name="T2"> </text:span><text:span text:style-name="T17">(AT-ST) </text:span><text:span text:style-name="T2">with your actual name (type </text:span><text:span text:style-name="Source_20_Text"><text:span text:style-name="T5">whoami</text:span></text:span><text:span text:style-name="T2"> in the terminal if you aren't sure). Also, ensure the script has </text:span><text:a xlink:type="simple" xlink:href="https://linuxize.com/post/chmod-command-in-linux/" text:style-name="Internet_20_link" text:visited-style-name="Visited_20_Internet_20_Link"><text:span text:style-name="T18">execution permissions</text:span></text:a><text:span text:style-name="T18"> </text:span><text:span text:style-name="T2">by running </text:span><text:span text:style-name="Source_20_Text"><text:span text:style-name="T5">chmod +x ~/backups/backup.sh</text:span></text:span><text:span text:style-name="T2">.</text:span></text:p>
      <text:p text:style-name="P37"><text:span text:style-name="T4"/></text:p>
      <text:p text:style-name="P38"><text:span text:style-name="T2">When you see the message </text:span><text:span text:style-name="Source_20_Text"><text:span text:style-name="T6">crontab: installing new crontab</text:span></text:span><text:span text:style-name="T2">, it means </text:span><text:a xlink:type="simple" xlink:href="https://www.howtogeek.com/101288/how-to-schedule-tasks-on-linux-an-introduction-to-crontab-files/" text:style-name="Internet_20_link" text:visited-style-name="Visited_20_Internet_20_Link"><text:span text:style-name="T18">the system</text:span></text:a><text:span text:style-name="T18"> </text:span><text:span text:style-name="T2">has successfully saved your changes and "installed" them into the </text:span><text:a xlink:type="simple" xlink:href="https://man7.org/linux/man-pages/man1/chmod.1.html" text:style-name="Internet_20_link" text:visited-style-name="Visited_20_Internet_20_Link"><text:span text:style-name="T18">active schedule</text:span></text:a><text:span text:style-name="T18">.</text:span></text:p>
      <text:h text:style-name="P18" text:outline-level="2">How to Verify</text:h>
      <text:p text:style-name="P29">If you want to be 100% sure without waiting for the 20th, you can use these two commands:</text:p>
      <text:list text:style-name="L8">
        <text:list-item>
          <text:p text:style-name="P39"><text:span text:style-name="T4">Check the List:</text:span><text:line-break/>Type <text:span text:style-name="Source_20_Text"><text:span text:style-name="T6">crontab -l</text:span></text:span> in your terminal. This will <text:a xlink:type="simple" xlink:href="https://www.cyberciti.biz/faq/howto-check-cronjob-is-running-not/" text:style-name="Internet_20_link" text:visited-style-name="Visited_20_Internet_20_Link"><text:span text:style-name="T16">list your active jobs</text:span></text:a>. If you see your backup line there, you’re good to go.</text:p>
        </text:list-item>
        <text:list-item>
          <text:p text:style-name="P40"><text:span text:style-name="T4">Check the Service Status:</text:span><text:line-break/>To make sure the<text:span text:style-name="T16"> </text:span><text:a xlink:type="simple" xlink:href="https://www.makeuseof.com/ways-to-check-cron-working-properly/" text:style-name="Internet_20_link" text:visited-style-name="Visited_20_Internet_20_Link"><text:span text:style-name="T16">cron engine itself</text:span></text:a> is running in the background, type:<text:line-break/><text:span text:style-name="Source_20_Text"><text:span text:style-name="T6">systemctl status cron</text:span></text:span> (or <text:span text:style-name="Source_20_Text"><text:span text:style-name="T9">sudo service cron status</text:span></text:span>).<text:line-break/>Look for a green line that says <text:span text:style-name="Source_20_Text"><text:span text:style-name="T6">Active: active (running)</text:span></text:span>.</text:p>
        </text:list-item>
      </text:list>
      <text:p text:style-name="P24"/>
      <text:p text:style-name="P41"/>
      <text:p text:style-name="P41"/>
      <text:p text:style-name="P41"/>
      <text:p text:style-name="P41"><text:soft-page-break/></text:p>
      <text:p text:style-name="P42"><text:span text:style-name="T2"/></text:p>
      <text:h text:style-name="P18" text:outline-level="2">1. Restore Themes and Icons</text:h>
      <text:p text:style-name="P29">First, you need to extract your folders back into your home directory.</text:p>
      <text:p text:style-name="P21"><text:span text:style-name="Source_20_Text"><text:span text:style-name="T10">tar -xzf ~/backups/monthly_appearance.tar.gz -C </text:span></text:span><text:span text:style-name="Source_20_Text"><text:span text:style-name="T11">"$HOME"</text:span></text:span></text:p>
      <text:list text:style-name="L9">
        <text:list-item>
          <text:p text:style-name="P43"><text:span text:style-name="Source_20_Text"><text:span text:style-name="T6">-x</text:span></text:span>: Tells <text:span text:style-name="Source_20_Text"><text:span text:style-name="T9">tar</text:span></text:span> to <text:span text:style-name="T4">eXtract</text:span> the files.</text:p>
        </text:list-item>
        <text:list-item>
          <text:p text:style-name="P43"><text:span text:style-name="Source_20_Text"><text:span text:style-name="T6">-z</text:span></text:span>: Tells it the file is <text:span text:style-name="T4">zipped</text:span> (compressed).</text:p>
        </text:list-item>
        <text:list-item>
          <text:p text:style-name="P43"><text:span text:style-name="Source_20_Text"><text:span text:style-name="T6">-f</text:span></text:span>: Specifies the <text:span text:style-name="T4">file</text:span> you are extracting.</text:p>
        </text:list-item>
        <text:list-item>
          <text:p text:style-name="P44"><text:span text:style-name="Source_20_Text"><text:span text:style-name="T6">-C "$HOME"</text:span></text:span>: Ensures the folders go right back into your Home directory where they belong.</text:p>
        </text:list-item>
      </text:list>
      <text:p text:style-name="P24"/>
      <text:h text:style-name="P18" text:outline-level="2">2. Restore System Settings (Themes, Wallpaper, Tweaks)</text:h>
      <text:p text:style-name="P16"><text:span text:style-name="T2">Next, you tell the system to read the </text:span><text:span text:style-name="Source_20_Text"><text:span text:style-name="T5">.ini</text:span></text:span><text:span text:style-name="T2"> file and apply those settings.</text:span></text:p>
      <text:p text:style-name="P21"><text:span text:style-name="Source_20_Text"><text:span text:style-name="T10">dconf load / &lt; ~/backups/monthly_settings_backup.ini</text:span></text:span></text:p>
      <text:list text:style-name="L10">
        <text:list-item>
          <text:p text:style-name="P45"><text:span text:style-name="Source_20_Text"><text:span text:style-name="T6">dconf load /</text:span></text:span>: The opposite of <text:span text:style-name="Source_20_Text"><text:span text:style-name="T9">dump</text:span></text:span>. It "pours" the settings from your file back into your <text:a xlink:type="simple" xlink:href="https://man7.org/linux/man-pages/man1/chmod.1.html" text:style-name="Internet_20_link" text:visited-style-name="Visited_20_Internet_20_Link">system's configuration database</text:a>.</text:p>
        </text:list-item>
        <text:list-item>
          <text:p text:style-name="P46"><text:span text:style-name="Source_20_Text"><text:span text:style-name="T6">&lt;</text:span></text:span>: This <text:a xlink:type="simple" xlink:href="https://www.gnu.org/software/bash/manual/html_node/Redirections.html" text:style-name="Internet_20_link" text:visited-style-name="Visited_20_Internet_20_Link">redirection symbol</text:a> tells the command to <text:span text:style-name="T4">read from</text:span> the file on the right.</text:p>
        </text:list-item>
      </text:list>
      <text:p text:style-name="P24"/>
      <text:h text:style-name="P18" text:outline-level="2">3. Refresh the Desktop</text:h>
      <text:p text:style-name="P29">In some cases, your theme might not change instantly. You can force a refresh by:</text:p>
      <text:list text:style-name="L11">
        <text:list-item>
          <text:p text:style-name="P47"><text:soft-page-break/><text:span text:style-name="T4">Logging out</text:span> and logging back in.</text:p>
        </text:list-item>
        <text:list-item>
          <text:p text:style-name="P48">Or, if you are using GNOME, press <text:span text:style-name="Source_20_Text"><text:span text:style-name="T9">Alt + F2</text:span></text:span>, type <text:span text:style-name="Source_20_Text"><text:span text:style-name="T9">r</text:span></text:span>, and press <text:span text:style-name="Source_20_Text"><text:span text:style-name="T9">Enter</text:span></text:span>.</text:p>
        </text:list-item>
      </text:list>
      <text:h text:style-name="P18" text:outline-level="2">Summary T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Task</text:p>
          </table:table-cell>
          <table:table-cell table:style-name="Table1.A1" office:value-type="string">
            <text:p text:style-name="P49">Command</text:p>
          </table:table-cell>
        </table:table-row>
        <table:table-row>
          <table:table-cell table:style-name="Table1.A1" office:value-type="string">
            <text:p text:style-name="P50">Backup</text:p>
          </table:table-cell>
          <table:table-cell table:style-name="Table1.A1" office:value-type="string">
            <text:p text:style-name="P51"><text:span text:style-name="Source_20_Text"><text:span text:style-name="T9">dconf dump / &gt; file.ini</text:span></text:span></text:p>
          </table:table-cell>
        </table:table-row>
        <table:table-row>
          <table:table-cell table:style-name="Table1.A1" office:value-type="string">
            <text:p text:style-name="P50">Restore</text:p>
          </table:table-cell>
          <table:table-cell table:style-name="Table1.A1" office:value-type="string">
            <text:p text:style-name="P51"><text:span text:style-name="Source_20_Text"><text:span text:style-name="T9">dconf load / &lt; file.ini</text:span></text:span></text:p>
          </table:table-cell>
        </table:table-row>
        <table:table-row>
          <table:table-cell table:style-name="Table1.A1" office:value-type="string">
            <text:p text:style-name="P50">Unzip</text:p>
          </table:table-cell>
          <table:table-cell table:style-name="Table1.A1" office:value-type="string">
            <text:p text:style-name="P51"><text:span text:style-name="Source_20_Text"><text:span text:style-name="T9">tar -xzf backup.tar.gz -C "$HOME"</text:span></text:span></text:p>
          </table:table-cell>
        </table:table-row>
      </table:table>
      <text:p text:style-name="P16"><text:span text:style-name="T4">Important:</text:span><text:span text:style-name="T2"> If you move these files to a </text:span><text:span text:style-name="T4">brand new computer</text:span><text:span text:style-name="T2">, make sure you create the </text:span><text:span text:style-name="Source_20_Text"><text:span text:style-name="T5">~/.themes</text:span></text:span><text:span text:style-name="T2"> and </text:span><text:span text:style-name="Source_20_Text"><text:span text:style-name="T5">~/.icons</text:span></text:span><text:span text:style-name="T2"> folders first, or just run the </text:span><text:span text:style-name="Source_20_Text"><text:span text:style-name="T5">tar</text:span></text:span><text:span text:style-name="T2"> command above and it will create them for you.</text:span></text:p>
      <text:p text:style-name="P16"><text:span text:style-name="T2"/></text:p>
      <text:p text:style-name="P41"/>
      <text:h text:style-name="P52" text:outline-level="2"><text:span text:style-name="Source_20_Text"><text:span text:style-name="T9"/></text:span></text:h>
      <text:p text:style-name="P53"><text:span text:style-name="Source_20_Text"><text:span text:style-name="T9"/></text:span></text:p>
      <text:p text:style-name="P53"><text:span text:style-name="Source_20_Text"><text:span text:style-name="T9"/></text:span></text:p>
      <text:p text:style-name="P53"><text:span text:style-name="Source_20_Text"><text:span text:style-name="T9"/></text:span></text:p>
      <text:p text:style-name="P53"><text:span text:style-name="Source_20_Text"><text:span text:style-name="T9"/></text:span></text:p>
      <text:p text:style-name="P53"><text:span text:style-name="Source_20_Text"><text:span text:style-name="T9"/></text:span></text:p>
      <text:p text:style-name="P54"><text:soft-page-break/><text:span text:style-name="Source_20_Text"><text:span text:style-name="T19">If you're on a brand new PC, there are a few extra steps because you'll need to move the backup files over first and make sure your system has the right tools to read them.</text:span></text:span></text:p>
      <text:h text:style-name="P55" text:outline-level="2">1. Transfer the Files</text:h>
      <text:p text:style-name="P56"><text:span text:style-name="T20">First, get your </text:span><text:span text:style-name="Source_20_Text"><text:span text:style-name="T20">backups</text:span></text:span><text:span text:style-name="T20"> folder onto the new PC (using a USB drive, cloud storage, or SFTP). Place the folder in your new home directory so the path is still </text:span><text:span text:style-name="Source_20_Text"><text:span text:style-name="T20">~/backups/</text:span></text:span><text:span text:style-name="T20">.</text:span></text:p>
      <text:h text:style-name="P55" text:outline-level="2">2. Install Required Tools</text:h>
      <text:p text:style-name="P56"><text:span text:style-name="T20">Most Linux systems have </text:span><text:span text:style-name="Source_20_Text"><text:span text:style-name="T20">tar</text:span></text:span><text:span text:style-name="T20"> and </text:span><text:span text:style-name="Source_20_Text"><text:span text:style-name="T20">dconf</text:span></text:span><text:span text:style-name="T20"> installed by default, but you should double-check.</text:span></text:p>
      <text:list text:style-name="L12">
        <text:list-item>
          <text:p text:style-name="P57"><text:span text:style-name="T21">For the popup notification tool:</text:span><text:span text:style-name="T22"><text:line-break/></text:span><text:span text:style-name="Source_20_Text"><text:span text:style-name="T22">sudo apt install libnotify-bin</text:span></text:span><text:span text:style-name="T22"> (on Ubuntu/Debian)</text:span></text:p>
        </text:list-item>
        <text:list-item>
          <text:p text:style-name="P58"><text:span text:style-name="T21">For the settings engine:</text:span><text:span text:style-name="T22"><text:line-break/></text:span><text:span text:style-name="Source_20_Text"><text:span text:style-name="T22">sudo apt install dconf-cli</text:span></text:span></text:p>
        </text:list-item>
      </text:list>
      <text:h text:style-name="P55" text:outline-level="2">3. The "New PC" Restore Commands</text:h>
      <text:p text:style-name="P59">Open your terminal on the new machine and run these one by one:</text:p>
      <text:p text:style-name="P60">Step A: Unpack Appearance Files</text:p>
      <text:p text:style-name="P61"><text:span text:style-name="Source_20_Text"><text:span text:style-name="T13">tar -xzf ~/backups/monthly_appearance.tar.gz -C "$HOME"</text:span></text:span></text:p>
      <text:p text:style-name="P62"><text:span text:style-name="T21">What this does:</text:span><text:span text:style-name="T20"> Even if the </text:span><text:span text:style-name="Source_20_Text"><text:span text:style-name="T20">.themes</text:span></text:span><text:span text:style-name="T20"> or </text:span><text:span text:style-name="Source_20_Text"><text:span text:style-name="T20">.icons</text:span></text:span><text:span text:style-name="T20"> folders don't exist yet, </text:span><text:span text:style-name="Source_20_Text"><text:span text:style-name="T20">tar</text:span></text:span><text:span text:style-name="T20"> will automatically create them and put your files inside.</text:span></text:p>
      <text:p text:style-name="P60"/>
      <text:p text:style-name="P60"><text:soft-page-break/>Step B: Import the Settings</text:p>
      <text:p text:style-name="P61"><text:span text:style-name="Source_20_Text"><text:span text:style-name="T13">dconf load / &lt; ~/backups/monthly_settings_backup.ini</text:span></text:span></text:p>
      <text:p text:style-name="P63"><text:span text:style-name="T4">What this does:</text:span> This forces the new system to instantly adopt your old wallpaper path, font sizes, and window button layouts.</text:p>
      <text:p text:style-name="P64"/>
      <text:h text:style-name="P65" text:outline-level="2">Important Troubleshooting for a New PC</text:h>
      <text:list text:style-name="L13">
        <text:list-item>
          <text:p text:style-name="P66"><text:span text:style-name="T23">Wallpaper Path:</text:span><text:span text:style-name="T16"> If your username is different on the new PC (e.g., </text:span><text:span text:style-name="Source_20_Text"><text:span text:style-name="T16">AT-ST</text:span></text:span><text:span text:style-name="T16"> vs </text:span><text:span text:style-name="Source_20_Text"><text:span text:style-name="T16">User2</text:span></text:span><text:span text:style-name="T16">), your wallpaper might not show up because the </text:span><text:a xlink:type="simple" xlink:href="https://man7.org/linux/man-pages/man1/chmod.1.html" text:style-name="Internet_20_link" text:visited-style-name="Visited_20_Internet_20_Link"><text:span text:style-name="T16">saved path</text:span></text:a><text:span text:style-name="T16"> in the </text:span><text:span text:style-name="Source_20_Text"><text:span text:style-name="T16">.ini</text:span></text:span><text:span text:style-name="T16"> file is looking for </text:span><text:span text:style-name="Source_20_Text"><text:span text:style-name="T16">/home/AT-ST/</text:span></text:span><text:span text:style-name="T16">. You'll just need to re-select the wallpaper once manually.</text:span></text:p>
        </text:list-item>
        <text:list-item>
          <text:p text:style-name="P67"><text:span text:style-name="T23">Permissions:</text:span><text:span text:style-name="T16"> Remember to </text:span><text:a xlink:type="simple" xlink:href="https://crontab.guru/" text:style-name="Internet_20_link" text:visited-style-name="Visited_20_Internet_20_Link"><text:span text:style-name="T16">set up the cron job</text:span></text:a><text:span text:style-name="T16"> and give your script </text:span><text:span text:style-name="Source_20_Text"><text:span text:style-name="T16">chmod +x</text:span></text:span><text:span text:style-name="T16"> permissions on the new machine if you want the automation to continue there!</text:span></text:p>
        </text:list-item>
      </text:list>
      <text:p text:style-name="P68"/>
      <text:p text:style-name="P64"/>
      <text:p text:style-name="P68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53"><text:span text:style-name="Source_20_Text"><text:span text:style-name="T9"/></text:span></text:p>
      <text:p text:style-name="P70"/>
      <text:p text:style-name="P71"/>
      <text:p text:style-name="P71"/>
      <text:p text:style-name="P29"/>
      <text:p text:style-name="P72"/>
      <text:p text:style-name="P28"/>
      <text:p text:style-name="P70"/>
      <text:p text:style-name="P28"/>
      <text:p text:style-name="P28"/>
      <text:p text:style-name="P29"/>
      <text:p text:style-name="P72"/>
      <text:p text:style-name="P70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3:30:26.599625666</meta:creation-date>
    <meta:generator>LibreOffice/25.2.3.2$Linux_X86_64 LibreOffice_project/520$Build-2</meta:generator>
    <dc:date>2026-05-06T14:24:00.926745455</dc:date>
    <meta:editing-duration>PT8M57S</meta:editing-duration>
    <meta:editing-cycles>1</meta:editing-cycles>
    <meta:document-statistic meta:table-count="1" meta:image-count="0" meta:object-count="0" meta:page-count="11" meta:paragraph-count="113" meta:word-count="1468" meta:character-count="8321" meta:non-whitespace-character-count="6999"/>
  </office:meta>
</office:document-meta>
</file>