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  <style:text-properties fo:font-size="15pt" fo:font-weight="bold"/>
    </style:style>
    <style:style style:name="P2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size="20pt" fo:font-weight="bold" style:font-size-asian="20pt" style:font-size-complex="20pt"/>
    </style:style>
    <style:style style:name="P3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6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7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P8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bold" officeooo:paragraph-rsid="001d572d"/>
    </style:style>
    <style:style style:name="P9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  <style:text-properties officeooo:paragraph-rsid="001d572d"/>
    </style:style>
    <style:style style:name="P10" style:family="paragraph" style:parent-style-name="Heading_20_2">
      <style:paragraph-properties fo:margin-left="0in" fo:margin-right="0in" fo:text-indent="0in" style:auto-text-indent="false"/>
      <style:text-properties fo:font-size="12pt" fo:font-weight="bold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2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4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6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17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18" style:family="paragraph" style:parent-style-name="Text_20_body">
      <style:paragraph-properties fo:margin-top="0in" fo:margin-bottom="0in" style:contextual-spacing="false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2" style:family="text">
      <style:text-properties fo:font-weight="bold"/>
    </style:style>
    <style:style style:name="T3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4" style:family="text">
      <style:text-properties fo:font-weight="normal"/>
    </style:style>
    <style:style style:name="T5" style:family="text">
      <style:text-properties fo:font-weight="normal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fo:background-color="#f4f6f7" loext:char-shading-value="0" style:font-size-asian="15pt" style:font-weight-asian="bold" style:font-size-complex="15pt" style:font-weight-complex="bold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8" style:family="text">
      <style:text-properties fo:font-weight="normal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p text:style-name="P2">Scheduled Automation Using Cron - Part 1<text:note text:id="ftn0" text:note-class="footnote"><text:note-citation>1</text:note-citation><text:note-body><text:p text:style-name="Footnote"/></text:note-body></text:note></text:p>
      <text:p text:style-name="P3"><text:span text:style-name="Source_20_Text"><text:span text:style-name="T1">cron</text:span></text:span></text:p>
      <text:list text:style-name="L1">
        <text:list-item>
          <text:p text:style-name="P4"><text:span text:style-name="T2">What it is:</text:span> A <text:a xlink:type="simple" xlink:href="https://en.wikipedia.org/wiki/Cron" text:style-name="Internet_20_link" text:visited-style-name="Visited_20_Internet_20_Link">background service</text:a> (daemon) that runs automatically on Linux. It constantly checks the time and runs tasks you’ve scheduled. Think of it as your computer’s "alarm clock" for scripts.</text:p>
        </text:list-item>
      </text:list>
      <text:p text:style-name="Horizontal_20_Line"/>
      <text:p text:style-name="P3"><text:span text:style-name="Source_20_Text"><text:span text:style-name="T1">crontab -e</text:span></text:span></text:p>
      <text:list text:style-name="L2">
        <text:list-item>
          <text:p text:style-name="P5"><text:span text:style-name="Source_20_Text"><text:span text:style-name="T1">crontab</text:span></text:span>: Short for "<text:a xlink:type="simple" xlink:href="https://man7.org/linux/man-pages/man1/chmod.1.html" text:style-name="Internet_20_link" text:visited-style-name="Visited_20_Internet_20_Link">cron table</text:a>." This is the list where your scheduled jobs are kept.</text:p>
        </text:list-item>
        <text:list-item>
          <text:p text:style-name="P6"><text:span text:style-name="Source_20_Text"><text:span text:style-name="T1">-e</text:span></text:span>: Stands for <text:span text:style-name="T2">Edit</text:span>. This command opens your personal schedule file in a text editor (like <text:span text:style-name="Source_20_Text"><text:span text:style-name="T3">nano</text:span></text:span>).</text:p>
        </text:list-item>
      </text:list>
      <text:p text:style-name="P3"><text:span text:style-name="T2">Summary:</text:span><text:span text:style-name="T4"> This command allows you to add, change, or remove scheduled tasks. Every user has their own </text:span><text:span text:style-name="Source_20_Text"><text:span text:style-name="T5">crontab</text:span></text:span><text:span text:style-name="T4">, so you are only editing your personal list of automated jobs.</text:span></text:p>
      <text:p text:style-name="P3"><text:span text:style-name="T2">Note:</text:span><text:span text:style-name="T4"> The first time you run this, it might ask you to choose a text editor. (Choosing </text:span><text:span text:style-name="Source_20_Text"><text:span text:style-name="T5">nano</text:span></text:span><text:span text:style-name="T4"> is usually the easiest!).</text:span></text:p>
      <text:p text:style-name="P7"/>
      <text:h text:style-name="P1" text:outline-level="2"/>
      <text:p text:style-name="P8"/>
      <text:p text:style-name="P8"/>
      <text:p text:style-name="P8"/>
      <text:p text:style-name="P8"/>
      <text:p text:style-name="P8"><text:soft-page-break/></text:p>
      <text:p text:style-name="P9"><text:span text:style-name="T6">When you run </text:span><text:span text:style-name="Source_20_Text"><text:span text:style-name="T7">crontab -e</text:span></text:span><text:span text:style-name="T6">, you see a template layout. Here is how you read and write those automated schedules:</text:span></text:p>
      <text:p text:style-name="Horizontal_20_Line"/>
      <text:h text:style-name="P10" text:outline-level="2">The 5-Star Timing System</text:h>
      <text:p text:style-name="P3"><text:span text:style-name="T4">The line </text:span><text:span text:style-name="Source_20_Text"><text:span text:style-name="T5"># m h dom mon dow command</text:span></text:span><text:span text:style-name="T4"> is a map for the five stars (</text:span><text:span text:style-name="Source_20_Text"><text:span text:style-name="T5">* * * * *</text:span></text:span><text:span text:style-name="T4">). Each star represents a specific time unit:</text:span></text:p>
      <text:list text:style-name="L3">
        <text:list-item>
          <text:p text:style-name="P11"><text:span text:style-name="Source_20_Text"><text:span text:style-name="T1">m</text:span></text:span><text:span text:style-name="T2"> (Minute):</text:span> 0 - 59</text:p>
        </text:list-item>
        <text:list-item>
          <text:p text:style-name="P11"><text:span text:style-name="Source_20_Text"><text:span text:style-name="T1">h</text:span></text:span><text:span text:style-name="T2"> (Hour):</text:span> 0 - 23 (Military time)</text:p>
        </text:list-item>
        <text:list-item>
          <text:p text:style-name="P11"><text:span text:style-name="Source_20_Text"><text:span text:style-name="T1">dom</text:span></text:span><text:span text:style-name="T2"> (Day of Month):</text:span> 1 - 31</text:p>
        </text:list-item>
        <text:list-item>
          <text:p text:style-name="P11"><text:span text:style-name="Source_20_Text"><text:span text:style-name="T1">mon</text:span></text:span><text:span text:style-name="T2"> (Month):</text:span> 1 - 12 (or names like JAN, FEB)</text:p>
        </text:list-item>
        <text:list-item>
          <text:p text:style-name="P12"><text:span text:style-name="Source_20_Text"><text:span text:style-name="T1">dow</text:span></text:span><text:span text:style-name="T2"> (Day of Week):</text:span> 0 - 6 (0 is Sunday) or names like SUN, MON</text:p>
        </text:list-item>
      </text:list>
      <text:p text:style-name="Horizontal_20_Line"/>
      <text:h text:style-name="P10" text:outline-level="2">Breaking Down Your Commands</text:h>
      <text:p text:style-name="P3"><text:span text:style-name="T2">1. The "Every Minute" Command</text:span><text:span text:style-name="T4"><text:line-break/></text:span><text:span text:style-name="Source_20_Text"><text:span text:style-name="T5">* * * * * echo "Hello world" &gt;&gt; ~/Desktop/hello.txt</text:span></text:span></text:p>
      <text:list text:style-name="L4">
        <text:list-item>
          <text:p text:style-name="P13"><text:span text:style-name="Source_20_Text"><text:span text:style-name="T1">* * * * *</text:span></text:span>: Five wildcards mean "every." This runs every single minute, of every hour, of every day.</text:p>
        </text:list-item>
        <text:list-item>
          <text:p text:style-name="P13"><text:span text:style-name="Source_20_Text"><text:span text:style-name="T1">echo "Hello world"</text:span></text:span>: The command to print that text.</text:p>
        </text:list-item>
        <text:list-item>
          <text:p text:style-name="P13"><text:span text:style-name="Source_20_Text"><text:span text:style-name="T1">&gt;&gt;</text:span></text:span>: The <text:a xlink:type="simple" xlink:href="https://www.gnu.org/software/bash/manual/html_node/Redirections.html" text:style-name="Internet_20_link" text:visited-style-name="Visited_20_Internet_20_Link">Append Redirection</text:a>. Instead of overwriting the file, it adds the new text to the bottom.</text:p>
        </text:list-item>
        <text:list-item>
          <text:p text:style-name="P14"><text:span text:style-name="Source_20_Text"><text:span text:style-name="T1">~/Desktop/hello.txt</text:span></text:span>: The path to the file where the message is saved.</text:p>
        </text:list-item>
      </text:list>
      <text:p text:style-name="P3"><text:span text:style-name="T2">2. The "Specific Date" Command</text:span><text:span text:style-name="T4"><text:line-break/></text:span><text:span text:style-name="Source_20_Text"><text:span text:style-name="T5">20 11 27 5 SUN echo "Hello world" &gt;&gt; ~/Desktop/hello.txt</text:span></text:span></text:p>
      <text:list text:style-name="L5">
        <text:list-item>
          <text:p text:style-name="P15"><text:span text:style-name="Source_20_Text"><text:span text:style-name="T1">20</text:span></text:span>: At the 20th minute...</text:p>
        </text:list-item>
        <text:list-item>
          <text:p text:style-name="P15"><text:span text:style-name="Source_20_Text"><text:span text:style-name="T1">11</text:span></text:span>: ...of the 11th hour (11:20 AM)...</text:p>
        </text:list-item>
        <text:list-item>
          <text:p text:style-name="P15"><text:span text:style-name="Source_20_Text"><text:span text:style-name="T1">27</text:span></text:span>: ...on the 27th day of the month...</text:p>
        </text:list-item>
        <text:list-item>
          <text:p text:style-name="P15"><text:span text:style-name="Source_20_Text"><text:span text:style-name="T1">5</text:span></text:span>: ...in the 5th month (May)...</text:p>
        </text:list-item>
        <text:list-item>
          <text:p text:style-name="P16"><text:span text:style-name="Source_20_Text"><text:span text:style-name="T1">SUN</text:span></text:span>: ...but only if that day is a Sunday.</text:p>
        </text:list-item>
      </text:list>
      <text:p text:style-name="P7"><text:soft-page-break/><text:span text:style-name="T2">Note:</text:span><text:span text:style-name="T4"> If you use names like </text:span><text:span text:style-name="T2">MAY</text:span><text:span text:style-name="T4"> or </text:span><text:span text:style-name="T2">SUN</text:span><text:span text:style-name="T4">, make sure your </text:span><text:a xlink:type="simple" xlink:href="https://crontab.guru/" text:style-name="Internet_20_link" text:visited-style-name="Visited_20_Internet_20_Link"><text:span text:style-name="T8">cron version</text:span></text:a><text:span text:style-name="T4"> supports them (most modern Linux systems do!).</text:span></text:p>
      <text:p text:style-name="P17"/>
      <text:p text:style-name="P17"/>
      <text:p text:style-name="P18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3:00:20.195894326</meta:creation-date>
    <dc:date>2026-05-06T13:21:16.635273576</dc:date>
    <meta:editing-duration>PT21M2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3" meta:paragraph-count="29" meta:word-count="385" meta:character-count="1971" meta:non-whitespace-character-count="1632"/>
  </office:meta>
</office:document-meta>
</file>