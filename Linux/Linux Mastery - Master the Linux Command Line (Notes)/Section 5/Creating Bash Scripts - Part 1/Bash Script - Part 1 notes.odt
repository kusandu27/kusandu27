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  <style:text-properties fo:font-weight="bold"/>
    </style:style>
    <style:style style:name="P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4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6" style:family="paragraph" style:parent-style-name="Heading_20_2">
      <style:paragraph-properties fo:margin-top="0in" fo:margin-bottom="0in" style:contextual-spacing="false"/>
      <style:text-properties fo:font-size="15pt" fo:font-weight="bold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8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0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11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12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3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size="15pt"/>
    </style:style>
    <style:style style:name="T2" style:family="text">
      <style:text-properties fo:font-size="15pt" officeooo:rsid="000dc87b"/>
    </style:style>
    <style:style style:name="T3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4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tyle="italic" fo:font-weight="normal"/>
    </style:style>
    <style:style style:name="T8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Bash Script</text:span><text:span text:style-name="T2">s - Part 1</text:span></text:h>
      <text:p text:style-name="P2"><text:span text:style-name="Source_20_Text"><text:span text:style-name="T3">nano our_script.sh</text:span></text:span></text:p>
      <text:list text:style-name="L1">
        <text:list-item>
          <text:p text:style-name="P3"><text:span text:style-name="Source_20_Text"><text:span text:style-name="T3">nano</text:span></text:span>: This is the name of the <text:a xlink:type="simple" xlink:href="https://www.nano-editor.org/" text:style-name="Internet_20_link" text:visited-style-name="Visited_20_Internet_20_Link">text editor</text:a> program itself. It’s like opening "Notepad" but inside the terminal.</text:p>
        </text:list-item>
        <text:list-item>
          <text:p text:style-name="P3"><text:span text:style-name="Source_20_Text"><text:span text:style-name="T3">our_script.sh</text:span></text:span>: This is the name of the file you are telling <text:span text:style-name="Source_20_Text"><text:span text:style-name="T4">nano</text:span></text:span> to open.</text:p>
          <text:list>
            <text:list-item>
              <text:p text:style-name="P3"><text:span text:style-name="Source_20_Text"><text:span text:style-name="T3">our_script</text:span></text:span>: The filename you chose.</text:p>
            </text:list-item>
            <text:list-item>
              <text:p text:style-name="P4"><text:span text:style-name="Source_20_Text"><text:span text:style-name="T3">.sh</text:span></text:span>: The file extension that tells the system (and you) that this is a <text:span text:style-name="T5">Shell Script</text:span>.</text:p>
            </text:list-item>
          </text:list>
        </text:list-item>
      </text:list>
      <text:p text:style-name="P5"/>
      <text:h text:style-name="P6" text:outline-level="2"/>
      <text:p text:style-name="P2"><text:span text:style-name="Source_20_Text"><text:span text:style-name="T3">#!</text:span></text:span><text:span text:style-name="T6"> (The Shebang)</text:span></text:p>
      <text:list text:style-name="L2">
        <text:list-item>
          <text:p text:style-name="P7"><text:span text:style-name="Source_20_Text"><text:span text:style-name="T3">#</text:span></text:span> (Hash): In a script, this symbol usually starts a <text:span text:style-name="T5">comment</text:span> (text the computer ignores), but when followed immediately by an <text:span text:style-name="Source_20_Text"><text:span text:style-name="T4">!</text:span></text:span>, it serves a special purpose.</text:p>
        </text:list-item>
        <text:list-item>
          <text:p text:style-name="P7"><text:span text:style-name="Source_20_Text"><text:span text:style-name="T3">!</text:span></text:span> (Bang): This tells the system that this line is a special instruction rather than just a comment.</text:p>
        </text:list-item>
        <text:list-item>
          <text:p text:style-name="P8"><text:span text:style-name="T5">The Shebang (</text:span><text:span text:style-name="Source_20_Text"><text:span text:style-name="T3">#!</text:span></text:span><text:span text:style-name="T5">):</text:span> When placed at the very start of the first line, it acts as an <text:a xlink:type="simple" xlink:href="https://en.wikipedia.org/wiki/Shebang_%28Unix%29" text:style-name="Internet_20_link" text:visited-style-name="Visited_20_Internet_20_Link">interpreter directive</text:a>. It tells the computer which program to use to run the code written in the rest of the file.</text:p>
        </text:list-item>
      </text:list>
      <text:p text:style-name="P2"><text:span text:style-name="T6"/></text:p>
      <text:p text:style-name="P2"><text:span text:style-name="Source_20_Text"><text:span text:style-name="T3">#! /bin/bash</text:span></text:span></text:p>
      <text:list text:style-name="L3">
        <text:list-item>
          <text:p text:style-name="P9"><text:span text:style-name="Source_20_Text"><text:span text:style-name="T3">#!</text:span></text:span>: As we noted, this is the <text:a xlink:type="simple" xlink:href="https://linuxhandbook.com/shebang/" text:style-name="Internet_20_link" text:visited-style-name="Visited_20_Internet_20_Link">shebang</text:a>, signaling the start of the script's instructions.</text:p>
        </text:list-item>
        <text:list-item>
          <text:p text:style-name="P9"><text:span text:style-name="Source_20_Text"><text:span text:style-name="T3">/</text:span></text:span>: Represents the <text:span text:style-name="T5">root directory</text:span>, the very top level of your Linux file system.</text:p>
        </text:list-item>
        <text:list-item>
          <text:p text:style-name="P9"><text:span text:style-name="Source_20_Text"><text:span text:style-name="T3">bin</text:span></text:span>: Short for "binary." This is a standard folder where the system stores essential executable programs (commands).</text:p>
        </text:list-item>
        <text:list-item>
          <text:p text:style-name="P10"><text:span text:style-name="Source_20_Text"><text:span text:style-name="T3">bash</text:span></text:span>: The specific program (the <text:a xlink:type="simple" xlink:href="https://www.gnu.org/software/bash/" text:style-name="Internet_20_link" text:visited-style-name="Visited_20_Internet_20_Link">Bourne Again Shell</text:a>) that will read and execute your script.</text:p>
        </text:list-item>
      </text:list>
      <text:p text:style-name="P11"><text:span text:style-name="T5">Summary:</text:span><text:span text:style-name="T6"> This whole line tells your computer: </text:span><text:span text:style-name="Emphasis"><text:span text:style-name="T7">"Hey, use the </text:span></text:span><text:span text:style-name="Emphasis"><text:span text:style-name="T8">Bash</text:span></text:span><text:span text:style-name="Emphasis"><text:span text:style-name="T7"> program found in the </text:span></text:span><text:span text:style-name="Emphasis"><text:span text:style-name="T8">bin</text:span></text:span><text:span text:style-name="Emphasis"><text:span text:style-name="T7"> folder to run everything in this file."</text:span></text:span></text:p>
      <text:p text:style-name="P5"/>
      <text:h text:style-name="P6" text:outline-level="2"><text:soft-page-break/></text:h>
      <text:p text:style-name="P2"><text:span text:style-name="Source_20_Text"><text:span text:style-name="T3">#!/usr/bin/python3</text:span></text:span></text:p>
      <text:list text:style-name="L4">
        <text:list-item>
          <text:p text:style-name="P12"><text:span text:style-name="Source_20_Text"><text:span text:style-name="T3">#!</text:span></text:span>: The <text:a xlink:type="simple" xlink:href="https://linuxhandbook.com/shebang/" text:style-name="Internet_20_link" text:visited-style-name="Visited_20_Internet_20_Link">shebang</text:a> that tells the system how to execute the file.</text:p>
        </text:list-item>
        <text:list-item>
          <text:p text:style-name="P12"><text:span text:style-name="Source_20_Text"><text:span text:style-name="T3">/usr/bin/</text:span></text:span>: This is the <text:a xlink:type="simple" xlink:href="https://refspecs.linuxfoundation.org/FHS_3.0/fhs/ch04s04.html" text:style-name="Internet_20_link" text:visited-style-name="Visited_20_Internet_20_Link">standard path</text:a> where most user-installed executable programs are located.</text:p>
        </text:list-item>
        <text:list-item>
          <text:p text:style-name="P13"><text:span text:style-name="Source_20_Text"><text:span text:style-name="T3">python3</text:span></text:span>: The specific <text:a xlink:type="simple" xlink:href="https://docs.python.org/3/tutorial/interpreter.html" text:style-name="Internet_20_link" text:visited-style-name="Visited_20_Internet_20_Link">Python interpreter</text:a> that will read and run the code.</text:p>
        </text:list-item>
      </text:list>
      <text:p text:style-name="P11"><text:span text:style-name="T5">Summary:</text:span><text:span text:style-name="T6"> This line tells the computer to switch from a standard Bash script to a </text:span><text:span text:style-name="T5">Python script</text:span><text:span text:style-name="T6">. It says: </text:span><text:span text:style-name="Emphasis"><text:span text:style-name="T7">"Use the </text:span></text:span><text:span text:style-name="Emphasis"><text:span text:style-name="T8">Python 3</text:span></text:span><text:span text:style-name="Emphasis"><text:span text:style-name="T7"> program located in the </text:span></text:span><text:span text:style-name="Emphasis"><text:span text:style-name="T8">usr/bin</text:span></text:span><text:span text:style-name="Emphasis"><text:span text:style-name="T7"> folder to run this file instead of Bash."</text:span></text:span></text:p>
      <text:p text:style-name="P11"/>
      <text:p text:style-name="P14"/>
      <text:p text:style-name="P14"/>
      <text:p text:style-name="P1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1:08:39.765313891</meta:creation-date>
    <dc:date>2026-05-06T11:37:22.734433680</dc:date>
    <meta:editing-duration>PT9M44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21" meta:word-count="321" meta:character-count="1778" meta:non-whitespace-character-count="1492"/>
  </office:meta>
</office:document-meta>
</file>