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116in" table:align="left"/>
    </style:style>
    <style:style style:name="Table1.A" style:family="table-column">
      <style:table-column-properties style:column-width="1.9868in"/>
    </style:style>
    <style:style style:name="Table1.B" style:family="table-column">
      <style:table-column-properties style:column-width="1.591in"/>
    </style:style>
    <style:style style:name="Table1.C" style:family="table-column">
      <style:table-column-properties style:column-width="1.5382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Heading_20_2">
      <style:paragraph-properties fo:text-align="start" style:justify-single-word="false"/>
      <style:text-properties fo:font-size="15pt" fo:font-weight="bold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6" style:family="paragraph" style:parent-style-name="Heading_20_2">
      <style:paragraph-properties fo:margin-left="0.1665in" fo:margin-right="0.1665in" fo:margin-top="0.1665in" fo:margin-bottom="0.1665in" style:contextual-spacing="false" fo:text-indent="0in" style:auto-text-indent="false"/>
      <style:text-properties fo:font-size="15pt" fo:font-weight="bold"/>
    </style:style>
    <style:style style:name="P7" style:family="paragraph" style:parent-style-name="Text_20_body" style:list-style-name="L2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8" style:family="paragraph" style:parent-style-name="Text_20_body" style:list-style-name="L2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9" style:family="paragraph" style:parent-style-name="Text_20_body">
      <style:paragraph-properties fo:margin-top="0.1665in" fo:margin-bottom="0in" style:contextual-spacing="false"/>
    </style:style>
    <style:style style:name="P10" style:family="paragraph" style:parent-style-name="Text_20_body">
      <style:paragraph-properties fo:margin-top="0.1665in" fo:margin-bottom="0in" style:contextual-spacing="false"/>
      <style:text-properties fo:font-weight="normal"/>
    </style:style>
    <style:style style:name="P11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2" style:family="paragraph" style:parent-style-name="Horizontal_20_Line">
      <style:paragraph-properties fo:margin-top="0in" fo:margin-bottom="0in" style:contextual-spacing="false" fo:line-height="115%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P1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7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2pt" fo:font-weight="bold"/>
    </style:style>
    <style:style style:name="P18" style:family="paragraph" style:parent-style-name="Text_20_body" style:list-style-name="L5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19" style:family="paragraph" style:parent-style-name="Text_20_body" style:list-style-name="L5">
      <style:paragraph-properties fo:margin-left="0in" fo:margin-right="0in" fo:margin-top="0.1665in" fo:margin-bottom="0in" style:contextual-spacing="false" fo:text-indent="0in" style:auto-text-indent="false"/>
    </style:style>
    <style:style style:name="P20" style:family="paragraph" style:parent-style-name="Text_20_body" style:list-style-name="L5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1" style:family="paragraph" style:parent-style-name="Text_20_body" style:list-style-name="L6">
      <style:paragraph-properties fo:margin-left="0in" fo:margin-right="0in" fo:margin-top="0.1665in" fo:margin-bottom="0in" style:contextual-spacing="false" fo:text-indent="0in" style:auto-text-indent="false"/>
    </style:style>
    <style:style style:name="P22" style:family="paragraph" style:parent-style-name="Text_20_body" style:list-style-name="L6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3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Standard">
      <style:paragraph-properties fo:text-align="start" style:justify-single-word="false"/>
    </style:style>
    <style:style style:name="T1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2" style:family="text">
      <style:text-properties fo:font-weight="bold"/>
    </style:style>
    <style:style style:name="T3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weight="normal"/>
    </style:style>
    <style:style style:name="T5" style:family="text">
      <style:text-properties fo:font-style="italic" fo:font-weight="normal"/>
    </style:style>
    <style:style style:name="T6" style:family="text">
      <style:text-properties fo:font-style="italic" fo:font-weight="bold"/>
    </style:style>
    <style:style style:name="T7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ash Script</text:h>
      <text:p text:style-name="P2"><text:span text:style-name="Source_20_Text"><text:span text:style-name="T1">2&gt;/dev/null</text:span></text:span></text:p>
      <text:list text:style-name="L1">
        <text:list-item>
          <text:p text:style-name="P3"><text:span text:style-name="Source_20_Text"><text:span text:style-name="T1">2</text:span></text:span>: Represents <text:span text:style-name="T2">Standard Error (stderr)</text:span>. In Linux, every command has three "streams": <text:span text:style-name="Source_20_Text"><text:span text:style-name="T3">0</text:span></text:span> (input), <text:span text:style-name="Source_20_Text"><text:span text:style-name="T3">1</text:span></text:span> (output), and <text:span text:style-name="Source_20_Text"><text:span text:style-name="T3">2</text:span></text:span> (errors).</text:p>
        </text:list-item>
        <text:list-item>
          <text:p text:style-name="P3"><text:span text:style-name="Source_20_Text"><text:span text:style-name="T1">&gt;</text:span></text:span>: The <text:a xlink:type="simple" xlink:href="https://www.gnu.org/software/bash/manual/html_node/Redirections.html" text:style-name="Internet_20_link" text:visited-style-name="Visited_20_Internet_20_Link">redirection symbol</text:a>. It takes the data from the left and sends it to the destination on the right.</text:p>
        </text:list-item>
        <text:list-item>
          <text:p text:style-name="P4"><text:span text:style-name="Source_20_Text"><text:span text:style-name="T1">/dev/null</text:span></text:span>: Known as the "black hole" of the Linux system. Anything you send here disappears forever.</text:p>
        </text:list-item>
      </text:list>
      <text:p text:style-name="P5"><text:span text:style-name="T2">Summary:</text:span><text:span text:style-name="T4"> This instruction tells the script: </text:span><text:span text:style-name="Emphasis"><text:span text:style-name="T5">"If this command creates an </text:span></text:span><text:span text:style-name="Emphasis"><text:span text:style-name="T6">error message</text:span></text:span><text:span text:style-name="Emphasis"><text:span text:style-name="T5">, don't show it on my screen—just throw it away."</text:span></text:span><text:span text:style-name="T4"> It is perfect for keeping your script's output clean and "quiet."</text:span></text:p>
      <text:h text:style-name="P6" text:outline-level="2"/>
      <text:p text:style-name="P2"><text:span text:style-name="Source_20_Text"><text:span text:style-name="T1">chmod +x backup.sh</text:span></text:span></text:p>
      <text:list text:style-name="L2">
        <text:list-item>
          <text:p text:style-name="P7"><text:span text:style-name="Source_20_Text"><text:span text:style-name="T1">chmod</text:span></text:span>: Short for "<text:a xlink:type="simple" xlink:href="https://man7.org/linux/man-pages/man1/chmod.1.html" text:style-name="Internet_20_link" text:visited-style-name="Visited_20_Internet_20_Link">change mode</text:a>." It is the command used to change the permissions (rules) of a file.</text:p>
        </text:list-item>
        <text:list-item>
          <text:p text:style-name="P7"><text:span text:style-name="Source_20_Text"><text:span text:style-name="T1">+</text:span></text:span>: This means you are <text:span text:style-name="T2">adding</text:span> a permission (rather than removing one).</text:p>
        </text:list-item>
        <text:list-item>
          <text:p text:style-name="P7"><text:span text:style-name="Source_20_Text"><text:span text:style-name="T1">x</text:span></text:span>: Stands for <text:span text:style-name="T2">eXecutable</text:span>. It gives the system permission to run the file as a program.</text:p>
        </text:list-item>
        <text:list-item>
          <text:p text:style-name="P8"><text:span text:style-name="Source_20_Text"><text:span text:style-name="T1">backup.sh</text:span></text:span>: The name of the specific file you are giving these permissions to. [1, 2, 3, 4, 5] </text:p>
        </text:list-item>
      </text:list>
      <text:p text:style-name="P2"><text:span text:style-name="T2">Summary:</text:span><text:span text:style-name="T4"> By default, new files are just text. This command turns </text:span><text:span text:style-name="Source_20_Text"><text:span text:style-name="T7">backup.sh</text:span></text:span><text:span text:style-name="T4"> into a "runnable" program so you can start it by simply typing </text:span><text:span text:style-name="Source_20_Text"><text:span text:style-name="T7">./backup.sh</text:span></text:span><text:span text:style-name="T4">. [6, 7, 8] </text:span></text:p>
      <text:p text:style-name="P5"/>
      <text:p text:style-name="P9"/>
      <text:p text:style-name="P10"><text:a xlink:type="simple" xlink:href="https://rocketee.rs/backup-mysql-databases-except-system#:~:text=%23%20How%20to%20use%20You%20can%20use,permissions.%20Execute%20the%20script%20with%20./backup.sh%20." text:style-name="Internet_20_link" text:visited-style-name="Visited_20_Internet_20_Link"/></text:p>
      <text:p text:style-name="P10"><text:soft-page-break/></text:p>
      <text:p text:style-name="P2"><text:span text:style-name="Source_20_Text"><text:span text:style-name="T1">nano .bashrc</text:span></text:span></text:p>
      <text:list text:style-name="L3">
        <text:list-item>
          <text:p text:style-name="P11"><text:span text:style-name="Source_20_Text"><text:span text:style-name="T1">.bashrc</text:span></text:span>: This is a hidden script file (the dot <text:span text:style-name="Source_20_Text"><text:span text:style-name="T3">.</text:span></text:span> at the start makes it hidden) located in your home folder. It runs automatically every time you open a new terminal window.</text:p>
        </text:list-item>
      </text:list>
      <text:p text:style-name="P12"/>
      <text:p text:style-name="P2"><text:span text:style-name="Source_20_Text"><text:span text:style-name="T1">PATH="$PATH:$HOME/bin"</text:span></text:span></text:p>
      <text:list text:style-name="L4">
        <text:list-item>
          <text:p text:style-name="P13"><text:span text:style-name="Source_20_Text"><text:span text:style-name="T1">PATH=</text:span></text:span>: This variable tells Linux which folders to search through when you type a command.</text:p>
        </text:list-item>
        <text:list-item>
          <text:p text:style-name="P13"><text:span text:style-name="Source_20_Text"><text:span text:style-name="T1">$PATH</text:span></text:span>: This refers to the <text:span text:style-name="T2">current list</text:span> of folders already in your Path. By including it, you ensure you don't delete the existing system commands (like <text:span text:style-name="Source_20_Text"><text:span text:style-name="T3">ls</text:span></text:span> or <text:span text:style-name="Source_20_Text"><text:span text:style-name="T3">cd</text:span></text:span>).</text:p>
        </text:list-item>
        <text:list-item>
          <text:p text:style-name="P13"><text:span text:style-name="Source_20_Text"><text:span text:style-name="T1">:</text:span></text:span>: A separator used to divide different folder paths in the list.</text:p>
        </text:list-item>
        <text:list-item>
          <text:p text:style-name="P13"><text:span text:style-name="Source_20_Text"><text:span text:style-name="T1">$HOME</text:span></text:span>: A shortcut variable that automatically points to your personal user folder (e.g., <text:span text:style-name="Source_20_Text"><text:span text:style-name="T3">/home/username</text:span></text:span>).</text:p>
        </text:list-item>
        <text:list-item>
          <text:p text:style-name="P14"><text:span text:style-name="Source_20_Text"><text:span text:style-name="T1">/bin</text:span></text:span>: A folder (usually created by you) inside your home directory where you store your custom scripts.</text:p>
        </text:list-item>
      </text:list>
      <text:p text:style-name="P2"><text:span text:style-name="T2">Summary:</text:span><text:span text:style-name="T4"> This line adds your personal </text:span><text:span text:style-name="Source_20_Text"><text:span text:style-name="T7">bin</text:span></text:span><text:span text:style-name="T4"> folder to the system's "search list." It allows you to </text:span><text:span text:style-name="T2">run your own scripts from anywhere</text:span><text:span text:style-name="T4"> in the terminal just by typing their name, without needing to be in the folder where they live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6" text:outline-level="2">Bash Script vs. Aliases</text:h>
      <text:p text:style-name="P16">While both help you save time, they are used for very different things. Think of an <text:span text:style-name="T2">Alias</text:span> as a nickname and a <text:span text:style-name="T2">Bash Script</text:span> as a mini-app.</text:p>
      <text:h text:style-name="P17" text:outline-level="2">1. Aliases</text:h>
      <text:list text:style-name="L5">
        <text:list-item>
          <text:p text:style-name="P18"><text:span text:style-name="T2">What they are:</text:span> Simple shortcuts or "text replacements" defined in your <text:span text:style-name="Source_20_Text"><text:span text:style-name="T3">.bashrc</text:span></text:span> <text:a xlink:type="simple" xlink:href="https://www.geeksforgeeks.org/linux-unix/bash-scripting-working-of-alias/" text:style-name="Internet_20_link" text:visited-style-name="Visited_20_Internet_20_Link">file</text:a>.</text:p>
        </text:list-item>
        <text:list-item>
          <text:p text:style-name="P19"><text:span text:style-name="T2">Best for:</text:span> Short, one-line commands you type constantly.</text:p>
        </text:list-item>
        <text:list-item>
          <text:p text:style-name="P19"><text:span text:style-name="T2">Limitations:</text:span> They don't <text:a xlink:type="simple" xlink:href="https://unix.stackexchange.com/questions/30925/in-bash-when-to-alias-when-to-script-and-when-to-write-a-function" text:style-name="Internet_20_link" text:visited-style-name="Visited_20_Internet_20_Link">accept arguments</text:a> (you can't pass a filename into the middle of an alias) and are usually only for <text:a xlink:type="simple" xlink:href="https://askubuntu.com/questions/163882/alias-vs-function-in-bash-scripts" text:style-name="Internet_20_link" text:visited-style-name="Visited_20_Internet_20_Link">interactive use</text:a> in the terminal.</text:p>
        </text:list-item>
        <text:list-item>
          <text:p text:style-name="P20"><text:span text:style-name="T2">Example:</text:span> <text:span text:style-name="Source_20_Text"><text:span text:style-name="T3">alias ll='ls -la'</text:span></text:span> [1, 2, 3, 4, 5] </text:p>
        </text:list-item>
      </text:list>
      <text:h text:style-name="P17" text:outline-level="2">2. Bash Scripts</text:h>
      <text:list text:style-name="L6">
        <text:list-item>
          <text:p text:style-name="P21"><text:span text:style-name="T2">What they are:</text:span> Separate files containing a sequence of commands, logic (if/then), and loops.</text:p>
        </text:list-item>
        <text:list-item>
          <text:p text:style-name="P21"><text:span text:style-name="T2">Best for:</text:span> Complex automation, multi-step tasks, and <text:a xlink:type="simple" xlink:href="https://www.tutorialspoint.com/article/when-to-use-an-alias-vs-script-vs-a-new-function-in-bash" text:style-name="Internet_20_link" text:visited-style-name="Visited_20_Internet_20_Link">sharing with others</text:a>.</text:p>
        </text:list-item>
        <text:list-item>
          <text:p text:style-name="P21"><text:span text:style-name="T2">Power:</text:span> They can <text:a xlink:type="simple" xlink:href="https://www.linux.org/threads/aliases-vs-scripts.51368/" text:style-name="Internet_20_link" text:visited-style-name="Visited_20_Internet_20_Link">process complex inputs</text:a>, run at scheduled times (cron jobs), and work for any user on the system if they have permission.</text:p>
        </text:list-item>
        <text:list-item>
          <text:p text:style-name="P22"><text:span text:style-name="T2">Example:</text:span> Our <text:span text:style-name="Source_20_Text"><text:span text:style-name="T3">backup.sh</text:span></text:span> file. [6, 7, 8, 9, 10]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Feature [11, 12, 13, 14, 15] </text:p>
          </table:table-cell>
          <table:table-cell table:style-name="Table1.A1" office:value-type="string">
            <text:p text:style-name="P23">Alias</text:p>
          </table:table-cell>
          <table:table-cell table:style-name="Table1.A1" office:value-type="string">
            <text:p text:style-name="P23">Bash Script</text:p>
          </table:table-cell>
        </table:table-row>
        <table:table-row>
          <table:table-cell table:style-name="Table1.A1" office:value-type="string">
            <text:p text:style-name="P24">Complexity</text:p>
          </table:table-cell>
          <table:table-cell table:style-name="Table1.A1" office:value-type="string">
            <text:p text:style-name="P25">Simple (one-liners)</text:p>
          </table:table-cell>
          <table:table-cell table:style-name="Table1.A1" office:value-type="string">
            <text:p text:style-name="P25">High (complex logic)</text:p>
          </table:table-cell>
        </table:table-row>
        <table:table-row>
          <table:table-cell table:style-name="Table1.A1" office:value-type="string">
            <text:p text:style-name="P24">Arguments</text:p>
          </table:table-cell>
          <table:table-cell table:style-name="Table1.A1" office:value-type="string">
            <text:p text:style-name="P25">No (mostly)</text:p>
          </table:table-cell>
          <table:table-cell table:style-name="Table1.A1" office:value-type="string">
            <text:p text:style-name="P25">Yes (fully supported)</text:p>
          </table:table-cell>
        </table:table-row>
        <table:table-row>
          <table:table-cell table:style-name="Table1.A1" office:value-type="string">
            <text:p text:style-name="P24">Storage</text:p>
          </table:table-cell>
          <table:table-cell table:style-name="Table1.A1" office:value-type="string">
            <text:p text:style-name="P26">Inside <text:span text:style-name="Source_20_Text"><text:span text:style-name="T3">.bashrc</text:span></text:span></text:p>
          </table:table-cell>
          <table:table-cell table:style-name="Table1.A1" office:value-type="string">
            <text:p text:style-name="P26">Separate <text:span text:style-name="Source_20_Text"><text:span text:style-name="T3">.sh</text:span></text:span> file</text:p>
          </table:table-cell>
        </table:table-row>
        <table:table-row>
          <table:table-cell table:style-name="Table1.A1" office:value-type="string">
            <text:p text:style-name="P24">Use Case</text:p>
          </table:table-cell>
          <table:table-cell table:style-name="Table1.A1" office:value-type="string">
            <text:p text:style-name="P25">Quick typing <text:soft-page-break/>shortcuts</text:p>
          </table:table-cell>
          <table:table-cell table:style-name="Table1.A1" office:value-type="string">
            <text:p text:style-name="P27">Reliable automation</text:p>
          </table:table-cell>
        </table:table-row>
      </table:table>
      <text:p text:style-name="P5"/>
      <text:p text:style-name="P10"/>
      <text:p text:style-name="P28"/>
      <text:p text:style-name="P28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1:42:58.707227184</meta:creation-date>
    <dc:date>2026-05-06T12:19:53.894649961</dc:date>
    <meta:editing-duration>PT26M36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4" meta:paragraph-count="48" meta:word-count="554" meta:character-count="3141" meta:non-whitespace-character-count="2652"/>
  </office:meta>
</office:document-meta>
</file>