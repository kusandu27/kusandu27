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100000300564642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in" fo:margin-right="0in" fo:margin-top="0in" fo:margin-bottom="0in" style:contextual-spacing="false" fo:text-indent="0in" style:auto-text-indent="false"/>
      <style:text-properties fo:font-weight="normal"/>
    </style:style>
    <style:style style:name="P2" style:family="paragraph" style:parent-style-name="Heading_20_2">
      <style:paragraph-properties fo:margin-left="0in" fo:margin-right="0in" fo:margin-top="0in" fo:margin-bottom="0.1965in" style:contextual-spacing="false" fo:line-height="115%" fo:text-indent="0in" style:auto-text-indent="false"/>
      <style:text-properties fo:font-size="15pt" fo:font-weight="bold"/>
    </style:style>
    <style:style style:name="P3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bold"/>
    </style:style>
    <style:style style:name="P6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7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9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1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12" style:family="paragraph" style:parent-style-name="Horizontal_20_Line">
      <style:paragraph-properties fo:margin-top="0in" fo:margin-bottom="0in" style:contextual-spacing="false" fo:line-height="115%"/>
    </style:style>
    <style:style style:name="P13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14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  <style:text-properties fo:font-weight="bold"/>
    </style:style>
    <style:style style:name="P17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20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5pt" fo:font-weight="bold"/>
    </style:style>
    <style:style style:name="P21" style:family="paragraph" style:parent-style-name="Text_20_body" style:list-style-name="L8">
      <style:paragraph-properties fo:margin-left="0in" fo:margin-right="0in" fo:margin-top="0.1665in" fo:margin-bottom="0in" style:contextual-spacing="false" fo:text-indent="0in" style:auto-text-indent="false"/>
    </style:style>
    <style:style style:name="P22" style:family="paragraph" style:parent-style-name="Text_20_body" style:list-style-name="L8">
      <style:paragraph-properties fo:margin-left="0in" fo:margin-right="0in" fo:margin-top="0.1665in" fo:margin-bottom="0.1965in" style:contextual-spacing="false" fo:text-indent="0in" style:auto-text-indent="false"/>
    </style:style>
    <style:style style:name="P23" style:family="paragraph" style:parent-style-name="Text_20_body" style:list-style-name="L9">
      <style:paragraph-properties fo:margin-left="0in" fo:margin-right="0in" fo:margin-top="0.1665in" fo:margin-bottom="0in" style:contextual-spacing="false" fo:text-indent="0in" style:auto-text-indent="false"/>
    </style:style>
    <style:style style:name="P24" style:family="paragraph" style:parent-style-name="Text_20_body" style:list-style-name="L9">
      <style:paragraph-properties fo:margin-left="0in" fo:margin-right="0in" fo:margin-top="0.1665in" fo:margin-bottom="0.1965in" style:contextual-spacing="false" fo:text-indent="0in" style:auto-text-indent="false"/>
    </style:style>
    <style:style style:name="P25" style:family="paragraph" style:parent-style-name="Text_20_body" style:list-style-name="L10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26" style:family="paragraph" style:parent-style-name="Text_20_body" style:list-style-name="L11">
      <style:paragraph-properties fo:margin-left="0in" fo:margin-right="0in" fo:margin-top="0.1665in" fo:margin-bottom="0.1965in" style:contextual-spacing="false" fo:text-indent="0in" style:auto-text-indent="false"/>
    </style:style>
    <style:style style:name="P27" style:family="paragraph" style:parent-style-name="Horizontal_20_Line">
      <style:paragraph-properties fo:margin-top="0.1665in" fo:margin-bottom="0.1665in" style:contextual-spacing="false" fo:line-height="115%"/>
    </style:style>
    <style:style style:name="P28" style:family="paragraph" style:parent-style-name="Text_20_body" style:list-style-name="L12">
      <style:paragraph-properties fo:margin-left="0in" fo:margin-right="0in" fo:margin-top="0.1665in" fo:margin-bottom="0in" style:contextual-spacing="false" fo:text-indent="0in" style:auto-text-indent="false"/>
    </style:style>
    <style:style style:name="P29" style:family="paragraph" style:parent-style-name="Text_20_body" style:list-style-name="L12">
      <style:paragraph-properties fo:margin-left="0in" fo:margin-right="0in" fo:margin-top="0.1665in" fo:margin-bottom="0.1965in" style:contextual-spacing="false" fo:text-indent="0in" style:auto-text-indent="false"/>
    </style:style>
    <style:style style:name="P30" style:family="paragraph" style:parent-style-name="Text_20_body" style:list-style-name="L13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31" style:family="paragraph" style:parent-style-name="Text_20_body" style:list-style-name="L13">
      <style:paragraph-properties fo:margin-top="0.1665in" fo:margin-bottom="0in" style:contextual-spacing="false"/>
    </style:style>
    <style:style style:name="P32" style:family="paragraph" style:parent-style-name="Text_20_body" style:list-style-name="L13">
      <style:paragraph-properties fo:margin-top="0.1665in" fo:margin-bottom="0.1965in" style:contextual-spacing="false"/>
    </style:style>
    <style:style style:name="P33" style:family="paragraph" style:parent-style-name="Text_20_body" style:list-style-name="L14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34" style:family="paragraph" style:parent-style-name="Text_20_body" style:list-style-name="L14">
      <style:paragraph-properties fo:margin-left="0in" fo:margin-right="0in" fo:margin-top="0.1665in" fo:margin-bottom="0.1965in" style:contextual-spacing="false" fo:text-indent="0in" style:auto-text-indent="false"/>
    </style:style>
    <style:style style:name="P3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36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weight="bold"/>
    </style:style>
    <style:style style:name="P37" style:family="paragraph" style:parent-style-name="Text_20_body" style:list-style-name="L15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38" style:family="paragraph" style:parent-style-name="Text_20_body" style:list-style-name="L15">
      <style:paragraph-properties fo:margin-left="0in" fo:margin-right="0in" fo:margin-top="0.1665in" fo:margin-bottom="0.1965in" style:contextual-spacing="false" fo:text-indent="0in" style:auto-text-indent="false"/>
    </style:style>
    <style:style style:name="P39" style:family="paragraph" style:parent-style-name="Text_20_body" style:list-style-name="L16">
      <style:paragraph-properties fo:margin-top="0.1665in" fo:margin-bottom="0in" style:contextual-spacing="false"/>
    </style:style>
    <style:style style:name="P40" style:family="paragraph" style:parent-style-name="Text_20_body" style:list-style-name="L16">
      <style:paragraph-properties fo:margin-top="0.1665in" fo:margin-bottom="0.1965in" style:contextual-spacing="false"/>
    </style:style>
    <style:style style:name="P41" style:family="paragraph" style:parent-style-name="Text_20_body" style:list-style-name="L17">
      <style:paragraph-properties fo:margin-left="0in" fo:margin-right="0in" fo:margin-top="0.1665in" fo:margin-bottom="0in" style:contextual-spacing="false" fo:text-indent="0in" style:auto-text-indent="false"/>
    </style:style>
    <style:style style:name="P42" style:family="paragraph" style:parent-style-name="Text_20_body" style:list-style-name="L17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3" style:family="paragraph" style:parent-style-name="Text_20_body" style:list-style-name="L17">
      <style:paragraph-properties fo:margin-left="0in" fo:margin-right="0in" fo:margin-top="0.1665in" fo:margin-bottom="0.1965in" style:contextual-spacing="false" fo:text-indent="0in" style:auto-text-indent="false"/>
    </style:style>
    <style:style style:name="P44" style:family="paragraph" style:parent-style-name="Text_20_body" style:list-style-name="L18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5" style:family="paragraph" style:parent-style-name="Text_20_body" style:list-style-name="L18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weight="normal"/>
    </style:style>
    <style:style style:name="P48" style:family="paragraph" style:parent-style-name="Text_20_body" style:list-style-name="L19">
      <style:paragraph-properties fo:margin-left="0in" fo:margin-right="0in" fo:text-indent="0in" style:auto-text-indent="false"/>
    </style:style>
    <style:style style:name="P49" style:family="paragraph" style:parent-style-name="Text_20_body" style:list-style-name="L20">
      <style:paragraph-properties fo:margin-left="0in" fo:margin-right="0in" fo:text-indent="0in" style:auto-text-indent="false"/>
    </style:style>
    <style:style style:name="P50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51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52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/>
    </style:style>
    <style:style style:name="P53" style:family="paragraph" style:parent-style-name="Text_20_body" style:list-style-name="L23">
      <style:paragraph-properties fo:margin-left="0in" fo:margin-right="0in" fo:text-indent="0in" style:auto-text-indent="false"/>
    </style:style>
    <style:style style:name="P54" style:family="paragraph" style:parent-style-name="Text_20_body" style:list-style-name="L23">
      <style:paragraph-properties fo:margin-left="0in" fo:margin-right="0in" fo:text-indent="0in" style:auto-text-indent="false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3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4" style:family="text">
      <style:text-properties fo:font-size="15pt" officeooo:rsid="001ddc52"/>
    </style:style>
    <style:style style:name="T5" style:family="text">
      <style:text-properties fo:font-size="15pt"/>
    </style:style>
    <style:style style:name="T6" style:family="text">
      <style:text-properties fo:font-weight="normal"/>
    </style:style>
    <style:style style:name="T7" style:family="text">
      <style:text-properties fo:font-style="italic" fo:font-weight="normal"/>
    </style:style>
    <style:style style:name="T8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/>
        </text:list-header>
      </text:list>
      <text:h text:style-name="P2" text:outline-level="2">Working with .xz Files</text:h>
      <text:p text:style-name="P3"><text:span text:style-name="T1">The Tool: </text:span><text:span text:style-name="Source_20_Text"><text:span text:style-name="T2">xz</text:span></text:span></text:p>
      <text:list text:style-name="L2">
        <text:list-item>
          <text:p text:style-name="P4"><text:span text:style-name="T1">The Idea:</text:span> This is the tool that handles these files. To unzip them, we use the <text:span text:style-name="Source_20_Text"><text:span text:style-name="T3">-d</text:span></text:span> option (which stands for <text:span text:style-name="T1">Decompress</text:span>).</text:p>
        </text:list-item>
      </text:list>
      <text:p text:style-name="P5">1. How to Unzip (Decompress) a .xz file</text:p>
      <text:list text:style-name="L3">
        <text:list-item>
          <text:p text:style-name="P6"><text:span text:style-name="T1">Command:</text:span> <text:span text:style-name="Source_20_Text"><text:span text:style-name="T3">xz -d filename.xz</text:span></text:span></text:p>
        </text:list-item>
        <text:list-item>
          <text:p text:style-name="P7"><text:span text:style-name="T1">The Result:</text:span> This will turn <text:span text:style-name="Source_20_Text"><text:span text:style-name="T3">filename.xz</text:span></text:span> back into a normal file (like <text:span text:style-name="Source_20_Text"><text:span text:style-name="T3">filename.txt</text:span></text:span>) and delete the compressed version.</text:p>
        </text:list-item>
      </text:list>
      <text:p text:style-name="P5">2. How to Unzip while KEEPING the original (.xz) file</text:p>
      <text:list text:style-name="L4">
        <text:list-item>
          <text:p text:style-name="P8"><text:span text:style-name="T1">Command:</text:span> <text:span text:style-name="Source_20_Text"><text:span text:style-name="T3">xz -dk filename.xz</text:span></text:span></text:p>
        </text:list-item>
        <text:list-item>
          <text:p text:style-name="P9"><text:span text:style-name="T1">The Idea:</text:span> The <text:span text:style-name="Source_20_Text"><text:span text:style-name="T3">-k</text:span></text:span> stands for <text:span text:style-name="T1">Keep</text:span>. Normally, Linux deletes the "wrapper" once it unzips the file. This keeps both.</text:p>
        </text:list-item>
      </text:list>
      <text:p text:style-name="P3"><text:span text:style-name="T1">3. The "Easy Way" (The </text:span><text:span text:style-name="Source_20_Text"><text:span text:style-name="T2">unxz</text:span></text:span><text:span text:style-name="T1"> shortcut)</text:span></text:p>
      <text:list text:style-name="L5">
        <text:list-item>
          <text:p text:style-name="P10"><text:span text:style-name="T1">Command:</text:span> <text:span text:style-name="Source_20_Text"><text:span text:style-name="T3">unxz filename.xz</text:span></text:span></text:p>
        </text:list-item>
        <text:list-item>
          <text:p text:style-name="P11"><text:span text:style-name="T1">The Idea:</text:span> Linux often provides a "nickname" command that is easier to remember. <text:span text:style-name="Source_20_Text"><text:span text:style-name="T3">unxz</text:span></text:span> does exactly the same thing as <text:span text:style-name="Source_20_Text"><text:span text:style-name="T3">xz -d</text:span></text:span>.</text:p>
        </text:list-item>
      </text:list>
      <text:p text:style-name="P12"/>
      <text:h text:style-name="P2" text:outline-level="2">The "Bundle" Exception (The .tar.xz file)</text:h>
      <text:p text:style-name="P13">Sometimes you will see a file ending in <text:span text:style-name="T1">.tar.xz</text:span>. This is very common in Linux.</text:p>
      <text:list text:style-name="L6">
        <text:list-item>
          <text:p text:style-name="P14"><text:span text:style-name="T1">What it is:</text:span> A "Tarball." Think of it like a <text:span text:style-name="T1">box</text:span> (.tar) that has been <text:span text:style-name="T1">vacuum-sealed</text:span> (.xz).</text:p>
        </text:list-item>
        <text:list-item>
          <text:p text:style-name="P15"><text:span text:style-name="T1">How to unzip it:</text:span> You use the <text:span text:style-name="Source_20_Text"><text:span text:style-name="T3">tar</text:span></text:span> command instead of <text:span text:style-name="Source_20_Text"><text:span text:style-name="T3">xz</text:span></text:span>.</text:p>
        </text:list-item>
        <text:list-item>
          <text:p text:style-name="P15"><text:span text:style-name="T1">Command:</text:span> <text:span text:style-name="Source_20_Text"><text:span text:style-name="T3">tar -xf filename.tar.xz</text:span></text:span></text:p>
        </text:list-item>
        <text:list-item>
          <text:p text:style-name="P16">What the letters mean:</text:p>
          <text:list>
            <text:list-item>
              <text:p text:style-name="P15"><text:span text:style-name="Source_20_Text"><text:span text:style-name="T3">-x</text:span></text:span> = <text:span text:style-name="T1">Extract</text:span> (Take things out of the box).</text:p>
            </text:list-item>
            <text:list-item>
              <text:p text:style-name="P17"><text:span text:style-name="Source_20_Text"><text:span text:style-name="T3">-f</text:span></text:span> = <text:span text:style-name="T1">File</text:span> (I am telling you which file to use).</text:p>
            </text:list-item>
          </text:list>
        </text:list-item>
      </text:list>
      <text:p text:style-name="P12"/>
      <text:p text:style-name="P5">Summary for your notes:</text:p>
      <text:list text:style-name="L7">
        <text:list-item>
          <text:p text:style-name="P18"><text:soft-page-break/>To unzip a plain <text:span text:style-name="T1">.xz</text:span>: Use <text:span text:style-name="Source_20_Text"><text:span text:style-name="T3">unxz filename.xz</text:span></text:span></text:p>
        </text:list-item>
        <text:list-item>
          <text:p text:style-name="P19">To unzip a <text:span text:style-name="T1">.tar.xz</text:span> bundle: Use <text:span text:style-name="Source_20_Text"><text:span text:style-name="T3">tar -xf filename.tar.xz</text:span></text:span></text:p>
        </text:list-item>
      </text:list>
      <text:p text:style-name="P13">If you want to learn more about how Linux handles these "boxes," check out the official tar documentation or the xz tool overview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0" text:outline-level="2"><text:soft-page-break/>The Command: sudo apt-get install gcc</text:h>
      <text:p text:style-name="P5">1. sudo (SuperUser DO)</text:p>
      <text:list text:style-name="L8">
        <text:list-item>
          <text:p text:style-name="P21"><text:span text:style-name="T1">The Idea:</text:span> Think of this as the "Admin Password" or "Boss Mode." In Linux, you aren't allowed to install software unless you prove you are the owner.</text:p>
        </text:list-item>
        <text:list-item>
          <text:p text:style-name="P22"><text:span text:style-name="T1">Example:</text:span> It’s like a security guard asking for your ID before letting you into the server room.</text:p>
        </text:list-item>
      </text:list>
      <text:p text:style-name="P5">2. apt-get (Advanced Package Tool)</text:p>
      <text:list text:style-name="L9">
        <text:list-item>
          <text:p text:style-name="P23"><text:span text:style-name="T1">The Idea:</text:span> This is the "App Store" of the command line. It is a tool that goes out to the internet, finds the software you want, and downloads it for you.</text:p>
        </text:list-item>
        <text:list-item>
          <text:p text:style-name="P24"><text:span text:style-name="T1">Example:</text:span> It’s like a personal shopper who knows exactly which shelf has the item you need.</text:p>
        </text:list-item>
      </text:list>
      <text:p text:style-name="P5">3. install</text:p>
      <text:list text:style-name="L10">
        <text:list-item>
          <text:p text:style-name="P25"><text:span text:style-name="T1">The Idea:</text:span> This tells the "personal shopper" (<text:span text:style-name="Source_20_Text"><text:span text:style-name="T3">apt-get</text:span></text:span>) what action to take. You want to add something new to your system.</text:p>
        </text:list-item>
      </text:list>
      <text:p text:style-name="P5">4. gcc</text:p>
      <text:list text:style-name="L11">
        <text:list-item>
          <text:p text:style-name="P26"><text:span text:style-name="T1">The Idea:</text:span> This is the name of the "package" (the software) you want to install.</text:p>
        </text:list-item>
      </text:list>
      <text:p text:style-name="P27"/>
      <text:h text:style-name="P20" text:outline-level="2">What is GCC? (The Translator)</text:h>
      <text:p text:style-name="P13"><text:span text:style-name="T1">GCC</text:span> stands for <text:span text:style-name="T1">GNU Compiler Collection</text:span>.</text:p>
      <text:list text:style-name="L12">
        <text:list-item>
          <text:p text:style-name="P28"><text:span text:style-name="T1">The Problem:</text:span> Computers are actually pretty dumb; they only understand 1s and 0s (binary). Humans write code in languages like <text:span text:style-name="T1">C</text:span> or <text:span text:style-name="T1">C++</text:span>, which look like English.</text:p>
        </text:list-item>
        <text:list-item>
          <text:p text:style-name="P28"><text:span text:style-name="T1">The Solution:</text:span> GCC is a <text:span text:style-name="T1">Compiler</text:span>. Its job is to take the "human" code you wrote and "translate" it into "machine code" that the computer's brain (CPU) can actually run.</text:p>
        </text:list-item>
        <text:list-item>
          <text:p text:style-name="P29"><text:soft-page-break/><text:span text:style-name="T1">The "In Plain English" Definition:</text:span> GCC is like a <text:span text:style-name="T1">Translator</text:span>. If you write a book in English, but your reader only speaks Japanese, the Translator (GCC) rewrites your book into Japanese so it can be read.</text:p>
        </text:list-item>
      </text:list>
      <text:p text:style-name="P5">A Real-World Example:</text:p>
      <text:list text:style-name="L13">
        <text:list-item>
          <text:p text:style-name="P30">You write a simple program in a text file called <text:span text:style-name="Source_20_Text"><text:span text:style-name="T3">hello.c</text:span></text:span>.</text:p>
        </text:list-item>
        <text:list-item>
          <text:p text:style-name="P31">You run the GCC command on it.</text:p>
        </text:list-item>
        <text:list-item>
          <text:p text:style-name="P32">GCC creates a new file (an "executable") that you can double-click or run to see your program work!</text:p>
        </text:list-item>
      </text:list>
      <text:p text:style-name="P27"/>
      <text:p text:style-name="P5">Summary for your notes:</text:p>
      <text:list text:style-name="L14">
        <text:list-item>
          <text:p text:style-name="P33"><text:span text:style-name="Source_20_Text"><text:span text:style-name="T2">sudo apt-get install gcc</text:span></text:span> = "Hey Boss, use the App Store to download and install the Translator tool."</text:p>
        </text:list-item>
        <text:list-item>
          <text:p text:style-name="P34"><text:span text:style-name="T1">GCC</text:span> = The tool that turns human-written code into working programs.</text:p>
        </text:list-item>
      </text:list>
      <text:p text:style-name="P13">If you want to dive deeper into how it works, you can check out the official GCC homepage or this intro to C programming.</text:p>
      <text:p text:style-name="P35"/>
      <text:p text:style-name="P35"/>
      <text:p text:style-name="P35"/>
      <text:p text:style-name="P35"/>
      <text:p text:style-name="P35"/>
      <text:p text:style-name="P35"/>
      <text:h text:style-name="P36" text:outline-level="2"><text:soft-page-break/><text:span text:style-name="T4">T</text:span><text:span text:style-name="T5">he Command: sudo apt-get install make</text:span></text:h>
      <text:list text:style-name="L15">
        <text:list-item>
          <text:p text:style-name="P37"><text:span text:style-name="T1">The Idea:</text:span> Just like the last command, you are using <text:span text:style-name="T1">Boss Mode</text:span> (<text:span text:style-name="Source_20_Text"><text:span text:style-name="T3">sudo</text:span></text:span>) and your <text:span text:style-name="T1">Personal Shopper</text:span> (<text:span text:style-name="Source_20_Text"><text:span text:style-name="T3">apt-get</text:span></text:span>) to download and install a tool called <text:span text:style-name="Source_20_Text"><text:span text:style-name="T3">make</text:span></text:span>.</text:p>
        </text:list-item>
        <text:list-item>
          <text:p text:style-name="P38"><text:span text:style-name="T1">Example:</text:span> You’re essentially telling your computer, "I need to hire a manager to handle my building projects."</text:p>
        </text:list-item>
      </text:list>
      <text:p text:style-name="P27"/>
      <text:h text:style-name="P20" text:outline-level="2">What is Make? (The Project Manager)</text:h>
      <text:p text:style-name="P35"><text:span text:style-name="T1">The Problem:</text:span><text:span text:style-name="T6"> When a program gets big, it isn't just one file anymore; it might have hundreds of files. If you change just </text:span><text:span text:style-name="Emphasis"><text:span text:style-name="T7">one</text:span></text:span><text:span text:style-name="T6"> small thing in </text:span><text:span text:style-name="Emphasis"><text:span text:style-name="T7">one</text:span></text:span><text:span text:style-name="T6"> file, you shouldn't have to manually re-translate (compile) all 100 files again. That would waste a lot of time!</text:span></text:p>
      <text:p text:style-name="P13"><text:span text:style-name="T1">The Solution:</text:span> <text:span text:style-name="T1">Make</text:span> is a tool that automates the building process. It looks at your files and says, "Okay, I see you changed the 'Login' page, so I'll only update that part and then put the whole app back together for you."</text:p>
      <text:p text:style-name="P13"><text:span text:style-name="T1">The "In Plain English" Definition:</text:span> Think of <text:span text:style-name="T1">Make</text:span> like a <text:span text:style-name="T1">Lego Instruction Manual</text:span>.</text:p>
      <text:list text:style-name="L16">
        <text:list-item>
          <text:p text:style-name="P39">It knows which pieces go where.</text:p>
        </text:list-item>
        <text:list-item>
          <text:p text:style-name="P39">It knows which steps must happen first.</text:p>
        </text:list-item>
        <text:list-item>
          <text:p text:style-name="P40">If you lose a wheel, it knows exactly which part of the instructions to follow to fix just that wheel.</text:p>
        </text:list-item>
      </text:list>
      <text:p text:style-name="P13"><text:span text:style-name="T1">How it works (The Makefile):</text:span><text:line-break/>To use Make, you usually have a file in your folder called a <text:span text:style-name="T1">Makefile</text:span>. This file is just a list of "recipes" or rules that you wrote.</text:p>
      <text:list text:style-name="L17">
        <text:list-item>
          <text:p text:style-name="P41"><text:span text:style-name="T1">Rule:</text:span> "To make the program, first use GCC to translate these three files."</text:p>
        </text:list-item>
        <text:list-item>
          <text:p text:style-name="P42"><text:span text:style-name="T1">Action:</text:span> You just type the single word <text:span text:style-name="Source_20_Text"><text:span text:style-name="T3">make</text:span></text:span> into your terminal.</text:p>
        </text:list-item>
        <text:list-item>
          <text:p text:style-name="P43"><text:span text:style-name="T1">Result:</text:span> Make reads the Makefile and does all the hard work for you.</text:p>
        </text:list-item>
      </text:list>
      <text:p text:style-name="P27"><text:soft-page-break/></text:p>
      <text:p text:style-name="P5">Summary for your notes:</text:p>
      <text:list text:style-name="L18">
        <text:list-item>
          <text:p text:style-name="P44"><text:span text:style-name="Source_20_Text"><text:span text:style-name="T2">make</text:span></text:span> = A tool that automates building programs so you don't have to type long commands over and over.</text:p>
        </text:list-item>
        <text:list-item>
          <text:p text:style-name="P45"><text:span text:style-name="T1">The Makefile</text:span> = The "recipe book" that <text:span text:style-name="Source_20_Text"><text:span text:style-name="T3">make</text:span></text:span> follows to get the job done.</text:p>
        </text:list-item>
      </text:list>
      <text:p text:style-name="P3"><text:span text:style-name="T1">Pro Tip:</text:span><text:span text:style-name="T6"> If you ever download a program's "Source Code" from the internet (like from GitHub), you will almost always use the command </text:span><text:span text:style-name="Source_20_Text"><text:span text:style-name="T8">make</text:span></text:span><text:span text:style-name="T6"> to build and install it.</text:span></text:p>
      <text:p text:style-name="P13">You can learn more about the specifics of writing these "recipes" in the GNU Make Manual.</text:p>
      <text:p text:style-name="P3"><text:span text:style-name="T1"/></text:p>
      <text:p text:style-name="P35"/>
      <text:p text:style-name="P13"/>
      <text:p text:style-name="P3"><text:span text:style-name="T1"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</text:p>
      <text:p text:style-name="P12"/>
      <text:h text:style-name="P2" text:outline-level="2"/>
      <text:h text:style-name="P2" text:outline-level="2">My "Build from Source" Process</text:h>
      <text:p text:style-name="P3"><text:span text:style-name="T6">I used this four-step workflow to take control of my system and customize how the </text:span><text:span text:style-name="Source_20_Text"><text:span text:style-name="T8">ls</text:span></text:span><text:span text:style-name="T6"> command behaves.</text:span></text:p>
      <text:p text:style-name="P3"><text:span text:style-name="T1">1. The "Architect" Phase (Nano)</text:span><text:span text:style-name="T6"><text:line-break/>First, I became the architect. I opened the raw text file </text:span><text:span text:style-name="Source_20_Text"><text:span text:style-name="T8">ls.c</text:span></text:span><text:span text:style-name="T6"> (the "blueprint") using the </text:span><text:span text:style-name="T1">Nano</text:span><text:span text:style-name="T6"> editor. I wrote a new instruction in the </text:span><text:span text:style-name="T1">C programming language</text:span><text:span text:style-name="T6"> to tell the computer to print my custom greeting. At this stage, I am just writing down my ideas in a text file.</text:span></text:p>
      <text:list text:style-name="L19">
        <text:list-item>
          <text:p text:style-name="P48"><text:span text:style-name="T1">My Goal:</text:span> I wanted to add a personal touch to the tool's "brain."</text:p>
        </text:list-item>
      </text:list>
      <text:p text:style-name="P3"><text:span text:style-name="T1">2. The "Inspector" Phase (Configure)</text:span><text:span text:style-name="T6"><text:line-break/>Next, I ran the </text:span><text:span text:style-name="Source_20_Text"><text:span text:style-name="T8">./configure</text:span></text:span><text:span text:style-name="T6"> script. This acted like my personal inspector. I used it to scan my entire system to make sure I had all the necessary tools and libraries ready to build such a big project.</text:span></text:p>
      <text:list text:style-name="L20">
        <text:list-item>
          <text:p text:style-name="P49"><text:span text:style-name="T1">What I accomplished:</text:span> I made sure my computer was compatible, and I generated a custom "to-do list" (the <text:span text:style-name="T1">Makefile</text:span>) specifically for my machine.</text:p>
        </text:list-item>
      </text:list>
      <text:p text:style-name="P3"><text:span text:style-name="T1">3. The "Factory" Phase (Make)</text:span><text:span text:style-name="T6"><text:line-break/>Then, I started the factory by typing </text:span><text:span text:style-name="Source_20_Text"><text:span text:style-name="T8">make</text:span></text:span><text:span text:style-name="T6">. This command took the instructions I wrote in </text:span><text:span text:style-name="T1">Nano</text:span><text:span text:style-name="T6"> and the "to-do list" from </text:span><text:span text:style-name="T1">Configure</text:span><text:span text:style-name="T6"> and handed them over to the compiler (</text:span><text:span text:style-name="T1">GCC</text:span><text:span text:style-name="T6">). The compiler translated my human-readable code into </text:span><text:span text:style-name="T1">Machine Code</text:span><text:span text:style-name="T6"> (binary) that the computer can actually execute.</text:span></text:p>
      <text:list text:style-name="L21">
        <text:list-item>
          <text:p text:style-name="P50"><text:span text:style-name="T1">What I created:</text:span> I produced a finished, working version of my custom <text:span text:style-name="Source_20_Text"><text:span text:style-name="T3">ls</text:span></text:span> program, but it was still just sitting inside my folder.</text:p>
        </text:list-item>
      </text:list>
      <text:p text:style-name="P3"><text:span text:style-name="T1">4. The "Inauguration" Phase (Sudo Make Install)</text:span><text:span text:style-name="T6"><text:line-break/>Finally, I used </text:span><text:span text:style-name="T1">Sudo</text:span><text:span text:style-name="T6"> (my "Admin Power") to run </text:span><text:span text:style-name="Source_20_Text"><text:span text:style-name="T8">make install</text:span></text:span><text:span text:style-name="T6">. This was the most important step because it moved my newly built program into the system's official "toolbox" folders (like </text:span><text:span text:style-name="Source_20_Text"><text:span text:style-name="T8">/usr/local/bin</text:span></text:span><text:span text:style-name="T6">).</text:span></text:p>
      <text:list text:style-name="L22">
        <text:list-item>
          <text:p text:style-name="P51"><text:span text:style-name="T1">The Result:</text:span> I officially replaced the standard system command with my own. Now, every time I type <text:span text:style-name="Source_20_Text"><text:span text:style-name="T3">ls</text:span></text:span> from anywhere, my custom greeting appears.</text:p>
        </text:list-item>
      </text:list>
      <text:p text:style-name="P12"><text:soft-page-break/></text:p>
      <text:h text:style-name="P2" text:outline-level="2">Why I Did It This Way</text:h>
      <text:list text:style-name="L23">
        <text:list-item>
          <text:p text:style-name="P52"><text:span text:style-name="T1">Total Control:</text:span> I am not limited by what's "in the box." I can change the DNA of my operating system.</text:p>
        </text:list-item>
        <text:list-item>
          <text:p text:style-name="P53"><text:span text:style-name="T1">Learning:</text:span> I am seeing exactly how software is "cooked" from raw ingredients (source code) into a finished meal (the program).</text:p>
          <text:p text:style-name="P54"/>
        </text:list-item>
      </text:list>
      <text:p text:style-name="P46"><draw:frame draw:style-name="fr1" draw:name="Image1" text:anchor-type="char" svg:width="6.9252in" svg:height="4.0016in" draw:z-index="0"><draw:image xlink:href="Pictures/100000010000053100000300564642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draw:fill="none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0:02:20.721106511</meta:creation-date>
    <dc:date>2026-05-11T11:19:57.801633994</dc:date>
    <meta:editing-duration>PT1H7M22S</meta:editing-duration>
    <meta:editing-cycles>4</meta:editing-cycles>
    <meta:generator>LibreOffice/25.2.3.2$Linux_X86_64 LibreOffice_project/520$Build-2</meta:generator>
    <meta:document-statistic meta:table-count="0" meta:image-count="1" meta:object-count="0" meta:page-count="8" meta:paragraph-count="82" meta:word-count="1323" meta:character-count="7165" meta:non-whitespace-character-count="5969"/>
  </office:meta>
</office:document-meta>
</file>