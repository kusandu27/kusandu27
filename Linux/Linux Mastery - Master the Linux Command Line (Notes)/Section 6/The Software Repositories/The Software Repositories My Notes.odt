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/>
      <style:text-properties fo:font-size="15pt" fo:font-weight="bold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font-size="15pt" fo:font-weight="bold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ext_20_body" style:list-style-name="L2">
      <style:paragraph-properties fo:margin-left="0in" fo:margin-right="0in" fo:text-indent="0in" style:auto-text-indent="false"/>
    </style:style>
    <style:style style:name="P7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8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9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bold"/>
    </style:style>
    <style:style style:name="P10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Text_20_body" style:list-style-name="L4">
      <style:paragraph-properties fo:margin-left="0in" fo:margin-right="0in" fo:text-indent="0in" style:auto-text-indent="false"/>
    </style:style>
    <style:style style:name="P12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3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What is a Software Repository?</text:h>
      <text:p text:style-name="P2"/>
      <text:list text:style-name="L1">
        <text:list-item>
          <text:p text:style-name="P3"><text:span text:style-name="T1">The "In Plain English" Definition:</text:span> It is a <text:span text:style-name="T1">Centralized Storage Hub</text:span> on a secure server that holds thousands of pre-tested programs, updates, and tools.</text:p>
        </text:list-item>
        <text:list-item>
          <text:p text:style-name="P3"><text:span text:style-name="T1">The Comparison:</text:span> I think of a Repository like an <text:span text:style-name="T1">Official App Store</text:span> (like the Google Play Store or Apple App Store), but for the Linux command line.</text:p>
        </text:list-item>
        <text:list-item>
          <text:p text:style-name="P4"><text:span text:style-name="T1">How it works:</text:span> When I typed <text:span text:style-name="Source_20_Text"><text:span text:style-name="T2">sudo apt-get install gcc</text:span></text:span>, my computer didn't just "know" where GCC was. It looked at its list of <text:span text:style-name="T1">Repositories</text:span>, found the right "warehouse," and downloaded the software from there.</text:p>
        </text:list-item>
      </text:list>
      <text:p text:style-name="Horizontal_20_Line"/>
      <text:h text:style-name="P1" text:outline-level="2">Why I Use Repositories Instead of Websites</text:h>
      <text:p text:style-name="P2"/>
      <text:list text:style-name="L2">
        <text:list-item>
          <text:p text:style-name="P5"><text:span text:style-name="T1">Security:</text:span> Every piece of software in the repository is checked and "signed" by the people who manage my Linux version (like Debian or Ubuntu). This means I don't have to worry about downloading a virus from a sketchy website.</text:p>
        </text:list-item>
        <text:list-item>
          <text:p text:style-name="P5"><text:span text:style-name="T1">Automatic Updates:</text:span> When the "warehouse" gets a newer version of a program, my system notices it and offers to update everything at once. I don't have to check 20 different websites for updates.</text:p>
        </text:list-item>
        <text:list-item>
          <text:p text:style-name="P6"><text:span text:style-name="T1">Dependencies (The "Side-Dish" Problem):</text:span> Some programs need <text:span text:style-name="Emphasis"><text:span text:style-name="T3">other</text:span></text:span> programs to work. A Repository is smart; it says, "I see you want GCC, but you also need these three other files to make it work. I'll grab those for you, too."</text:p>
        </text:list-item>
      </text:list>
      <text:p text:style-name="Horizontal_20_Line"/>
      <text:h text:style-name="P1" text:outline-level="2">How I Manage My Repositories</text:h>
      <text:p text:style-name="P2"/>
      <text:list text:style-name="L3">
        <text:list-item>
          <text:p text:style-name="P7"><text:span text:style-name="T1">The List:</text:span> My computer keeps a list of these warehouse addresses in a special file (usually found at <text:span text:style-name="Source_20_Text"><text:span text:style-name="T2">/etc/apt/sources.list</text:span></text:span>).</text:p>
        </text:list-item>
        <text:list-item>
          <text:p text:style-name="P7"><text:span text:style-name="T1">Refreshing the List:</text:span> When I run <text:span text:style-name="Source_20_Text"><text:span text:style-name="T2">sudo apt-get update</text:span></text:span>, I am telling my computer to call all the warehouses and ask, "What do you have in stock today? Are there any new versions?"</text:p>
        </text:list-item>
        <text:list-item>
          <text:p text:style-name="P8"><text:span text:style-name="T1">Installing:</text:span> When I run <text:span text:style-name="Source_20_Text"><text:span text:style-name="T2">sudo apt-get install</text:span></text:span>, I am telling it to go to the warehouse and bring the item home.</text:p>
        </text:list-item>
      </text:list>
      <text:p text:style-name="Horizontal_20_Line"/>
      <text:p text:style-name="P9"/>
      <text:p text:style-name="P9"><text:soft-page-break/>Summary for my notes:</text:p>
      <text:list text:style-name="L4">
        <text:list-item>
          <text:p text:style-name="P10"><text:span text:style-name="T1">Repository</text:span> = A secure, official warehouse for software.</text:p>
        </text:list-item>
        <text:list-item>
          <text:p text:style-name="P10"><text:span text:style-name="T1">Safety</text:span> = I know the software is clean and tested.</text:p>
        </text:list-item>
        <text:list-item>
          <text:p text:style-name="P11"><text:span text:style-name="T1">Convenience</text:span> = One command finds, downloads, and installs everything for me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1T12:25:16.376366713</meta:creation-date>
    <dc:date>2026-05-11T12:33:23.159359171</dc:date>
    <meta:editing-duration>PT8M8S</meta:editing-duration>
    <meta:editing-cycles>1</meta:editing-cycles>
    <meta:document-statistic meta:table-count="0" meta:image-count="0" meta:object-count="0" meta:page-count="3" meta:paragraph-count="16" meta:word-count="333" meta:character-count="1868" meta:non-whitespace-character-count="1563"/>
    <meta:generator>LibreOffice/25.2.3.2$Linux_X86_64 LibreOffice_project/520$Build-2</meta:generator>
  </office:meta>
</office:document-meta>
</file>