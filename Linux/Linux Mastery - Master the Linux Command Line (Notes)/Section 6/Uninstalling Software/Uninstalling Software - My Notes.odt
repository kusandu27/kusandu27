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/>
      <style:text-properties fo:font-size="15pt" fo:font-weight="bold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font-size="15pt" fo:font-weight="bold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text-indent="0in" style:auto-text-indent="false"/>
    </style:style>
    <style:style style:name="P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6" style:family="paragraph" style:parent-style-name="Text_20_body" style:list-style-name="L2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</style:style>
    <style:style style:name="P8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9" style:family="paragraph" style:parent-style-name="Text_20_body" style:list-style-name="L3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/>
    </style:style>
    <style:style style:name="P11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2" style:family="paragraph" style:parent-style-name="Text_20_body" style:list-style-name="L4">
      <style:paragraph-properties fo:margin-left="0in" fo:margin-right="0in" fo:text-indent="0in" style:auto-text-indent="false"/>
    </style:style>
    <style:style style:name="P13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bold"/>
    </style:style>
    <style:style style:name="P14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5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16" style:family="paragraph" style:parent-style-name="Standard">
      <style:paragraph-properties fo:margin-left="0.1665in" fo:margin-right="0.1665in" fo:margin-top="0.1665in" fo:margin-bottom="0.1665in" style:contextual-spacing="false" fo:text-indent="0in" style:auto-text-indent="false"/>
    </style:style>
    <style:style style:name="P17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8" style:family="paragraph" style:parent-style-name="Text_20_body" style:list-style-name="L6">
      <style:paragraph-properties fo:margin-left="0in" fo:margin-right="0in" fo:text-indent="0in" style:auto-text-indent="false"/>
    </style:style>
    <style:style style:name="P19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20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22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23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24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25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26" style:family="paragraph" style:parent-style-name="Text_20_body" style:list-style-name="L10">
      <style:paragraph-properties fo:margin-left="0in" fo:margin-right="0in" fo:text-indent="0in" style:auto-text-indent="false"/>
    </style:style>
    <style:style style:name="P27" style:family="paragraph" style:parent-style-name="Text_20_body">
      <style:paragraph-properties fo:margin-top="0in" fo:margin-bottom="0in" style:contextual-spacing="false"/>
    </style:style>
    <style:style style:name="P28" style:family="paragraph" style:parent-style-name="Standard">
      <style:text-properties fo:font-weight="normal"/>
    </style:style>
    <style:style style:name="P29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/>
    </style:style>
    <style:style style:name="P30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31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32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/>
    </style:style>
    <style:style style:name="P33" style:family="paragraph" style:parent-style-name="Text_20_body" style:list-style-name="L12">
      <style:paragraph-properties fo:margin-left="0in" fo:margin-right="0in" fo:text-indent="0in" style:auto-text-indent="false"/>
    </style:style>
    <style:style style:name="P34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/>
    </style:style>
    <style:style style:name="P35" style:family="paragraph" style:parent-style-name="Text_20_body" style:list-style-name="L13">
      <style:paragraph-properties fo:margin-left="0in" fo:margin-right="0in" fo:text-indent="0in" style:auto-text-indent="false"/>
    </style:style>
    <style:style style:name="P36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37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38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39" style:family="paragraph" style:parent-style-name="Text_20_body" style:list-style-name="L15">
      <style:paragraph-properties fo:margin-left="0in" fo:margin-right="0in" fo:text-indent="0in" style:auto-text-indent="false"/>
    </style:style>
    <style:style style:name="P40" style:family="paragraph" style:parent-style-name="Text_20_body">
      <style:paragraph-properties fo:margin-left="0in" fo:margin-right="0in" fo:text-indent="0in" style:auto-text-indent="false"/>
    </style:style>
    <style:style style:name="P41" style:family="paragraph" style:parent-style-name="Standard">
      <style:paragraph-properties fo:margin-left="0.1665in" fo:margin-right="0.1665in" fo:margin-top="0.1665in" fo:margin-bottom="0.1665in" style:contextual-spacing="false" fo:text-indent="0in" style:auto-text-indent="false" style:writing-mode="lr-tb"/>
    </style:style>
    <style:style style:name="P42" style:family="paragraph" style:parent-style-name="Text_20_body" style:list-style-name="L16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43" style:family="paragraph" style:parent-style-name="Text_20_body" style:list-style-name="L16">
      <style:paragraph-properties fo:margin-left="0in" fo:margin-right="0in" fo:margin-top="0.1665in" fo:margin-bottom="0in" style:contextual-spacing="false" fo:text-indent="0in" style:auto-text-indent="false"/>
    </style:style>
    <style:style style:name="P44" style:family="paragraph" style:parent-style-name="Text_20_body" style:list-style-name="L16">
      <style:paragraph-properties fo:margin-left="0in" fo:margin-right="0in" fo:margin-top="0.1665in" fo:margin-bottom="0.1965in" style:contextual-spacing="false" fo:text-indent="0in" style:auto-text-indent="false"/>
    </style:style>
    <style:style style:name="P45" style:family="paragraph" style:parent-style-name="Horizontal_20_Line">
      <style:paragraph-properties fo:margin-top="0.1665in" fo:margin-bottom="0.1665in" style:contextual-spacing="false" fo:line-height="115%"/>
    </style:style>
    <style:style style:name="P46" style:family="paragraph" style:parent-style-name="Heading_20_2">
      <style:paragraph-properties fo:margin-left="0in" fo:margin-right="0in" fo:margin-top="0.1665in" fo:margin-bottom="0.1665in" style:contextual-spacing="false" fo:line-height="115%" fo:text-indent="0in" style:auto-text-indent="false"/>
      <style:text-properties fo:font-size="15pt" fo:font-weight="bold"/>
    </style:style>
    <style:style style:name="P47" style:family="paragraph" style:parent-style-name="Text_20_body" style:list-style-name="L17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48" style:family="paragraph" style:parent-style-name="Text_20_body" style:list-style-name="L17">
      <style:paragraph-properties fo:margin-left="0in" fo:margin-right="0in" fo:margin-top="0.1665in" fo:margin-bottom="0.1965in" style:contextual-spacing="false" fo:text-indent="0in" style:auto-text-indent="false"/>
    </style:style>
    <style:style style:name="P49" style:family="paragraph" style:parent-style-name="Text_20_body" style:list-style-name="L18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50" style:family="paragraph" style:parent-style-name="Text_20_body" style:list-style-name="L18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51" style:family="paragraph" style:parent-style-name="Text_20_body" style:list-style-name="L19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52" style:family="paragraph" style:parent-style-name="Text_20_body" style:list-style-name="L19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53" style:family="paragraph" style:parent-style-name="Text_20_body" style:list-style-name="L20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54" style:family="paragraph" style:parent-style-name="Text_20_body" style:list-style-name="L20">
      <style:paragraph-properties fo:margin-left="0in" fo:margin-right="0in" fo:margin-top="0.1665in" fo:margin-bottom="0.1965in" style:contextual-spacing="false" fo:text-indent="0in" style:auto-text-indent="false"/>
    </style:style>
    <style:style style:name="P55" style:family="paragraph" style:parent-style-name="Text_20_body">
      <style:paragraph-properties fo:margin-left="0in" fo:margin-right="0in" fo:margin-top="0.1665in" fo:margin-bottom="0.1965in" style:contextual-spacing="false" fo:text-indent="0in" style:auto-text-indent="false"/>
    </style:style>
    <style:style style:name="P56" style:family="paragraph" style:parent-style-name="Text_20_body">
      <style:paragraph-properties fo:margin-left="0in" fo:margin-right="0in" fo:margin-top="0.1665in" fo:margin-bottom="0.1965in" style:contextual-spacing="false" fo:text-indent="0in" style:auto-text-indent="false"/>
      <style:text-properties fo:font-weight="normal"/>
    </style:style>
    <style:style style:name="P57" style:family="paragraph" style:parent-style-name="Heading_20_2">
      <style:paragraph-properties fo:margin-left="0in" fo:margin-right="0in" fo:margin-top="0.1665in" fo:margin-bottom="0.1965in" style:contextual-spacing="false" fo:line-height="115%" fo:text-indent="0in" style:auto-text-indent="false"/>
      <style:text-properties fo:font-size="15pt" fo:font-weight="bold"/>
    </style:style>
    <style:style style:name="P58" style:family="paragraph" style:parent-style-name="Text_20_body" style:list-style-name="L21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59" style:family="paragraph" style:parent-style-name="Text_20_body" style:list-style-name="L21">
      <style:paragraph-properties fo:margin-left="0in" fo:margin-right="0in" fo:margin-top="0.1665in" fo:margin-bottom="0in" style:contextual-spacing="false" fo:text-indent="0in" style:auto-text-indent="false"/>
    </style:style>
    <style:style style:name="P60" style:family="paragraph" style:parent-style-name="Text_20_body" style:list-style-name="L21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61" style:family="paragraph" style:parent-style-name="Horizontal_20_Line">
      <style:paragraph-properties fo:margin-top="0.1665in" fo:margin-bottom="0.1965in" style:contextual-spacing="false" fo:line-height="115%"/>
    </style:style>
    <style:style style:name="P62" style:family="paragraph" style:parent-style-name="Text_20_body" style:list-style-name="L22">
      <style:paragraph-properties fo:margin-left="0in" fo:margin-right="0in" fo:margin-top="0.1665in" fo:margin-bottom="0in" style:contextual-spacing="false" fo:text-indent="0in" style:auto-text-indent="false"/>
    </style:style>
    <style:style style:name="P63" style:family="paragraph" style:parent-style-name="Text_20_body" style:list-style-name="L22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64" style:family="paragraph" style:parent-style-name="Text_20_body" style:list-style-name="L22">
      <style:paragraph-properties fo:margin-left="0in" fo:margin-right="0in" fo:margin-top="0.1665in" fo:margin-bottom="0.1965in" style:contextual-spacing="false" fo:text-indent="0in" style:auto-text-indent="false"/>
    </style:style>
    <style:style style:name="P65" style:family="paragraph" style:parent-style-name="Text_20_body" style:list-style-name="L23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66" style:family="paragraph" style:parent-style-name="Text_20_body" style:list-style-name="L23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67" style:family="paragraph" style:parent-style-name="Text_20_body" style:list-style-name="L24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68" style:family="paragraph" style:parent-style-name="Text_20_body" style:list-style-name="L24">
      <style:paragraph-properties fo:margin-left="0in" fo:margin-right="0in" fo:margin-top="0.1665in" fo:margin-bottom="0.1965in" style:contextual-spacing="false" fo:text-indent="0in" style:auto-text-indent="false"/>
    </style:style>
    <style:style style:name="P69" style:family="paragraph" style:parent-style-name="Text_20_body">
      <style:paragraph-properties fo:margin-top="0.1665in" fo:margin-bottom="0in" style:contextual-spacing="false"/>
    </style:style>
    <style:style style:name="P70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  <style:text-properties fo:font-weight="normal"/>
    </style:style>
    <style:style style:name="T1" style:family="text">
      <style:text-properties fo:font-weight="bold"/>
    </style:style>
    <style:style style:name="T2" style:family="text">
      <style:text-properties fo:font-weight="bold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3" style:family="text">
      <style:text-properties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4" style:family="text">
      <style:text-properties fo:font-weight="normal"/>
    </style:style>
    <style:style style:name="T5" style:family="text">
      <style:text-properties fo:font-weight="normal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6" style:family="text">
      <style:text-properties fo:font-size="15pt" fo:font-weight="bold"/>
    </style:style>
    <style:style style:name="T7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he Basic Way: sudo apt-get remove [app]</text:h>
      <text:p text:style-name="P2"/>
      <text:list text:style-name="L1">
        <text:list-item>
          <text:p text:style-name="P3"><text:span text:style-name="T1">The Idea:</text:span> This is the standard "Delete" button for software. It tells the APT manager to find the program's files and delete them.</text:p>
        </text:list-item>
        <text:list-item>
          <text:p text:style-name="P3"><text:span text:style-name="T1">What I am doing:</text:span> I am telling the system, "I don't want to run this program anymore, so please delete the main application files."</text:p>
        </text:list-item>
        <text:list-item>
          <text:p text:style-name="P4"><text:span text:style-name="T1">The "In Plain English" Definition:</text:span> This is like <text:span text:style-name="T1">moving a piece of furniture out of my house</text:span>. The furniture (the app) is gone, but the dust and the marks on the floor (the settings/config files) might still be there.</text:p>
        </text:list-item>
      </text:list>
      <text:p text:style-name="Horizontal_20_Line"/>
      <text:h text:style-name="P1" text:outline-level="2">How I Use It</text:h>
      <text:list text:style-name="L2">
        <text:list-item>
          <text:p text:style-name="P5"><text:span text:style-name="T1">I use </text:span><text:span text:style-name="Source_20_Text"><text:span text:style-name="T2">sudo</text:span></text:span><text:span text:style-name="T1">:</text:span> Just like installing, I need <text:span text:style-name="T1">Boss Mode</text:span> to delete software from the system folders.</text:p>
        </text:list-item>
        <text:list-item>
          <text:p text:style-name="P5"><text:span text:style-name="T1">The Command:</text:span> <text:span text:style-name="Source_20_Text"><text:span text:style-name="T3">sudo apt-get remove gcc</text:span></text:span></text:p>
        </text:list-item>
        <text:list-item>
          <text:p text:style-name="P6"><text:span text:style-name="T1">The Confirmation:</text:span> The terminal will tell me how much disk space will be freed up and ask, "Do you want to continue? [Y/n]". I type <text:span text:style-name="T1">Y</text:span> and hit Enter.</text:p>
        </text:list-item>
      </text:list>
      <text:p text:style-name="Horizontal_20_Line"/>
      <text:h text:style-name="P1" text:outline-level="2">What Stays Behind?</text:h>
      <text:p text:style-name="P7"><text:span text:style-name="T4">It is important for me to remember that </text:span><text:span text:style-name="Source_20_Text"><text:span text:style-name="T5">remove</text:span></text:span><text:span text:style-name="T4"> is "gentle."</text:span></text:p>
      <text:list text:style-name="L3">
        <text:list-item>
          <text:p text:style-name="P8"><text:span text:style-name="T1">It deletes:</text:span> The actual program (the part I run).</text:p>
        </text:list-item>
        <text:list-item>
          <text:p text:style-name="P8"><text:span text:style-name="T1">It keeps:</text:span> My personal settings and "configuration files."</text:p>
        </text:list-item>
        <text:list-item>
          <text:p text:style-name="P9"><text:span text:style-name="T1">Why it does this:</text:span> If I accidentally delete a program and then reinstall it later, all my custom settings and preferences will still be there waiting for me. It’s like a safety net so I don't have to set up the app from scratch again.</text:p>
        </text:list-item>
      </text:list>
      <text:p text:style-name="Horizontal_20_Line"/>
      <text:h text:style-name="P1" text:outline-level="2">The "Clean Up" Pro Tip</text:h>
      <text:p text:style-name="P10">Sometimes, when I remove an app, the "side-dishes" (the <text:span text:style-name="T1">Dependencies</text:span> it downloaded earlier) stay on my computer taking up space. To get rid of those "orphaned" files, I run this:</text:p>
      <text:list text:style-name="L4">
        <text:list-item>
          <text:p text:style-name="P11"><text:span text:style-name="T1">The Command:</text:span> <text:span text:style-name="Source_20_Text"><text:span text:style-name="T3">sudo apt-get autoremove</text:span></text:span></text:p>
        </text:list-item>
        <text:list-item>
          <text:p text:style-name="P12"><text:span text:style-name="T1">What I am doing:</text:span> I am telling my computer to look for any files that were only there to help the app I just deleted. Since the main app is gone, these files are useless, so I delete them too.</text:p>
        </text:list-item>
      </text:list>
      <text:p text:style-name="Horizontal_20_Line"/>
      <text:p text:style-name="P13"><text:soft-page-break/>Summary for my notes:</text:p>
      <text:list text:style-name="L5">
        <text:list-item>
          <text:p text:style-name="P14"><text:span text:style-name="Source_20_Text"><text:span text:style-name="T2">remove</text:span></text:span> = Deletes the program but keeps my settings.</text:p>
        </text:list-item>
        <text:list-item>
          <text:p text:style-name="P15"><text:span text:style-name="Source_20_Text"><text:span text:style-name="T2">autoremove</text:span></text:span> = Cleans up the "extra" files that are no longer needed.</text:p>
        </text:list-item>
      </text:list>
      <text:p text:style-name="P7"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soft-page-break/><text:span text:style-name="T4"/></text:p>
      <text:h text:style-name="P1" text:outline-level="2">The "Total Wipeout" Way: sudo apt-get purge [app]</text:h>
      <text:p text:style-name="P2"/>
      <text:list text:style-name="L6">
        <text:list-item>
          <text:p text:style-name="P17"><text:span text:style-name="T1">The Idea:</text:span> While <text:span text:style-name="Source_20_Text"><text:span text:style-name="T3">remove</text:span></text:span> just deletes the program, <text:span text:style-name="Source_20_Text"><text:span text:style-name="T3">purge</text:span></text:span> deletes the program <text:span text:style-name="T1">and</text:span> all of its custom "rulebooks" (configuration files).</text:p>
        </text:list-item>
        <text:list-item>
          <text:p text:style-name="P17"><text:span text:style-name="T1">The "In Plain English" Definition:</text:span> If <text:span text:style-name="Source_20_Text"><text:span text:style-name="T3">remove</text:span></text:span> is like moving furniture out of a house, <text:span text:style-name="Source_20_Text"><text:span text:style-name="T3">purge</text:span></text:span> is like <text:span text:style-name="T1">tearing down the house and clearing the lot</text:span>. There is nothing left behind for the next time I might want to install it.</text:p>
        </text:list-item>
        <text:list-item>
          <text:p text:style-name="P18"><text:span text:style-name="T1">When I use it:</text:span> I use this if a program is acting "glitchy" or if I made a mistake in the settings and I just want to start over from a completely blank slate.</text:p>
        </text:list-item>
      </text:list>
      <text:p text:style-name="Horizontal_20_Line"/>
      <text:h text:style-name="P1" text:outline-level="2">How I Use It</text:h>
      <text:list text:style-name="L7">
        <text:list-item>
          <text:p text:style-name="P19"><text:span text:style-name="T1">The Command:</text:span> <text:span text:style-name="Source_20_Text"><text:span text:style-name="T3">sudo apt-get purge gcc</text:span></text:span></text:p>
        </text:list-item>
        <text:list-item>
          <text:p text:style-name="P19"><text:span text:style-name="T1">The Result:</text:span> APT will find the program files <text:span text:style-name="T1">and</text:span> the hidden setup files (usually found in folders like <text:span text:style-name="Source_20_Text"><text:span text:style-name="T3">/etc/</text:span></text:span>). It deletes all of them.</text:p>
        </text:list-item>
        <text:list-item>
          <text:p text:style-name="P20"><text:span text:style-name="T1">The Safety Check:</text:span> Just like with <text:span text:style-name="Source_20_Text"><text:span text:style-name="T3">remove</text:span></text:span>, the computer will ask me to confirm before it does the final "cleanup."</text:p>
        </text:list-item>
      </text:list>
      <text:p text:style-name="Horizontal_20_Line"/>
      <text:h text:style-name="P1" text:outline-level="2">The Difference: Remove vs. Purge</text:h>
      <text:list text:style-name="L8">
        <text:list-item>
          <text:p text:style-name="P21"><text:span text:style-name="Source_20_Text"><text:span text:style-name="T2">remove</text:span></text:span>: I keep my custom settings. If I reinstall the app, my "Master Kusandu" greeting or my custom colors will still be there.</text:p>
        </text:list-item>
        <text:list-item>
          <text:p text:style-name="P22"><text:span text:style-name="Source_20_Text"><text:span text:style-name="T2">purge</text:span></text:span>: Everything is gone. If I reinstall the app, it will look exactly like it did the very first time I downloaded it—brand new and untouched.</text:p>
        </text:list-item>
      </text:list>
      <text:p text:style-name="Horizontal_20_Line"/>
      <text:h text:style-name="P1" text:outline-level="2">My "Total System Clean" Workflow</text:h>
      <text:p text:style-name="P10">When I want to be 100% sure I have cleared everything out to save space or fix a bug, I run these two together:</text:p>
      <text:list text:style-name="L9">
        <text:list-item>
          <text:p text:style-name="P23"><text:span text:style-name="Source_20_Text"><text:span text:style-name="T2">sudo apt-get purge [app]</text:span></text:span>: This erases the app and its settings.</text:p>
        </text:list-item>
        <text:list-item>
          <text:p text:style-name="P24"><text:span text:style-name="Source_20_Text"><text:span text:style-name="T2">sudo apt-get autoremove</text:span></text:span>: This erases all the "helper" files that were only there to support the app I just purged.</text:p>
        </text:list-item>
      </text:list>
      <text:p text:style-name="Horizontal_20_Line"/>
      <text:p text:style-name="P13"><text:soft-page-break/>Summary for my notes:</text:p>
      <text:list text:style-name="L10">
        <text:list-item>
          <text:p text:style-name="P25"><text:span text:style-name="Source_20_Text"><text:span text:style-name="T2">purge</text:span></text:span> = Deletes the program + all its settings/configuration files.</text:p>
        </text:list-item>
        <text:list-item>
          <text:p text:style-name="P26"><text:span text:style-name="T1">Use it when</text:span> = I want a "Fresh Start" or to completely clear out a program.</text:p>
        </text:list-item>
      </text:list>
      <text:p text:style-name="P7"><text:span text:style-name="T1"/></text:p>
      <text:p text:style-name="P2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<text:soft-page-break/></text:p>
      <text:h text:style-name="P1" text:outline-level="2">The Command: sudo apt-get autoremove</text:h>
      <text:p text:style-name="P2"/>
      <text:list text:style-name="L11">
        <text:list-item>
          <text:p text:style-name="P29"><text:span text:style-name="T1">The Idea:</text:span> Sometimes, when I install a big program (like GCC), my system automatically downloads several "helper" programs called <text:span text:style-name="T1">Dependencies</text:span> to make it work.</text:p>
        </text:list-item>
        <text:list-item>
          <text:p text:style-name="P29"><text:span text:style-name="T1">The Problem:</text:span> When I later uninstall that big program, those "helpers" often get left behind. They just sit on my hard drive taking up space, even though no other program is using them.</text:p>
        </text:list-item>
        <text:list-item>
          <text:p text:style-name="P29"><text:span text:style-name="T1">What I am doing:</text:span> I am telling the system, "Look for any packages that were installed automatically to help other apps, but are now orphaned and lonely because the main app is gone."</text:p>
        </text:list-item>
        <text:list-item>
          <text:p text:style-name="P30"><text:span text:style-name="T1">The "In Plain English" Definition:</text:span> It’s like a <text:span text:style-name="T1">Cleanup Crew</text:span>. If I hire a band to play a party, they bring their own speakers and cables. When the band leaves (I uninstall the app), I use <text:span text:style-name="Source_20_Text"><text:span text:style-name="T3">autoremove</text:span></text:span> to make sure the speakers and cables aren't left cluttering up my living room.</text:p>
        </text:list-item>
      </text:list>
      <text:p text:style-name="Horizontal_20_Line"/>
      <text:h text:style-name="P1" text:outline-level="2">How I Use It</text:h>
      <text:list text:style-name="L12">
        <text:list-item>
          <text:p text:style-name="P31"><text:span text:style-name="T1">The Command:</text:span> <text:span text:style-name="Source_20_Text"><text:span text:style-name="T3">sudo apt-get autoremove</text:span></text:span></text:p>
        </text:list-item>
        <text:list-item>
          <text:p text:style-name="P32"><text:span text:style-name="T1">No App Name Needed:</text:span> Notice that I don't usually type an app name after it. I just run the command by itself, and APT scans the whole system for me.</text:p>
        </text:list-item>
        <text:list-item>
          <text:p text:style-name="P33"><text:span text:style-name="T1">The Result:</text:span> It lists all the "orphaned" files it found and asks me for permission to delete them all at once.</text:p>
        </text:list-item>
      </text:list>
      <text:p text:style-name="Horizontal_20_Line"/>
      <text:h text:style-name="P1" text:outline-level="2">Why This is Important</text:h>
      <text:list text:style-name="L13">
        <text:list-item>
          <text:p text:style-name="P34"><text:span text:style-name="T1">Saving Space:</text:span> Over time, these "helper" files can add up to hundreds of megabytes or even gigabytes of wasted space.</text:p>
        </text:list-item>
        <text:list-item>
          <text:p text:style-name="P34"><text:span text:style-name="T1">Keeping it Fast:</text:span> A cleaner system is generally a faster, more organized system.</text:p>
        </text:list-item>
        <text:list-item>
          <text:p text:style-name="P35"><text:span text:style-name="T1">Safe to Use:</text:span> APT is very smart. It will <text:span text:style-name="T1">not</text:span> delete a helper file if another program on my computer still needs it.</text:p>
        </text:list-item>
      </text:list>
      <text:p text:style-name="Horizontal_20_Line"/>
      <text:h text:style-name="P1" text:outline-level="2">My "Full Uninstall" Routine</text:h>
      <text:p text:style-name="P10">For my notes, this is the perfect 3-step sequence I use whenever I want to get rid of something properly:</text:p>
      <text:list text:style-name="L14">
        <text:list-item>
          <text:p text:style-name="P36"><text:span text:style-name="Source_20_Text"><text:span text:style-name="T2">sudo apt-get purge [app]</text:span></text:span> (Kill the app and its settings).</text:p>
        </text:list-item>
        <text:list-item>
          <text:p text:style-name="P36"><text:span text:style-name="Source_20_Text"><text:span text:style-name="T2">sudo apt-get autoremove</text:span></text:span> (Kill the abandoned helpers).</text:p>
        </text:list-item>
        <text:list-item>
          <text:p text:style-name="P37"><text:soft-page-break/><text:span text:style-name="Source_20_Text"><text:span text:style-name="T2">sudo apt-get clean</text:span></text:span> (Clear out the downloaded installer files from the <text:span text:style-name="T1">Cache</text:span>).</text:p>
        </text:list-item>
      </text:list>
      <text:p text:style-name="Horizontal_20_Line"/>
      <text:p text:style-name="P13">Summary for my notes:</text:p>
      <text:list text:style-name="L15">
        <text:list-item>
          <text:p text:style-name="P38"><text:span text:style-name="Source_20_Text"><text:span text:style-name="T2">autoremove</text:span></text:span> = Deletes "orphaned" helper files that no other program is using.</text:p>
        </text:list-item>
        <text:list-item>
          <text:p text:style-name="P39"><text:span text:style-name="T1">Benefit</text:span> = Keeps my hard drive lean and clean.</text:p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<text:span text:style-name="T4"><text:s/></text:span><text:span text:style-name="T6">The Command: sudo apt-get clean</text:span></text:p>
      <text:list text:style-name="L16">
        <text:list-item>
          <text:p text:style-name="P42"><text:span text:style-name="T1">The Idea:</text:span> Whenever I download an app using <text:span text:style-name="Source_20_Text"><text:span text:style-name="T3">apt-get install</text:span></text:span>, Linux doesn't just install it and forget it. It keeps a copy of the <text:span text:style-name="T1">installer file</text:span> (called a <text:span text:style-name="Source_20_Text"><text:span text:style-name="T3">.deb</text:span></text:span> file) in a special folder on my hard drive (usually <text:span text:style-name="Source_20_Text"><text:span text:style-name="T3">/var/cache/apt/archives/</text:span></text:span>).</text:p>
        </text:list-item>
        <text:list-item>
          <text:p text:style-name="P43"><text:span text:style-name="T1">The Problem:</text:span> Once the app is installed, I don't really need that installer file anymore. If I install 100 apps, I have 100 useless "setup" files sitting in my Cache taking up room.</text:p>
        </text:list-item>
        <text:list-item>
          <text:p text:style-name="P43"><text:span text:style-name="T1">What I am doing:</text:span> I am telling the system to "Empty the folder where you keep all those old installer files."</text:p>
        </text:list-item>
        <text:list-item>
          <text:p text:style-name="P44"><text:span text:style-name="T1">The "In Plain English" Definition:</text:span> Think of it like <text:span text:style-name="T1">throwing away the cardboard box</text:span> after I’ve already unpacked and set up my new TV. I have the TV (the app), so I don't need the box (the installer) taking up space in my hallway.</text:p>
        </text:list-item>
      </text:list>
      <text:p text:style-name="P45"/>
      <text:h text:style-name="P46" text:outline-level="2">How I Use It</text:h>
      <text:list text:style-name="L17">
        <text:list-item>
          <text:p text:style-name="P47"><text:span text:style-name="T1">The Command:</text:span> <text:span text:style-name="Source_20_Text"><text:span text:style-name="T3">sudo apt-get clean</text:span></text:span></text:p>
        </text:list-item>
        <text:list-item>
          <text:p text:style-name="P47"><text:span text:style-name="T1">The Result:</text:span> Unlike other commands, this one is usually "silent." It doesn't ask me questions or show a progress bar; it just quickly deletes all the cached <text:span text:style-name="Source_20_Text"><text:span text:style-name="T3">.deb</text:span></text:span> files.</text:p>
        </text:list-item>
        <text:list-item>
          <text:p text:style-name="P48"><text:span text:style-name="T1">Why it's Safe:</text:span> This command <text:span text:style-name="T1">never</text:span> deletes my actual programs or my settings. It only deletes the "packages" used to <text:span text:style-name="Emphasis"><text:span text:style-name="T7">install</text:span></text:span> them. If I ever want to reinstall an app, the system will just download it again from the Software Repository.</text:p>
        </text:list-item>
      </text:list>
      <text:p text:style-name="P45"/>
      <text:h text:style-name="P46" text:outline-level="2">The Difference: autoremove vs. clean</text:h>
      <text:list text:style-name="L18">
        <text:list-item>
          <text:p text:style-name="P49"><text:span text:style-name="Source_20_Text"><text:span text:style-name="T2">autoremove</text:span></text:span>: Deletes <text:span text:style-name="T1">Helper Programs</text:span> that are currently installed but no longer used.</text:p>
        </text:list-item>
        <text:list-item>
          <text:p text:style-name="P50"><text:span text:style-name="Source_20_Text"><text:span text:style-name="T2">clean</text:span></text:span>: Deletes <text:span text:style-name="T1">Installer Files</text:span> that are just sitting in a storage folder.</text:p>
        </text:list-item>
      </text:list>
      <text:p text:style-name="P45"/>
      <text:h text:style-name="P46" text:outline-level="2"><text:soft-page-break/>My "Disk Space Rescue" Checklist</text:h>
      <text:p text:style-name="P10">If I ever see a warning that my "Disk is Full," I run these three in this exact order:</text:p>
      <text:list text:style-name="L19">
        <text:list-item>
          <text:p text:style-name="P51"><text:span text:style-name="Source_20_Text"><text:span text:style-name="T2">sudo apt-get autoremove</text:span></text:span> (Remove unused helpers).</text:p>
        </text:list-item>
        <text:list-item>
          <text:p text:style-name="P51"><text:span text:style-name="Source_20_Text"><text:span text:style-name="T2">sudo apt-get clean</text:span></text:span> (Remove the "cardboard boxes").</text:p>
        </text:list-item>
        <text:list-item>
          <text:p text:style-name="P52"><text:span text:style-name="Source_20_Text"><text:span text:style-name="T2">df -h</text:span></text:span> (Check how much space I just won back).</text:p>
        </text:list-item>
      </text:list>
      <text:p text:style-name="P45"/>
      <text:p text:style-name="P13">Summary for my notes:</text:p>
      <text:list text:style-name="L20">
        <text:list-item>
          <text:p text:style-name="P53"><text:span text:style-name="Source_20_Text"><text:span text:style-name="T2">clean</text:span></text:span> = Deletes old installer files from the local cache.</text:p>
        </text:list-item>
        <text:list-item>
          <text:p text:style-name="P54"><text:span text:style-name="T1">Benefit</text:span> = This is the fastest way to free up a lot of space if I haven't done it in a long time.</text:p>
        </text:list-item>
      </text:list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h text:style-name="P57" text:outline-level="2"><text:soft-page-break/>The Command: sudo apt-get autoclean</text:h>
      <text:list text:style-name="L21">
        <text:list-item>
          <text:p text:style-name="P58"><text:span text:style-name="T1">The Idea:</text:span> Just like <text:span text:style-name="Source_20_Text"><text:span text:style-name="T3">clean</text:span></text:span>, this command looks at my folder of old installer files (<text:span text:style-name="Source_20_Text"><text:span text:style-name="T3">.deb</text:span></text:span> files). However, instead of deleting <text:span text:style-name="T1">all</text:span> of them, it only deletes the ones that are <text:span text:style-name="T1">obsolete</text:span>.</text:p>
        </text:list-item>
        <text:list-item>
          <text:p text:style-name="P59"><text:span text:style-name="T1">What I am doing:</text:span> I am telling the system, "Look at my pile of installers. If there is a newer version of that app in the warehouse now, delete the old installer because I’ll never need it again."</text:p>
        </text:list-item>
        <text:list-item>
          <text:p text:style-name="P60"><text:span text:style-name="T1">The "In Plain English" Definition:</text:span> Imagine I have a collection of <text:span text:style-name="T1">old phone catalogs</text:span>. <text:span text:style-name="Source_20_Text"><text:span text:style-name="T3">clean</text:span></text:span> would throw them all in the trash. <text:span text:style-name="Source_20_Text"><text:span text:style-name="T3">autoclean</text:span></text:span> only throws away the <text:span text:style-name="T1">expired</text:span> ones from last year but keeps the one from this month just in case I need to look at it again.</text:p>
        </text:list-item>
      </text:list>
      <text:p text:style-name="P61"/>
      <text:h text:style-name="P57" text:outline-level="2">How it works (The Logic)</text:h>
      <text:list text:style-name="L22">
        <text:list-item>
          <text:p text:style-name="P62"><text:span text:style-name="T1">The Check:</text:span> APT checks the Software Repositories to see what the current version of an app is.</text:p>
        </text:list-item>
        <text:list-item>
          <text:p text:style-name="P63"><text:span text:style-name="T1">The Match:</text:span> If I have an installer for <text:span text:style-name="Source_20_Text"><text:span text:style-name="T3">gcc version 9</text:span></text:span> in my cache, but the warehouse now says <text:span text:style-name="Source_20_Text"><text:span text:style-name="T3">gcc version 10</text:span></text:span> is the standard, <text:span text:style-name="Source_20_Text"><text:span text:style-name="T3">autoclean</text:span></text:span> decides version 9 is useless and deletes it.</text:p>
        </text:list-item>
        <text:list-item>
          <text:p text:style-name="P64"><text:span text:style-name="T1">The Keeper:</text:span> If I have the installer for the <text:span text:style-name="Emphasis"><text:span text:style-name="T7">current</text:span></text:span> version, it keeps it so I can reinstall it quickly without using the internet.</text:p>
        </text:list-item>
      </text:list>
      <text:p text:style-name="P61"/>
      <text:h text:style-name="P57" text:outline-level="2">Clean vs. Autoclean: Which one do I use?</text:h>
      <text:list text:style-name="L23">
        <text:list-item>
          <text:p text:style-name="P65"><text:span text:style-name="T1">Use </text:span><text:span text:style-name="Source_20_Text"><text:span text:style-name="T2">autoclean</text:span></text:span><text:span text:style-name="T1">:</text:span> If I have a <text:span text:style-name="T1">slow internet connection</text:span>. It keeps the useful installers so I don't have to download them again if something breaks, but it still gets rid of the "junk" I’ll definitely never use.</text:p>
        </text:list-item>
        <text:list-item>
          <text:p text:style-name="P66"><text:span text:style-name="T1">Use </text:span><text:span text:style-name="Source_20_Text"><text:span text:style-name="T2">clean</text:span></text:span><text:span text:style-name="T1">:</text:span> If I have <text:span text:style-name="T1">very little disk space</text:span> and I don't mind downloading things again later. It’s the "scorched earth" approach—it clears out everything.</text:p>
        </text:list-item>
      </text:list>
      <text:p text:style-name="P61"/>
      <text:h text:style-name="P57" text:outline-level="2"><text:soft-page-break/>Summary for my notes</text:h>
      <text:list text:style-name="L24">
        <text:list-item>
          <text:p text:style-name="P67"><text:span text:style-name="Source_20_Text"><text:span text:style-name="T2">autoclean</text:span></text:span> = Only deletes the installers for <text:span text:style-name="T1">old, outdated versions</text:span> of programs.</text:p>
        </text:list-item>
        <text:list-item>
          <text:p text:style-name="P68"><text:span text:style-name="T1">The Benefit</text:span> = It saves some space while keeping a "safety copy" of my current apps' installers.</text:p>
        </text:list-item>
      </text:list>
      <text:p text:style-name="P7"><text:span text:style-name="T4"/></text:p>
      <text:p text:style-name="P55"/>
      <text:p text:style-name="P7"><text:span text:style-name="T4"/></text:p>
      <text:p text:style-name="P69"/>
      <text:p text:style-name="P70"/>
      <text:p text:style-name="P27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1T13:46:44.619658259</meta:creation-date>
    <meta:generator>LibreOffice/25.2.3.2$Linux_X86_64 LibreOffice_project/520$Build-2</meta:generator>
    <dc:date>2026-05-11T13:56:51.623789597</dc:date>
    <meta:editing-duration>PT10M5S</meta:editing-duration>
    <meta:editing-cycles>6</meta:editing-cycles>
    <meta:document-statistic meta:table-count="0" meta:image-count="0" meta:object-count="0" meta:page-count="10" meta:paragraph-count="93" meta:word-count="1683" meta:character-count="8983" meta:non-whitespace-character-count="7458"/>
  </office:meta>
</office:document-meta>
</file>