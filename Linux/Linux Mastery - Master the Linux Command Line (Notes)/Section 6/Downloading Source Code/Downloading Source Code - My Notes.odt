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Heading_20_2">
      <style:paragraph-properties fo:margin-left="0in" fo:margin-right="0in" fo:margin-top="0.1665in" fo:margin-bottom="0.1665in" style:contextual-spacing="false" fo:text-indent="0in" style:auto-text-indent="false"/>
      <style:text-properties fo:font-weight="bold"/>
    </style:style>
    <style:style style:name="P3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normal"/>
    </style:style>
    <style:style style:name="P4" style:family="paragraph" style:parent-style-name="Text_20_body" style:list-style-name="L1">
      <style:paragraph-properties fo:margin-left="0in" fo:margin-right="0in" fo:margin-top="0.1665in" fo:margin-bottom="0in" style:contextual-spacing="false" fo:text-indent="0in" style:auto-text-indent="false"/>
    </style:style>
    <style:style style:name="P5" style:family="paragraph" style:parent-style-name="Text_20_body" style:list-style-name="L1">
      <style:paragraph-properties fo:margin-left="0in" fo:margin-right="0in" fo:margin-top="0.1665in" fo:margin-bottom="0.1965in" style:contextual-spacing="false" fo:text-indent="0in" style:auto-text-indent="false"/>
    </style:style>
    <style:style style:name="P6" style:family="paragraph" style:parent-style-name="Horizontal_20_Line">
      <style:paragraph-properties fo:margin-top="0.1665in" fo:margin-bottom="0.1665in" style:contextual-spacing="false"/>
    </style:style>
    <style:style style:name="P7" style:family="paragraph" style:parent-style-name="Heading_20_2">
      <style:paragraph-properties fo:margin-left="0in" fo:margin-right="0in" fo:margin-top="0.1665in" fo:margin-bottom="0.1665in" style:contextual-spacing="false" fo:text-indent="0in" style:auto-text-indent="false" style:writing-mode="lr-tb"/>
      <style:text-properties fo:font-weight="normal"/>
    </style:style>
    <style:style style:name="P8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</style:style>
    <style:style style:name="P9" style:family="paragraph" style:parent-style-name="Text_20_body" style:list-style-name="L2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10" style:family="paragraph" style:parent-style-name="Text_20_body" style:list-style-name="L2">
      <style:paragraph-properties fo:margin-left="0in" fo:margin-right="0in" fo:margin-top="0.1665in" fo:margin-bottom="0.1965in" style:contextual-spacing="false" fo:text-indent="0in" style:auto-text-indent="false" style:writing-mode="lr-tb"/>
    </style:style>
    <style:style style:name="P11" style:family="paragraph" style:parent-style-name="Heading_20_2">
      <style:paragraph-properties fo:margin-left="0in" fo:margin-right="0in" fo:margin-top="0.1665in" fo:margin-bottom="0.1665in" style:contextual-spacing="false" fo:text-indent="0in" style:auto-text-indent="false"/>
      <style:text-properties fo:font-size="15pt" fo:font-weight="bold"/>
    </style:style>
    <style:style style:name="P12" style:family="paragraph" style:parent-style-name="Text_20_body" style:list-style-name="L3">
      <style:paragraph-properties fo:margin-left="0in" fo:margin-right="0in" fo:margin-top="0.1665in" fo:margin-bottom="0in" style:contextual-spacing="false" fo:text-indent="0in" style:auto-text-indent="false"/>
    </style:style>
    <style:style style:name="P13" style:family="paragraph" style:parent-style-name="Text_20_body" style:list-style-name="L3">
      <style:paragraph-properties fo:margin-left="0in" fo:margin-right="0in" fo:margin-top="0.1665in" fo:margin-bottom="0.1965in" style:contextual-spacing="false" fo:text-indent="0in" style:auto-text-indent="false"/>
    </style:style>
    <style:style style:name="P14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bold"/>
    </style:style>
    <style:style style:name="P15" style:family="paragraph" style:parent-style-name="Text_20_body" style:list-style-name="L4">
      <style:paragraph-properties fo:margin-left="0in" fo:margin-right="0in" fo:margin-top="0.1665in" fo:margin-bottom="0in" style:contextual-spacing="false" fo:text-indent="0in" style:auto-text-indent="false"/>
    </style:style>
    <style:style style:name="P16" style:family="paragraph" style:parent-style-name="Text_20_body" style:list-style-name="L4">
      <style:paragraph-properties fo:margin-left="0in" fo:margin-right="0in" fo:margin-top="0.1665in" fo:margin-bottom="0.1965in" style:contextual-spacing="false" fo:text-indent="0in" style:auto-text-indent="false"/>
    </style:style>
    <style:style style:name="P17" style:family="paragraph" style:parent-style-name="Text_20_body">
      <style:paragraph-properties fo:margin-top="0.1665in" fo:margin-bottom="0in" style:contextual-spacing="false"/>
    </style:style>
    <style:style style:name="P18" style:family="paragraph" style:parent-style-name="Standard">
      <style:paragraph-properties fo:margin-left="0.1665in" fo:margin-right="0.1665in" fo:margin-top="0.1665in" fo:margin-bottom="0.1665in" style:contextual-spacing="false" fo:text-indent="0in" style:auto-text-indent="false"/>
      <style:text-properties fo:font-weight="normal"/>
    </style:style>
    <style:style style:name="P19" style:family="paragraph" style:parent-style-name="Heading_20_2">
      <style:paragraph-properties fo:margin-left="0in" fo:margin-right="0in" fo:text-indent="0in" style:auto-text-indent="false"/>
      <style:text-properties fo:font-size="15pt" fo:font-weight="bold"/>
    </style:style>
    <style:style style:name="P20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21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22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23" style:family="paragraph" style:parent-style-name="Text_20_body" style:list-style-name="L6">
      <style:paragraph-properties fo:margin-left="0in" fo:margin-right="0in" fo:text-indent="0in" style:auto-text-indent="false"/>
    </style:style>
    <style:style style:name="P24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25" style:family="paragraph" style:parent-style-name="Text_20_body" style:list-style-name="L7">
      <style:paragraph-properties fo:margin-left="0in" fo:margin-right="0in" fo:text-indent="0in" style:auto-text-indent="false"/>
    </style:style>
    <style:style style:name="P26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27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/>
    </style:style>
    <style:style style:name="P28" style:family="paragraph" style:parent-style-name="Text_20_body" style:list-style-name="L8">
      <style:paragraph-properties fo:margin-left="0in" fo:margin-right="0in" fo:text-indent="0in" style:auto-text-indent="false"/>
    </style:style>
    <style:style style:name="P29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/>
    </style:style>
    <style:style style:name="P30" style:family="paragraph" style:parent-style-name="Text_20_body" style:list-style-name="L9">
      <style:paragraph-properties fo:margin-left="0in" fo:margin-right="0in" fo:text-indent="0in" style:auto-text-indent="false"/>
    </style:style>
    <style:style style:name="P31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32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33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fo:font-size="15pt"/>
    </style:style>
    <style:style style:name="T2" style:family="text">
      <style:text-properties fo:font-weight="bold"/>
    </style:style>
    <style:style style:name="T3" style:family="text">
      <style:text-properties fo:font-size="15pt" fo:font-weight="bold"/>
    </style:style>
    <style:style style:name="T4" style:family="text">
      <style:text-properties fo:font-size="15pt" fo:font-weight="bold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5" style:family="text">
      <style:text-properties fo:font-weight="normal"/>
    </style:style>
    <style:style style:name="T6" style:family="text">
      <style:text-properties fo:font-weight="normal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7" style:family="text">
      <style:text-properties fo:font-weight="bold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8" style:family="text">
      <style:text-properties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9" style:family="text">
      <style:text-properties officeooo:rsid="0014031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2"><text:span text:style-name="T1">What is Source Code? (The Recipe)</text:span></text:h>
      <text:p text:style-name="P3">When a programmer creates an app, they don't write in 1s and 0s (the language of the computer). They write in a language that looks a lot like English, such as <text:span text:style-name="T2">C</text:span>, <text:span text:style-name="T2">C++</text:span>, or <text:span text:style-name="T2">Python</text:span>. This text that they write is the <text:span text:style-name="T2">Source Code</text:span>.</text:p>
      <text:list text:style-name="L1">
        <text:list-item>
          <text:p text:style-name="P4"><text:span text:style-name="T2">The Problem:</text:span> I can read Source Code, but my computer's CPU cannot.</text:p>
        </text:list-item>
        <text:list-item>
          <text:p text:style-name="P4"><text:span text:style-name="T2">The Solution:</text:span> I use a <text:span text:style-name="T2">Compiler</text:span> (like GCC) to translate that Source Code into a "Binary" file (the 1s and 0s) that the computer can actually run.</text:p>
        </text:list-item>
        <text:list-item>
          <text:p text:style-name="P5"><text:span text:style-name="T2">The "In Plain English" Definition:</text:span> Source Code is the <text:span text:style-name="T2">Original Script</text:span> of a play. The audience (the computer) doesn't read the script; they see the performance (the running program).</text:p>
        </text:list-item>
      </text:list>
      <text:p text:style-name="P6"/>
      <text:h text:style-name="P7" text:outline-level="2"><text:span text:style-name="T3">A Real-World Example (The </text:span><text:span text:style-name="Source_20_Text"><text:span text:style-name="T4">ls</text:span></text:span><text:span text:style-name="T3"> command)</text:span></text:h>
      <text:p text:style-name="P8"><text:span text:style-name="T5">I have already worked with source code when I edited </text:span><text:span text:style-name="Source_20_Text"><text:span text:style-name="T6">ls.c</text:span></text:span><text:span text:style-name="T5">.</text:span></text:p>
      <text:list text:style-name="L2">
        <text:list-item>
          <text:p text:style-name="P9"><text:span text:style-name="T2">The Source Code (</text:span><text:span text:style-name="Source_20_Text"><text:span text:style-name="T7">ls.c</text:span></text:span><text:span text:style-name="T2">):</text:span> This was the text file where I wrote <text:span text:style-name="Source_20_Text"><text:span text:style-name="T8">printf("Good morning, Master Kusandu");</text:span></text:span>. I could read it and change it.</text:p>
        </text:list-item>
        <text:list-item>
          <text:p text:style-name="P9"><text:span text:style-name="T2">The Compilation (</text:span><text:span text:style-name="Source_20_Text"><text:span text:style-name="T7">make</text:span></text:span><text:span text:style-name="T2">):</text:span> I turned that text into a file the computer understands.</text:p>
        </text:list-item>
        <text:list-item>
          <text:p text:style-name="P10"><text:span text:style-name="T2">The Executable (</text:span><text:span text:style-name="Source_20_Text"><text:span text:style-name="T7">ls</text:span></text:span><text:span text:style-name="T2">):</text:span> This is the finished product. If I try to open this file with a text editor, it looks like gibberish because it’s no longer "Source Code"; it’s now "Machine Code."</text:p>
        </text:list-item>
      </text:list>
      <text:p text:style-name="P6"/>
      <text:h text:style-name="P11" text:outline-level="2">Why Source Code is So Important in Linux</text:h>
      <text:p text:style-name="P3">In the world of Free Software, having the Source Code is what gives me my <text:span text:style-name="T2">Freedom</text:span>:</text:p>
      <text:list text:style-name="L3">
        <text:list-item>
          <text:p text:style-name="P12"><text:soft-page-break/><text:span text:style-name="T2">Freedom to Study:</text:span> I can open the source code to see exactly how the program works. No secrets!</text:p>
        </text:list-item>
        <text:list-item>
          <text:p text:style-name="P12"><text:span text:style-name="T2">Freedom to Change:</text:span> If I don't like how a program works (or if I want it to say "Master Kusandu"), I can change the source code and rebuild it.</text:p>
        </text:list-item>
        <text:list-item>
          <text:p text:style-name="P13"><text:span text:style-name="T2">Freedom to Fix:</text:span> If there is a bug (a mistake) in the code, I don't have to wait for a company to fix it. I can find the line of code that is broken and fix it myself.</text:p>
        </text:list-item>
      </text:list>
      <text:p text:style-name="P6"/>
      <text:p text:style-name="P14">Summary for my notes:</text:p>
      <text:list text:style-name="L4">
        <text:list-item>
          <text:p text:style-name="P15"><text:span text:style-name="T2">Source Code</text:span> = The human-readable text written by programmers.</text:p>
        </text:list-item>
        <text:list-item>
          <text:p text:style-name="P15"><text:span text:style-name="T2">Binary/Executable</text:span> = The version the computer runs (which humans can't read).</text:p>
        </text:list-item>
        <text:list-item>
          <text:p text:style-name="P16"><text:span text:style-name="T2">Compiler</text:span> = The tool that turns Source Code into a working program.</text:p>
        </text:list-item>
      </text:list>
      <text:p text:style-name="P8"><text:span text:style-name="T2">Should I explain the </text:span><text:span text:style-name="Source_20_Text"><text:span text:style-name="T7">sudo apt-get build-dep</text:span></text:span><text:span text:style-name="T2"> command next?</text:span><text:span text:style-name="T5"> It is a "magic" command that automatically finds and installs every tool I need to turn a specific piece of </text:span><text:span text:style-name="T2">Source Code</text:span><text:span text:style-name="T5"> into a finished program.</text:span></text:p>
      <text:p text:style-name="P17"/>
      <text:p text:style-name="P18"/>
      <text:p text:style-name="P18"/>
      <text:p text:style-name="P18"/>
      <text:p text:style-name="P18"/>
      <text:p text:style-name="P18"/>
      <text:p text:style-name="P18"><text:span text:style-name="T9">T</text:span>he <text:span text:style-name="T2">Official Debian/Ubuntu Source Code</text:span> directly through the package manager.</text:p>
      <text:p text:style-name="P18">This is the "pro way" because it gives me the exact code the Linux developers used to build the app I'm already using.</text:p>
      <text:p text:style-name="P18"><text:soft-page-break/>Here is the breakdown of my process for my notes:</text:p>
      <text:h text:style-name="P19" text:outline-level="2">The "Official" Way I Download Source Code</text:h>
      <text:p text:style-name="P3"><text:span text:style-name="T2">1. Enabling the "Source Code" Warehouses</text:span><text:line-break/>By default, my computer only looks for "Ready-to-Run" programs. I have to tell it I want the "Recipes" (Source Code) too.</text:p>
      <text:list text:style-name="L5">
        <text:list-item>
          <text:p text:style-name="P20"><text:span text:style-name="T2">The Action:</text:span> I run <text:span text:style-name="Source_20_Text"><text:span text:style-name="T8">sudo nano /etc/apt/sources.list</text:span></text:span>.</text:p>
        </text:list-item>
        <text:list-item>
          <text:p text:style-name="P20"><text:span text:style-name="T2">What I am doing:</text:span> I am opening the "Address Book" of all software warehouses. I look for lines that start with <text:span text:style-name="Source_20_Text"><text:span text:style-name="T8"># deb-src</text:span></text:span> and <text:span text:style-name="T2">remove the </text:span><text:span text:style-name="Source_20_Text"><text:span text:style-name="T7">#</text:span></text:span><text:span text:style-name="T2"> symbol</text:span>.</text:p>
        </text:list-item>
        <text:list-item>
          <text:p text:style-name="P21"><text:span text:style-name="T2">The "In Plain English" Definition:</text:span> The <text:span text:style-name="Source_20_Text"><text:span text:style-name="T8">#</text:span></text:span> is a "comment" tag that tells the computer to ignore that line. By removing it, I am "uncommenting" the line and telling my system: "Yes, I want you to visit the Source Code warehouse too."</text:p>
        </text:list-item>
      </text:list>
      <text:p text:style-name="P14">2. Updating the Catalog</text:p>
      <text:list text:style-name="L6">
        <text:list-item>
          <text:p text:style-name="P22"><text:span text:style-name="T2">The Command:</text:span> <text:span text:style-name="Source_20_Text"><text:span text:style-name="T8">sudo apt-get update</text:span></text:span></text:p>
        </text:list-item>
        <text:list-item>
          <text:p text:style-name="P23"><text:span text:style-name="T2">Why I do this:</text:span> Since I just added new "warehouses" to my address book, I need to refresh my <text:span text:style-name="T2">Cache</text:span> (catalog) so my computer knows what source code is now available to download.</text:p>
        </text:list-item>
      </text:list>
      <text:p text:style-name="P14">3. Installing the "Builder" Tools</text:p>
      <text:list text:style-name="L7">
        <text:list-item>
          <text:p text:style-name="P24"><text:span text:style-name="T2">The Command:</text:span> <text:span text:style-name="Source_20_Text"><text:span text:style-name="T8">sudo apt-get install dpkg-dev</text:span></text:span></text:p>
        </text:list-item>
        <text:list-item>
          <text:p text:style-name="P24"><text:span text:style-name="T2">What I am doing:</text:span> I am installing a special toolkit (<text:span text:style-name="Source_20_Text"><text:span text:style-name="T8">dpkg-dev</text:span></text:span>) that helps Linux handle source packages. Without this, my computer wouldn't know how to "unpack" the source code correctly.</text:p>
        </text:list-item>
        <text:list-item>
          <text:p text:style-name="P25"><text:span text:style-name="T2">Analogy:</text:span> I am buying the specialized measuring cups and thermometers I need to follow a professional chef's recipe.</text:p>
        </text:list-item>
      </text:list>
      <text:p text:style-name="P14">4. Downloading the Source</text:p>
      <text:list text:style-name="L8">
        <text:list-item>
          <text:p text:style-name="P26"><text:span text:style-name="T2">The Command:</text:span> <text:span text:style-name="Source_20_Text"><text:span text:style-name="T8">sudo apt-get source [package_name]</text:span></text:span></text:p>
        </text:list-item>
        <text:list-item>
          <text:p text:style-name="P27"><text:span text:style-name="T2">What I am doing:</text:span> This is the magic command. It doesn't install the app; it downloads the <text:span text:style-name="T2">source code folder</text:span> to my current directory.</text:p>
        </text:list-item>
        <text:list-item>
          <text:p text:style-name="P28"><text:span text:style-name="T2">The Result:</text:span> I get a folder that contains the actual C files, the Debian rules, and the Makefile I need to study or modify it.</text:p>
        </text:list-item>
      </text:list>
      <text:p text:style-name="Horizontal_20_Line"/>
      <text:h text:style-name="P19" text:outline-level="2"><text:soft-page-break/>Why I prefer this way</text:h>
      <text:list text:style-name="L9">
        <text:list-item>
          <text:p text:style-name="P29"><text:span text:style-name="T2">It’s Clean:</text:span> I don't have to go to a website and wonder if I’m downloading the right version. I am getting the <text:span text:style-name="T2">exact</text:span> version that matches my system.</text:p>
        </text:list-item>
        <text:list-item>
          <text:p text:style-name="P29"><text:span text:style-name="T2">Security:</text:span> This code is signed and verified by the official Linux maintainers.</text:p>
        </text:list-item>
        <text:list-item>
          <text:p text:style-name="P30"><text:span text:style-name="T2">Ready to Build:</text:span> These packages come with all the "recipes" (configurations) already set up for my specific version of Linux.</text:p>
        </text:list-item>
      </text:list>
      <text:p text:style-name="P14">Summary for my notes:</text:p>
      <text:list text:style-name="L10">
        <text:list-item>
          <text:p text:style-name="P31"><text:span text:style-name="T2">Edit </text:span><text:span text:style-name="Source_20_Text"><text:span text:style-name="T7">sources.list</text:span></text:span> = Tell the system where the "recipes" are.</text:p>
        </text:list-item>
        <text:list-item>
          <text:p text:style-name="P31"><text:span text:style-name="Source_20_Text"><text:span text:style-name="T7">update</text:span></text:span> = Refresh the catalog with the new locations.</text:p>
        </text:list-item>
        <text:list-item>
          <text:p text:style-name="P31"><text:span text:style-name="Source_20_Text"><text:span text:style-name="T7">dpkg-dev</text:span></text:span> = Get the tools to handle the recipe files.</text:p>
        </text:list-item>
        <text:list-item>
          <text:p text:style-name="P32"><text:span text:style-name="Source_20_Text"><text:span text:style-name="T7">apt-get source</text:span></text:span> = Download the actual "ingredients" to my folder.</text:p>
        </text:list-item>
      </text:list>
      <text:p text:style-name="P8"><text:span text:style-name="T2"/></text:p>
      <text:p text:style-name="P33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1T13:30:46.406902388</meta:creation-date>
    <dc:date>2026-05-11T13:39:42.277733234</dc:date>
    <meta:editing-duration>PT8M56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4" meta:paragraph-count="48" meta:word-count="836" meta:character-count="4548" meta:non-whitespace-character-count="3790"/>
  </office:meta>
</office:document-meta>
</file>