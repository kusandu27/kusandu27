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0972in" style:contextual-spacing="false" fo:line-height="115%" fo:text-indent="0in" style:auto-text-indent="false"/>
      <style:text-properties fo:font-weight="bold"/>
    </style:style>
    <style:style style:name="P2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size="15pt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fo:font-size="15pt" fo:font-weight="bold"/>
    </style:style>
    <style:style style:name="P4" style:family="paragraph" style:parent-style-name="Text_20_body" style:list-style-name="L1">
      <style:paragraph-properties fo:margin-left="0in" fo:margin-right="0in" fo:text-indent="0in" style:auto-text-indent="false"/>
      <style:text-properties fo:font-size="15pt" fo:font-weight="bold"/>
    </style:style>
    <style:style style:name="P5" style:family="paragraph" style:parent-style-name="Heading_20_2">
      <style:paragraph-properties fo:margin-left="0in" fo:margin-right="0in" fo:margin-top="0in" fo:margin-bottom="0.0972in" style:contextual-spacing="false" fo:line-height="115%" fo:text-indent="0in" style:auto-text-indent="false"/>
      <style:text-properties fo:font-size="15pt" fo:font-weight="bold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fo:font-size="15pt" fo:font-weight="bold"/>
    </style:style>
    <style:style style:name="P7" style:family="paragraph" style:parent-style-name="Text_20_body" style:list-style-name="L2">
      <style:paragraph-properties fo:margin-left="0in" fo:margin-right="0in" fo:text-indent="0in" style:auto-text-indent="false"/>
      <style:text-properties fo:font-size="15pt" fo:font-weight="bold"/>
    </style:style>
    <style:style style:name="P8" style:family="paragraph" style:parent-style-name="Horizontal_20_Line">
      <style:paragraph-properties fo:margin-top="0in" fo:margin-bottom="0.0972in" style:contextual-spacing="false" fo:line-height="115%"/>
      <style:text-properties fo:font-size="15pt" fo:font-weight="bold"/>
    </style:style>
    <style:style style:name="P9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size="15pt" fo:font-weight="bold"/>
    </style:style>
    <style:style style:name="P10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  <style:text-properties fo:font-size="15pt" fo:font-weight="bold"/>
    </style:style>
    <style:style style:name="P11" style:family="paragraph" style:parent-style-name="Text_20_body" style:list-style-name="L3">
      <style:paragraph-properties fo:margin-left="0in" fo:margin-right="0in" fo:text-indent="0in" style:auto-text-indent="false"/>
      <style:text-properties fo:font-size="15pt" fo:font-weight="bold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fo:font-size="15pt" fo:font-weight="bold"/>
    </style:style>
    <style:style style:name="P13" style:family="paragraph" style:parent-style-name="Heading_20_2">
      <style:paragraph-properties fo:margin-left="0in" fo:margin-right="0in" fo:text-indent="0in" style:auto-text-indent="false"/>
      <style:text-properties fo:font-size="15pt" fo:font-weight="bold"/>
    </style:style>
    <style:style style:name="P14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bold"/>
    </style:style>
    <style:style style:name="P15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16" style:family="paragraph" style:parent-style-name="Text_20_body" style:list-style-name="L4">
      <style:paragraph-properties fo:margin-left="0in" fo:margin-right="0in" fo:text-indent="0in" style:auto-text-indent="false"/>
    </style:style>
    <style:style style:name="P17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18" style:family="paragraph" style:parent-style-name="Text_20_body" style:list-style-name="L5">
      <style:paragraph-properties fo:margin-left="0in" fo:margin-right="0in" fo:text-indent="0in" style:auto-text-indent="false"/>
    </style:style>
    <style:style style:name="P19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20" style:family="paragraph" style:parent-style-name="Text_20_body" style:list-style-name="L6">
      <style:paragraph-properties fo:margin-left="0in" fo:margin-right="0in" fo:text-indent="0in" style:auto-text-indent="false"/>
    </style:style>
    <style:style style:name="P21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22" style:family="paragraph" style:parent-style-name="Text_20_body" style:list-style-name="L7">
      <style:paragraph-properties fo:margin-left="0in" fo:margin-right="0in" fo:text-indent="0in" style:auto-text-indent="false"/>
    </style:style>
    <style:style style:name="P23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24" style:family="paragraph" style:parent-style-name="Text_20_body">
      <style:paragraph-properties fo:margin-top="0in" fo:margin-bottom="0in" style:contextual-spacing="false"/>
    </style:style>
    <style:style style:name="P25" style:family="paragraph" style:parent-style-name="Standard">
      <style:paragraph-properties fo:margin-left="0.1665in" fo:margin-right="0.1665in" fo:margin-top="0.1665in" fo:margin-bottom="0.1665in" style:contextual-spacing="false" fo:text-indent="0in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P26" style:family="paragraph" style:parent-style-name="Standard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27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28" style:family="paragraph" style:parent-style-name="Text_20_body" style:list-style-name="L8">
      <style:paragraph-properties fo:margin-left="0in" fo:margin-right="0in" fo:text-indent="0in" style:auto-text-indent="false"/>
    </style:style>
    <style:style style:name="P29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30" style:family="paragraph" style:parent-style-name="Text_20_body" style:list-style-name="L9">
      <style:paragraph-properties fo:margin-left="0in" fo:margin-right="0in" fo:text-indent="0in" style:auto-text-indent="false"/>
    </style:style>
    <style:style style:name="P31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</style:style>
    <style:style style:name="P32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33" style:family="paragraph" style:parent-style-name="Text_20_body" style:list-style-name="L10">
      <style:paragraph-properties fo:margin-left="0in" fo:margin-right="0in" fo:text-indent="0in" style:auto-text-indent="false"/>
    </style:style>
    <style:style style:name="P34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</style:style>
    <style:style style:name="P35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/>
    </style:style>
    <style:style style:name="P36" style:family="paragraph" style:parent-style-name="Text_20_body" style:list-style-name="L11">
      <style:paragraph-properties fo:margin-left="0in" fo:margin-right="0in" fo:text-indent="0in" style:auto-text-indent="false"/>
    </style:style>
    <style:style style:name="P37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/>
    </style:style>
    <style:style style:name="P38" style:family="paragraph" style:parent-style-name="Text_20_body" style:list-style-name="L12">
      <style:paragraph-properties fo:margin-left="0in" fo:margin-right="0in" fo:text-indent="0in" style:auto-text-indent="false"/>
    </style:style>
    <style:style style:name="P39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40" style:family="paragraph" style:parent-style-name="Standard">
      <style:text-properties fo:font-weight="normal" officeooo:rsid="000e9b5d"/>
    </style:style>
    <style:style style:name="P41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42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43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/>
    </style:style>
    <style:style style:name="P44" style:family="paragraph" style:parent-style-name="Text_20_body" style:list-style-name="L14">
      <style:paragraph-properties fo:margin-left="0in" fo:margin-right="0in" fo:text-indent="0in" style:auto-text-indent="false"/>
    </style:style>
    <style:style style:name="P45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46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/>
    </style:style>
    <style:style style:name="P4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48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49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/>
    </style:style>
    <style:style style:name="P50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51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52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/>
    </style:style>
    <style:style style:name="P53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54" style:family="paragraph" style:parent-style-name="Text_20_body" style:list-style-name="L18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55" style:family="paragraph" style:parent-style-name="Text_20_body" style:list-style-name="L18">
      <style:paragraph-properties fo:margin-left="0in" fo:margin-right="0in" fo:text-indent="0in" style:auto-text-indent="false"/>
    </style:style>
    <style:style style:name="T1" style:family="text">
      <style:text-properties fo:font-size="15pt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5" style:family="text">
      <style:text-properties fo:font-weight="normal"/>
    </style:style>
    <style:style style:name="T6" style:family="text">
      <style:text-properties fo:font-style="italic" fo:font-weight="normal"/>
    </style:style>
    <style:style style:name="T7" style:family="text">
      <style:text-properties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8" style:family="text">
      <style:text-properties fo:font-weight="normal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What is GNU? (The Project)</text:span></text:h>
      <text:p text:style-name="P2"><text:span text:style-name="T2">GNU</text:span> is a mass collaborative project started in 1983 to create a completely free operating system. [3, 4] </text:p>
      <text:list text:style-name="L1">
        <text:list-item>
          <text:p text:style-name="P3">The Name: It stands for "GNU's Not Unix". It's a recursive acronym, which is just a nerdy way of saying the name refers back to itself. [4] </text:p>
        </text:list-item>
        <text:list-item>
          <text:p text:style-name="P3">The Goal: Before GNU, most software was "proprietary," meaning you couldn't see how it worked or change it. The GNU Project was created so people could use computers without being controlled by a single company. [3, 4] </text:p>
        </text:list-item>
        <text:list-item>
          <text:p text:style-name="P3">The Result: Most of the tools you use in Linux today (like the terminal you type in or the tools that move files) are actually <text:a xlink:type="simple" xlink:href="https://www.gnu.org/software/software.html" text:style-name="Internet_20_link" text:visited-style-name="Visited_20_Internet_20_Link">GNU software</text:a>. [5, 6] </text:p>
        </text:list-item>
        <text:list-item>
          <text:p text:style-name="P4">Example: If Linux is the "engine" of a car, GNU is the dashboard, the steering wheel, and the seats that make it a complete vehicle. [6] </text:p>
        </text:list-item>
      </text:list>
      <text:h text:style-name="P5" text:outline-level="2">What is GPL? (The License)</text:h>
      <text:p text:style-name="P2">The <text:span text:style-name="T2">GPL</text:span> (General Public License) is the legal "contract" created by the GNU Project to protect software freedom. [7, 8] </text:p>
      <text:list text:style-name="L2">
        <text:list-item>
          <text:p text:style-name="P6">The "Copyleft" Rule: Most copyrights use the law to <text:span text:style-name="Emphasis"><text:span text:style-name="T3">restrict</text:span></text:span> you. The <text:a xlink:type="simple" xlink:href="https://www.gnu.org/licenses/gpl-3.0.html" text:style-name="Internet_20_link" text:visited-style-name="Visited_20_Internet_20_Link">GPL</text:a> uses the law to <text:span text:style-name="Emphasis"><text:span text:style-name="T3">guarantee</text:span></text:span> your freedom. It says: "You can use this software for free, but if you change it and share it, you must keep it free for the next person". [1, 8, 9, 10] </text:p>
        </text:list-item>
        <text:list-item>
          <text:p text:style-name="P6">Why it's important: It prevents companies from taking a free program, making a tiny change, and then selling it as a "secret" product that you aren't allowed to see or share. [11, 12] </text:p>
        </text:list-item>
        <text:list-item>
          <text:p text:style-name="P7">Example: Think of the GPL like a neighborhood book exchange. You can take a book for free, and you can even draw in the margins to make it better. But if you give it to someone else, you can't lock it in a box or charge them to read your notes; you have to keep the book open for the next person. [13] </text:p>
        </text:list-item>
      </text:list>
      <text:p text:style-name="P8"/>
      <text:p text:style-name="P9"><text:soft-page-break/>Summary for your notes:</text:p>
      <text:list text:style-name="L3">
        <text:list-item>
          <text:p text:style-name="P10">GNU is the project that builds free tools.</text:p>
        </text:list-item>
        <text:list-item>
          <text:p text:style-name="P11">GPL is the legal rule that makes sure those tools <text:span text:style-name="Emphasis"><text:span text:style-name="T3">stay</text:span></text:span> free forever. [2, 8] </text:p>
        </text:list-item>
      </text:list>
      <text:p text:style-name="P9"/>
      <text:p text:style-name="P12"/>
      <text:h text:style-name="P13" text:outline-level="2"/>
      <text:h text:style-name="P13" text:outline-level="2"/>
      <text:h text:style-name="P13" text:outline-level="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3" text:outline-level="2"><text:soft-page-break/>The 4 Freedoms of Free Software</text:h>
      <text:p text:style-name="P14">Freedom 0: The Freedom to RUN</text:p>
      <text:list text:style-name="L4">
        <text:list-item>
          <text:p text:style-name="P15"><text:span text:style-name="T2">The Idea:</text:span> You can use the software for any purpose you want. No one can tell you "you aren't allowed to use this for business" or "you can't use this at night."</text:p>
        </text:list-item>
        <text:list-item>
          <text:p text:style-name="P16"><text:span text:style-name="T2">Example:</text:span> Using a video player to watch a movie, run a presentation at work, or display art at a gallery. You don't need to ask for permission.</text:p>
        </text:list-item>
      </text:list>
      <text:p text:style-name="P14">Freedom 1: The Freedom to STUDY</text:p>
      <text:list text:style-name="L5">
        <text:list-item>
          <text:p text:style-name="P17"><text:span text:style-name="T2">The Idea:</text:span> You can look "under the hood" to see how the program actually works. To do this, you must be able to see the <text:span text:style-name="T2">Source Code</text:span> (the instructions written by the programmer).</text:p>
        </text:list-item>
        <text:list-item>
          <text:p text:style-name="P18"><text:span text:style-name="T2">Example:</text:span> Like looking at a car engine to learn how it runs. If you find a part you don't like, you have the right to know it's there.</text:p>
        </text:list-item>
      </text:list>
      <text:p text:style-name="P14">Freedom 2: The Freedom to SHARE</text:p>
      <text:list text:style-name="L6">
        <text:list-item>
          <text:p text:style-name="P19"><text:span text:style-name="T2">The Idea:</text:span> You are allowed to help your neighbor. If you have the software and your friend needs it, you can legally give them a copy.</text:p>
        </text:list-item>
        <text:list-item>
          <text:p text:style-name="P20"><text:span text:style-name="T2">Example:</text:span> Giving a copy of your Linux operating system to a classmate so they can use it on their laptop too.</text:p>
        </text:list-item>
      </text:list>
      <text:p text:style-name="P14">Freedom 3: The Freedom to IMPROVE</text:p>
      <text:list text:style-name="L7">
        <text:list-item>
          <text:p text:style-name="P21"><text:span text:style-name="T2">The Idea:</text:span> If you know how to make the program better, you can change it and then share those improvements with the world so everyone benefits.</text:p>
        </text:list-item>
        <text:list-item>
          <text:p text:style-name="P22"><text:span text:style-name="T2">Example:</text:span> You notice a program is slow, you write a fix to make it faster, and you release that "Fast Version" for everyone else to enjoy.</text:p>
        </text:list-item>
      </text:list>
      <text:p text:style-name="Horizontal_20_Line"/>
      <text:p text:style-name="P23"/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<text:soft-page-break/>GNU and Linux are two separate things that joined forces to create the operating system most people just call "Linux." </text:p>
      <text:p text:style-name="P26">Think of it like a <text:span text:style-name="T2">car</text:span>:</text:p>
      <text:list text:style-name="L8">
        <text:list-item>
          <text:p text:style-name="P27"><text:span text:style-name="T2">Linux</text:span> is the <text:span text:style-name="T2">engine</text:span>. It does the heavy lifting under the hood but you can't sit in it or drive it by itself.</text:p>
        </text:list-item>
        <text:list-item>
          <text:p text:style-name="P28"><text:span text:style-name="T2">GNU</text:span> is the <text:span text:style-name="T2">body, dashboard, and steering wheel</text:span>. It’s what you actually touch and use to control the engine. [3, 5, 6] </text:p>
        </text:list-item>
      </text:list>
      <text:h text:style-name="P13" text:outline-level="2">The Key Differences</text:h>
      <text:p text:style-name="P14">Linux (The Kernel)</text:p>
      <text:list text:style-name="L9">
        <text:list-item>
          <text:p text:style-name="P29"><text:span text:style-name="T2">What it is:</text:span> A "Kernel" is the core software that talks directly to your computer's hardware (like the CPU, RAM, and disk).</text:p>
        </text:list-item>
        <text:list-item>
          <text:p text:style-name="P29"><text:span text:style-name="T2">What it does:</text:span> It manages resources. When you open a program, the kernel decides how much memory it gets and makes sure the screen shows the right colors.</text:p>
        </text:list-item>
        <text:list-item>
          <text:p text:style-name="P30"><text:span text:style-name="T2">History:</text:span> Created by <text:span text:style-name="T2">Linus Torvalds</text:span> in 1991 as a hobby project. [7, 8, 9, 10, 11, 12] </text:p>
        </text:list-item>
      </text:list>
      <text:p text:style-name="P14">GNU (The System Tools)</text:p>
      <text:list text:style-name="L10">
        <text:list-item>
          <text:p text:style-name="P31"><text:span text:style-name="T2">What it is:</text:span> A collection of essential software tools, libraries, and applications.</text:p>
        </text:list-item>
        <text:list-item>
          <text:p text:style-name="P32"><text:span text:style-name="T2">What it does:</text:span> It provides the "userland"—the commands you type (like <text:span text:style-name="Source_20_Text"><text:span text:style-name="T4">ls</text:span></text:span> to see files or <text:span text:style-name="Source_20_Text"><text:span text:style-name="T4">cp</text:span></text:span> to copy them) and the environment where programs run.</text:p>
        </text:list-item>
        <text:list-item>
          <text:p text:style-name="P33"><text:span text:style-name="T2">History:</text:span> Started by <text:span text:style-name="T2">Richard Stallman</text:span> in 1983 with the goal of creating a completely free operating system. [3, 13, 14, 15, 16] </text:p>
        </text:list-item>
      </text:list>
      <text:p text:style-name="Horizontal_20_Line"/>
      <text:h text:style-name="P13" text:outline-level="2">How They Work Together Perfectly</text:h>
      <text:p text:style-name="P34"><text:span text:style-name="T5">In the early 90s, the </text:span><text:a xlink:type="simple" xlink:href="https://www.gnu.org/gnu/gnu-history.html" text:style-name="Internet_20_link" text:visited-style-name="Visited_20_Internet_20_Link"><text:span text:style-name="T5">GNU Project</text:span></text:a><text:span text:style-name="T5"> had almost every part of an operating system finished </text:span><text:span text:style-name="Emphasis"><text:span text:style-name="T6">except</text:span></text:span><text:span text:style-name="T5"> for a working engine (kernel). At the same time, Linus Torvalds had a working engine (the Linux kernel) but no tools to make it useful for regular people. [2, 17, 18, 19] </text:span></text:p>
      <text:list text:style-name="L11">
        <text:list-item>
          <text:p text:style-name="P35"><text:span text:style-name="T2">The Perfect Fit:</text:span> Developers took the <text:span text:style-name="T2">GNU tools</text:span> and plugged them into the <text:span text:style-name="T2">Linux kernel</text:span>. [13, 18] </text:p>
        </text:list-item>
        <text:list-item>
          <text:p text:style-name="P35"><text:span text:style-name="T2">The Result:</text:span> A complete, high-performance operating system was born. This is why many people, including the Free Software Foundation, insist on calling the system <text:span text:style-name="T2">GNU/Linux</text:span>. [2, 6, 20, 21] </text:p>
        </text:list-item>
        <text:list-item>
          <text:p text:style-name="P36"><text:span text:style-name="T2">Modern Use:</text:span> Today, when you use a "Linux Distribution" like Ubuntu or Debian, you are using a combination of the Linux kernel and GNU software working in harmony. [4, 10] </text:p>
        </text:list-item>
      </text:list>
      <text:p text:style-name="Horizontal_20_Line"><text:soft-page-break/></text:p>
      <text:p text:style-name="P14">Summary for your notes:</text:p>
      <text:list text:style-name="L12">
        <text:list-item>
          <text:p text:style-name="P37"><text:span text:style-name="T2">Linux</text:span> = The Engine (Hardware Manager).</text:p>
        </text:list-item>
        <text:list-item>
          <text:p text:style-name="P37"><text:span text:style-name="T2">GNU</text:span> = The Controls (Software Tools).</text:p>
        </text:list-item>
        <text:list-item>
          <text:p text:style-name="P38"><text:span text:style-name="T2">Together</text:span> = A complete "Car" (Operating System). [5, 13, 22] </text:p>
        </text:list-item>
      </text:list>
      <text:p text:style-name="P39"><text:span text:style-name="T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0"/>
      <text:p text:style-name="P40"/>
      <text:p text:style-name="P40"><text:soft-page-break/></text:p>
      <text:h text:style-name="P13" text:outline-level="2">The uname Command</text:h>
      <text:p text:style-name="P39"><text:span text:style-name="T2">The Basic Command: </text:span><text:span text:style-name="Source_20_Text"><text:span text:style-name="T7">uname</text:span></text:span></text:p>
      <text:list text:style-name="L13">
        <text:list-item>
          <text:p text:style-name="P41"><text:span text:style-name="T2">The Idea:</text:span> If you type just <text:span text:style-name="Source_20_Text"><text:span text:style-name="T4">uname</text:span></text:span> by itself, it will usually just say "Linux." It’s the most basic answer possible.</text:p>
        </text:list-item>
      </text:list>
      <text:p text:style-name="P39"><text:span text:style-name="T2">1. </text:span><text:span text:style-name="Source_20_Text"><text:span text:style-name="T7">uname -a</text:span></text:span><text:span text:style-name="T2"> (The "Tell Me Everything" option)</text:span></text:p>
      <text:list text:style-name="L14">
        <text:list-item>
          <text:p text:style-name="P42"><text:span text:style-name="T2">The Idea:</text:span> The <text:span text:style-name="Source_20_Text"><text:span text:style-name="T4">-a</text:span></text:span> stands for <text:span text:style-name="T2">All</text:span>. This gives you every bit of information the command has in one long line.</text:p>
        </text:list-item>
        <text:list-item>
          <text:p text:style-name="P43"><text:span text:style-name="T2">Example:</text:span> You’d use this if a tech support person asks, "What are your system specs?"</text:p>
        </text:list-item>
        <text:list-item>
          <text:p text:style-name="P44"><text:span text:style-name="T2">What it looks like:</text:span> It shows the name, version, date, and hardware type all at once.</text:p>
        </text:list-item>
      </text:list>
      <text:p text:style-name="P39"><text:span text:style-name="T2">2. </text:span><text:span text:style-name="Source_20_Text"><text:span text:style-name="T7">uname -r</text:span></text:span><text:span text:style-name="T2"> (The "Engine Version" option)</text:span></text:p>
      <text:list text:style-name="L15">
        <text:list-item>
          <text:p text:style-name="P45"><text:span text:style-name="T2">The Idea:</text:span> The <text:span text:style-name="Source_20_Text"><text:span text:style-name="T4">-r</text:span></text:span> stands for <text:span text:style-name="T2">Release</text:span>. This tells you the specific version of the <text:span text:style-name="T2">Linux Kernel</text:span> (the engine) you are using.</text:p>
        </text:list-item>
        <text:list-item>
          <text:p text:style-name="P46"><text:span text:style-name="T2">Example:</text:span> You’d use this if you are trying to install a new driver or piece of software and need to know if your "engine" is new enough to run it.</text:p>
        </text:list-item>
        <text:list-item>
          <text:p text:style-name="P47"><text:span text:style-name="T2">What it looks like:</text:span> Something like <text:span text:style-name="Source_20_Text"><text:span text:style-name="T4">6.5.0-27-generic</text:span></text:span>.</text:p>
        </text:list-item>
      </text:list>
      <text:p text:style-name="P39"><text:span text:style-name="T2">3. </text:span><text:span text:style-name="Source_20_Text"><text:span text:style-name="T7">uname -m</text:span></text:span><text:span text:style-name="T2"> (The "Hardware Type" option)</text:span></text:p>
      <text:list text:style-name="L16">
        <text:list-item>
          <text:p text:style-name="P48"><text:span text:style-name="T2">The Idea:</text:span> The <text:span text:style-name="Source_20_Text"><text:span text:style-name="T4">-m</text:span></text:span> stands for <text:span text:style-name="T2">Machine</text:span>. It tells you if your computer is a 64-bit or 32-bit machine.</text:p>
        </text:list-item>
        <text:list-item>
          <text:p text:style-name="P49"><text:span text:style-name="T2">Example:</text:span> Use this before downloading software to make sure you pick the right version for your hardware.</text:p>
        </text:list-item>
        <text:list-item>
          <text:p text:style-name="P50"><text:span text:style-name="T2">What it looks like:</text:span> Usually <text:span text:style-name="Source_20_Text"><text:span text:style-name="T4">x86_64</text:span></text:span> (which means 64-bit).</text:p>
        </text:list-item>
      </text:list>
      <text:p text:style-name="P39"><text:span text:style-name="T2">4. </text:span><text:span text:style-name="Source_20_Text"><text:span text:style-name="T7">uname -o</text:span></text:span><text:span text:style-name="T2"> (The "Operating System" option)</text:span></text:p>
      <text:list text:style-name="L17">
        <text:list-item>
          <text:p text:style-name="P51"><text:span text:style-name="T2">The Idea:</text:span> The <text:span text:style-name="Source_20_Text"><text:span text:style-name="T4">-o</text:span></text:span> stands for <text:span text:style-name="T2">Operating System</text:span>.</text:p>
        </text:list-item>
        <text:list-item>
          <text:p text:style-name="P52"><text:span text:style-name="T2">Example:</text:span> This confirms you are using a "GNU/Linux" system. It’s a nod back to our previous topic about how GNU and Linux work together!</text:p>
        </text:list-item>
        <text:list-item>
          <text:p text:style-name="P53"><text:span text:style-name="T2">What it looks like:</text:span> <text:span text:style-name="Source_20_Text"><text:span text:style-name="T4">GNU/Linux</text:span></text:span>.</text:p>
        </text:list-item>
      </text:list>
      <text:p text:style-name="P39"><text:span text:style-name="T2">5. </text:span><text:span text:style-name="Source_20_Text"><text:span text:style-name="T7">uname -n</text:span></text:span><text:span text:style-name="T2"> (The "Computer Name" option)</text:span></text:p>
      <text:list text:style-name="L18">
        <text:list-item>
          <text:p text:style-name="P54"><text:soft-page-break/><text:span text:style-name="T2">The Idea:</text:span> The <text:span text:style-name="Source_20_Text"><text:span text:style-name="T4">-n</text:span></text:span> stands for <text:span text:style-name="T2">Node name</text:span>. This is simply the name you gave your computer when you set it up.</text:p>
        </text:list-item>
        <text:list-item>
          <text:p text:style-name="P55"><text:span text:style-name="T2">Example:</text:span> If you named your laptop "Super-Workstation," this command will spit that name back at you.</text:p>
        </text:list-item>
      </text:list>
      <text:p text:style-name="Horizontal_20_Line"/>
      <text:p text:style-name="P39"><text:span text:style-name="T2">Summary for your notes:</text:span><text:span text:style-name="T5"><text:line-break/>If you ever forget which letter does what, you can always type </text:span><text:span text:style-name="Source_20_Text"><text:span text:style-name="T8">uname --help</text:span></text:span><text:span text:style-name="T5"> to see a quick list of all the options.</text:span></text:p>
      <text:p text:style-name="P39"><text:span text:style-name="T2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09:04:01.239730046</meta:creation-date>
    <meta:generator>LibreOffice/25.2.3.2$Linux_X86_64 LibreOffice_project/520$Build-2</meta:generator>
    <dc:date>2026-05-11T09:30:02.739886797</dc:date>
    <meta:editing-duration>PT26M1S</meta:editing-duration>
    <meta:editing-cycles>3</meta:editing-cycles>
    <meta:document-statistic meta:table-count="0" meta:image-count="0" meta:object-count="0" meta:page-count="7" meta:paragraph-count="72" meta:word-count="1323" meta:character-count="6952" meta:non-whitespace-character-count="5730"/>
  </office:meta>
</office:document-meta>
</file>