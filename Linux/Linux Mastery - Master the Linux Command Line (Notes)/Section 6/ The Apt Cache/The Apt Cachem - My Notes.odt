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/>
      <style:text-properties fo:font-weight="normal"/>
    </style:style>
    <style:style style:name="P2" style:family="paragraph" style:parent-style-name="Heading_20_2">
      <style:paragraph-properties fo:margin-left="0in" fo:margin-right="0in" fo:margin-top="0in" fo:margin-bottom="0.1965in" style:contextual-spacing="false" fo:line-height="115%" fo:text-indent="0in" style:auto-text-indent="false"/>
      <style:text-properties fo:font-size="15pt" fo:font-weight="bold"/>
    </style:style>
    <style:style style:name="P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6" style:family="paragraph" style:parent-style-name="Horizontal_20_Line">
      <style:paragraph-properties fo:margin-top="0in" fo:margin-bottom="0in" style:contextual-spacing="false" fo:line-height="115%"/>
    </style:style>
    <style:style style:name="P7" style:family="paragraph" style:parent-style-name="Heading_20_2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5pt" fo:font-weight="bold"/>
    </style:style>
    <style:style style:name="P8" style:family="paragraph" style:parent-style-name="Heading_20_2">
      <style:paragraph-properties fo:margin-left="0in" fo:margin-right="0in" fo:margin-top="0in" fo:margin-bottom="0.1965in" style:contextual-spacing="false" fo:line-height="115%" fo:text-indent="0in" style:auto-text-indent="false" style:writing-mode="lr-tb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 style:list-style-name="L3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1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bold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5" style:family="paragraph" style:parent-style-name="Text_20_body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5">
      <style:paragraph-properties fo:margin-left="0in" fo:margin-right="0in" fo:text-indent="0in" style:auto-text-indent="false"/>
    </style:style>
    <style:style style:name="P18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6">
      <style:paragraph-properties fo:margin-left="0in" fo:margin-right="0in" fo:text-indent="0in" style:auto-text-indent="false"/>
    </style:style>
    <style:style style:name="P20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/>
    </style:style>
    <style:style style:name="P21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3" style:family="paragraph" style:parent-style-name="Text_20_body" style:list-style-name="L7">
      <style:paragraph-properties fo:margin-left="0in" fo:margin-right="0in" fo:text-indent="0in" style:auto-text-indent="false"/>
    </style:style>
    <style:style style:name="P24" style:family="paragraph" style:parent-style-name="Text_20_body">
      <style:paragraph-properties fo:margin-top="0in" fo:margin-bottom="0in" style:contextual-spacing="false"/>
    </style:style>
    <style:style style:name="P2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26" style:family="paragraph" style:parent-style-name="Standard">
      <style:text-properties fo:font-weight="normal"/>
    </style:style>
    <style:style style:name="P27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28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9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Text_20_body" style:list-style-name="L8">
      <style:paragraph-properties fo:margin-left="0in" fo:margin-right="0in" fo:text-indent="0in" style:auto-text-indent="false"/>
    </style:style>
    <style:style style:name="P31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32" style:family="paragraph" style:parent-style-name="Text_20_body" style:list-style-name="L9">
      <style:paragraph-properties fo:margin-left="0in" fo:margin-right="0in" fo:text-indent="0in" style:auto-text-indent="false"/>
    </style:style>
    <style:style style:name="P33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4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6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 style:list-style-name="L12">
      <style:paragraph-properties fo:margin-left="0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3" style:family="text">
      <style:text-properties fo:font-size="15pt" fo:font-weight="bold"/>
    </style:style>
    <style:style style:name="T4" style:family="text">
      <style:text-properties fo:font-size="15pt"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font-style="italic"/>
    </style:style>
    <style:style style:name="T6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22595133" text:style-name="L1">
        <text:list-header>
          <text:p text:style-name="P1"/>
        </text:list-header>
      </text:list>
      <text:h text:style-name="P2" text:outline-level="2">What is apt-cache? (The Catalog)</text:h>
      <text:p text:style-name="P3">Before I search, I need to know what <text:span text:style-name="T1">apt-cache</text:span> actually is.</text:p>
      <text:list text:style-name="L2">
        <text:list-item>
          <text:p text:style-name="P4"><text:span text:style-name="T1">The Idea:</text:span> My computer keeps a "local copy" of the list of every piece of software available in the Official Repositories. This local list is the <text:span text:style-name="T1">cache</text:span>.</text:p>
        </text:list-item>
        <text:list-item>
          <text:p text:style-name="P4"><text:span text:style-name="T1">The Purpose:</text:span> Instead of my computer reaching out to the internet every single time I want to look something up (which would be slow), it looks at this "offline catalog" stored on my hard drive.</text:p>
        </text:list-item>
        <text:list-item>
          <text:p text:style-name="P5"><text:span text:style-name="T1">In Plain English:</text:span> If the Repositories are the <text:span text:style-name="T1">Warehouses</text:span>, the <text:span text:style-name="Source_20_Text"><text:span text:style-name="T2">apt-cache</text:span></text:span> is the <text:span text:style-name="T1">Printed Catalog</text:span> I keep at my desk so I can see what’s available without driving to the warehouse.</text:p>
        </text:list-item>
      </text:list>
      <text:p text:style-name="P6"/>
      <text:h text:style-name="P7" text:outline-level="2"/>
      <text:h text:style-name="P8" text:outline-level="2"><text:span text:style-name="T3">Using </text:span><text:span text:style-name="Source_20_Text"><text:span text:style-name="T4">apt-cache search docx</text:span></text:span></text:h>
      <text:list text:style-name="L3">
        <text:list-item>
          <text:p text:style-name="P9"><text:span text:style-name="T1">The Action:</text:span> I am telling my computer: "Look through your catalog and find every program that mentions 'docx' in its name or its description."</text:p>
        </text:list-item>
        <text:list-item>
          <text:p text:style-name="P9"><text:span text:style-name="T1">Why I do this:</text:span> I know what I want to <text:span text:style-name="Emphasis"><text:span text:style-name="T5">do</text:span></text:span> (open a Word file), but I don't know the <text:span text:style-name="Emphasis"><text:span text:style-name="T5">name</text:span></text:span> of the app that does it.</text:p>
        </text:list-item>
        <text:list-item>
          <text:p text:style-name="P10"><text:span text:style-name="T1">The Result:</text:span> It will give me a list of "Package Names" and a short blurb about what they do.</text:p>
        </text:list-item>
      </text:list>
      <text:p text:style-name="P6"/>
      <text:h text:style-name="P2" text:outline-level="2"/>
      <text:h text:style-name="P2" text:outline-level="2">Other Useful Ways I Can Use apt-cache</text:h>
      <text:p text:style-name="P3">I don't just use it to search; I can use it to get "Inside Info" on any program before I decide to install it.</text:p>
      <text:p text:style-name="P11"><text:span text:style-name="T1">1. </text:span><text:span text:style-name="Source_20_Text"><text:span text:style-name="T6">apt-cache show [package_name]</text:span></text:span><text:span text:style-name="T1"> (The "Spec Sheet")</text:span></text:p>
      <text:p text:style-name="P12"/>
      <text:list text:style-name="L4">
        <text:list-item>
          <text:p text:style-name="P13"><text:span text:style-name="T1">What it does:</text:span> This gives me a full description of a specific program. It shows me the version number, how big the download is, and who made it.</text:p>
        </text:list-item>
        <text:list-item>
          <text:p text:style-name="P14"><text:span text:style-name="T1">Why I use it:</text:span> I use this when I find a name in my search (like <text:span text:style-name="Source_20_Text"><text:span text:style-name="T2">pandoc</text:span></text:span>) and want to read the full "About" section to make sure it’s exactly what I need.</text:p>
        </text:list-item>
      </text:list>
      <text:p text:style-name="P15"/>
      <text:p text:style-name="P15"><text:soft-page-break/></text:p>
      <text:p text:style-name="P15"/>
      <text:p text:style-name="P11"><text:span text:style-name="T1">2. </text:span><text:span text:style-name="Source_20_Text"><text:span text:style-name="T6">apt-cache depends [package_name]</text:span></text:span><text:span text:style-name="T1"> (The "Requirement Check")</text:span></text:p>
      <text:list text:style-name="L5">
        <text:list-item>
          <text:p text:style-name="P16"><text:span text:style-name="T1">What it does:</text:span> This shows me a list of all the <text:span text:style-name="Emphasis"><text:span text:style-name="T5">other</text:span></text:span> software this program needs to run.</text:p>
        </text:list-item>
        <text:list-item>
          <text:p text:style-name="P17"><text:span text:style-name="T1">Why I use it:</text:span> If I’m on a slow internet connection, I check this to see if installing one small app is actually going to trigger 50 other "dependency" downloads.</text:p>
        </text:list-item>
      </text:list>
      <text:p text:style-name="P11"><text:span text:style-name="T1">3. </text:span><text:span text:style-name="Source_20_Text"><text:span text:style-name="T6">apt-cache policy [package_name]</text:span></text:span><text:span text:style-name="T1"> (The "Version Check")</text:span></text:p>
      <text:list text:style-name="L6">
        <text:list-item>
          <text:p text:style-name="P18"><text:span text:style-name="T1">What it does:</text:span> This tells me if I already have the program installed and if there is a newer version waiting in the warehouse.</text:p>
        </text:list-item>
        <text:list-item>
          <text:p text:style-name="P19"><text:span text:style-name="T1">Why I use it:</text:span> I use this to see if I’m running the latest and greatest version of a tool like <text:span text:style-name="T1">GCC</text:span>.</text:p>
        </text:list-item>
      </text:list>
      <text:p text:style-name="P6"/>
      <text:p text:style-name="P20">Summary for my notes:</text:p>
      <text:list text:style-name="L7">
        <text:list-item>
          <text:p text:style-name="P21"><text:span text:style-name="T1">apt-cache</text:span> = My offline catalog of all available software.</text:p>
        </text:list-item>
        <text:list-item>
          <text:p text:style-name="P22"><text:span text:style-name="T1">search</text:span> = Finding a tool by a keyword (like <text:span text:style-name="Source_20_Text"><text:span text:style-name="T2">docx</text:span></text:span>).</text:p>
        </text:list-item>
        <text:list-item>
          <text:p text:style-name="P21"><text:span text:style-name="T1">show</text:span> = Reading the full details of a specific tool.</text:p>
        </text:list-item>
        <text:list-item>
          <text:p text:style-name="P23"><text:span text:style-name="T1">depends</text:span> = Seeing what other "bonus" files are needed.</text:p>
        </text:list-item>
      </text:list>
      <text:p text:style-name="P20"/>
      <text:p text:style-name="P24"/>
      <text:list text:continue-list="list3922595133" text:style-name="L1">
        <text:list-item>
          <text:p text:style-name="P25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/>
      <text:p text:style-name="P26"><text:soft-page-break/></text:p>
      <text:h text:style-name="P27" text:outline-level="2">What is APT? (The Store Manager)</text:h>
      <text:p text:style-name="P3"><text:span text:style-name="T1">APT</text:span> stands for <text:span text:style-name="T1">Advanced Package Tool</text:span>. It is the main program I use to manage all the software on my system.</text:p>
      <text:list text:style-name="L8">
        <text:list-item>
          <text:p text:style-name="P28"><text:span text:style-name="T1">The Idea:</text:span> It’s the "brain" that handles installing, updating, and removing programs. When I type <text:span text:style-name="Source_20_Text"><text:span text:style-name="T2">apt-get install</text:span></text:span>, I am talking to APT.</text:p>
        </text:list-item>
        <text:list-item>
          <text:p text:style-name="P29"><text:span text:style-name="T1">What it does:</text:span> It handles the hard work of connecting to the internet, finding the right files, and making sure they are set up correctly on my computer.</text:p>
        </text:list-item>
        <text:list-item>
          <text:p text:style-name="P30"><text:span text:style-name="T1">In Plain English:</text:span> APT is like a <text:span text:style-name="T1">highly skilled Store Manager</text:span>. If I tell the manager I want a specific tool, they go find it, check if it's safe, and put it in my hands.</text:p>
        </text:list-item>
      </text:list>
      <text:h text:style-name="P27" text:outline-level="2">What is Cache? (The Inventory List)</text:h>
      <text:p text:style-name="P3">In the context of Linux software, a <text:span text:style-name="T1">Cache</text:span> is a temporary storage spot for information or files so they can be accessed quickly.</text:p>
      <text:list text:style-name="L9">
        <text:list-item>
          <text:p text:style-name="P31"><text:span text:style-name="T1">The Idea:</text:span> There are millions of files in the Linux world. If APT had to search the entire internet every time I typed a command, it would be incredibly slow.</text:p>
        </text:list-item>
        <text:list-item>
          <text:p text:style-name="P31"><text:span text:style-name="T1">How it works:</text:span> My system downloads a "Master List" of every available program from the Software Repositories and saves it on my hard drive. This local copy is the <text:span text:style-name="T1">apt-cache</text:span>.</text:p>
        </text:list-item>
        <text:list-item>
          <text:p text:style-name="P32"><text:span text:style-name="T1">In Plain English:</text:span> The cache is like a <text:span text:style-name="T1">Product Catalog</text:span> that the Store Manager (APT) keeps under the counter. Instead of calling every warehouse in the country to see if they have a hammer, the manager just flips through the catalog at their feet.</text:p>
        </text:list-item>
      </text:list>
      <text:p text:style-name="Horizontal_20_Line"/>
      <text:h text:style-name="P27" text:outline-level="2">How They Work Together</text:h>
      <text:list text:style-name="L10">
        <text:list-item>
          <text:p text:style-name="P33"><text:span text:style-name="T1">I run </text:span><text:span text:style-name="Source_20_Text"><text:span text:style-name="T6">sudo apt-get update</text:span></text:span><text:span text:style-name="T1">:</text:span> This tells APT to call the warehouses and update my <text:span text:style-name="T1">Cache</text:span> (the catalog) with the newest prices and items.</text:p>
        </text:list-item>
        <text:list-item>
          <text:p text:style-name="P33"><text:span text:style-name="T1">I run </text:span><text:span text:style-name="Source_20_Text"><text:span text:style-name="T6">apt-cache search [keyword]</text:span></text:span><text:span text:style-name="T1">:</text:span> I am personally looking through that <text:span text:style-name="T1">Catalog</text:span> to see what is available.</text:p>
        </text:list-item>
        <text:list-item>
          <text:p text:style-name="P34"><text:span text:style-name="T1">I run </text:span><text:span text:style-name="Source_20_Text"><text:span text:style-name="T6">sudo apt-get install [program]</text:span></text:span><text:span text:style-name="T1">:</text:span> APT looks in the <text:span text:style-name="T1">Cache</text:span> to find exactly which warehouse has the program, then goes and gets it for me.</text:p>
        </text:list-item>
      </text:list>
      <text:h text:style-name="P27" text:outline-level="2">Types of Cache I Might See</text:h>
      <text:list text:style-name="L11">
        <text:list-item>
          <text:p text:style-name="P35"><text:span text:style-name="T1">The Info Cache:</text:span> This is the list of names and descriptions (what I search with <text:span text:style-name="Source_20_Text"><text:span text:style-name="T2">apt-cache</text:span></text:span>).</text:p>
        </text:list-item>
        <text:list-item>
          <text:p text:style-name="P36"><text:soft-page-break/><text:span text:style-name="T1">The File Cache:</text:span> When I download a program, APT often keeps a copy of the installer (the <text:span text:style-name="Source_20_Text"><text:span text:style-name="T2">.deb</text:span></text:span> file) in a folder on my computer (usually <text:span text:style-name="Source_20_Text"><text:span text:style-name="T2">/var/cache/apt/archives/</text:span></text:span>) just in case I need to install it again later without using the internet.</text:p>
        </text:list-item>
      </text:list>
      <text:p text:style-name="Horizontal_20_Line"/>
      <text:p text:style-name="P20">Summary for my notes:</text:p>
      <text:list text:style-name="L12">
        <text:list-item>
          <text:p text:style-name="P37"><text:span text:style-name="T1">APT</text:span> = The <text:span text:style-name="T1">Manager</text:span> who does the work of installing and updating.</text:p>
        </text:list-item>
        <text:list-item>
          <text:p text:style-name="P38"><text:span text:style-name="T1">Cache</text:span> = The <text:span text:style-name="T1">Catalog</text:span> and <text:span text:style-name="T1">Storage</text:span> that makes the process fast and efficient.</text:p>
        </text:list-item>
      </text:list>
      <text:p text:style-name="P11"><text:span text:style-name="T1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2:44:20.186474515</meta:creation-date>
    <dc:date>2026-05-11T12:55:19.902763980</dc:date>
    <meta:editing-duration>PT11M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5" meta:paragraph-count="47" meta:word-count="871" meta:character-count="4559" meta:non-whitespace-character-count="3764"/>
  </office:meta>
</office:document-meta>
</file>