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2354in" table:align="left"/>
    </style:style>
    <style:style style:name="Table1.A" style:family="table-column">
      <style:table-column-properties style:column-width="1.8326in"/>
    </style:style>
    <style:style style:name="Table1.B" style:family="table-column">
      <style:table-column-properties style:column-width="1.7882in"/>
    </style:style>
    <style:style style:name="Table1.C" style:family="table-column">
      <style:table-column-properties style:column-width="2.6146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Heading_20_2">
      <style:paragraph-properties fo:margin-left="0in" fo:margin-right="0in" fo:text-indent="0in" style:auto-text-indent="false"/>
      <style:text-properties fo:font-weight="bold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size="15pt" fo:font-weight="bold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</style:style>
    <style:style style:name="P5" style:family="paragraph" style:parent-style-name="Heading_20_2">
      <style:paragraph-properties fo:margin-left="0in" fo:margin-right="0in" fo:text-indent="0in" style:auto-text-indent="false"/>
      <style:text-properties fo:font-size="15pt" fo:font-weight="bold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Text_20_body" style:list-style-name="L2">
      <style:paragraph-properties fo:margin-left="0in" fo:margin-right="0in" fo:text-indent="0in" style:auto-text-indent="false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3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13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4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15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bold"/>
    </style:style>
    <style:style style:name="P16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7" style:family="paragraph" style:parent-style-name="Text_20_body" style:list-style-name="L5">
      <style:paragraph-properties fo:margin-left="0in" fo:margin-right="0in" fo:text-indent="0in" style:auto-text-indent="false"/>
    </style:style>
    <style:style style:name="P18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19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Text_20_body" style:list-style-name="L6">
      <style:paragraph-properties fo:margin-left="0in" fo:margin-right="0in" fo:text-indent="0in" style:auto-text-indent="false"/>
    </style:style>
    <style:style style:name="P21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22" style:family="paragraph" style:parent-style-name="Text_20_body" style:list-style-name="L7">
      <style:paragraph-properties fo:margin-left="0in" fo:margin-right="0in" fo:text-indent="0in" style:auto-text-indent="false"/>
    </style:style>
    <style:style style:name="P23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24" style:family="paragraph" style:parent-style-name="Table_20_Heading">
      <style:paragraph-properties fo:margin-left="0in" fo:margin-right="0in" fo:text-align="start" style:justify-single-word="false" fo:text-indent="0in" style:auto-text-indent="false" style:writing-mode="lr-tb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weight="bold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27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28" style:family="paragraph" style:parent-style-name="Text_20_body" style:list-style-name="L8">
      <style:paragraph-properties fo:margin-top="0in" fo:margin-bottom="0in" style:contextual-spacing="false"/>
    </style:style>
    <style:style style:name="P29" style:family="paragraph" style:parent-style-name="Text_20_body" style:list-style-name="L8"/>
    <style:style style:name="P30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31" style:family="paragraph" style:parent-style-name="Heading_20_2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3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</style:style>
    <style:style style:name="P35" style:family="paragraph" style:parent-style-name="Text_20_body" style:list-style-name="L11">
      <style:paragraph-properties fo:margin-left="0in" fo:margin-right="0in" fo:text-indent="0in" style:auto-text-indent="false"/>
    </style:style>
    <style:style style:name="P36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fo:font-size="15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5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6" style:family="text">
      <style:text-properties fo:font-weight="normal"/>
    </style:style>
    <style:style style:name="T7" style:family="text">
      <style:text-properties fo:font-weight="normal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8" style:family="text">
      <style:text-properties fo:font-size="15pt" fo:font-weight="bold"/>
    </style:style>
    <style:style style:name="T9" style:family="text">
      <style:text-properties fo:font-size="15pt"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The Command: sudo apt-get update</text:span></text:h>
      <text:p text:style-name="P2"/>
      <text:list text:style-name="L1">
        <text:list-item>
          <text:p text:style-name="P3"><text:span text:style-name="T2">The "In Plain English" Definition:</text:span> This is like my computer calling up the Software Repositories and asking, "Is there anything new since the last time we talked?"</text:p>
        </text:list-item>
        <text:list-item>
          <text:p text:style-name="P4"><text:span text:style-name="T2">What it DOES NOT do:</text:span> This command <text:span text:style-name="T2">does not</text:span> actually install or upgrade any software on my system. It only updates the <text:span text:style-name="Emphasis"><text:span text:style-name="T3">list</text:span></text:span> of what is available.</text:p>
        </text:list-item>
      </text:list>
      <text:p text:style-name="Horizontal_20_Line"/>
      <text:h text:style-name="P5" text:outline-level="2">How it works step-by-step</text:h>
      <text:list text:style-name="L2">
        <text:list-item>
          <text:p text:style-name="P6"><text:span text:style-name="T2">I use </text:span><text:span text:style-name="Source_20_Text"><text:span text:style-name="T4">sudo</text:span></text:span><text:span text:style-name="T2">:</text:span> I need "Boss Mode" because I am changing system-level files (the software catalog).</text:p>
        </text:list-item>
        <text:list-item>
          <text:p text:style-name="P6"><text:span text:style-name="T2">My computer checks its "Address Book":</text:span> It looks at a file on my hard drive (called <text:span text:style-name="Source_20_Text"><text:span text:style-name="T5">sources.list</text:span></text:span>) to see which warehouse websites it should visit.</text:p>
        </text:list-item>
        <text:list-item>
          <text:p text:style-name="P7"><text:span text:style-name="T2">The "Download":</text:span> It downloads a fresh version of the package index files. These files contain the names, versions, and descriptions of every piece of software currently in the warehouse.</text:p>
        </text:list-item>
        <text:list-item>
          <text:p text:style-name="P8"><text:span text:style-name="T2">The "Update":</text:span> It replaces my old, dusty <text:span text:style-name="T2">Cache</text:span> (the catalog under the counter) with this brand-new one.</text:p>
        </text:list-item>
      </text:list>
      <text:p text:style-name="Horizontal_20_Line"/>
      <text:h text:style-name="P5" text:outline-level="2">Why I must do this</text:h>
      <text:list text:style-name="L3">
        <text:list-item>
          <text:p text:style-name="P9"><text:span text:style-name="T2">To find new apps:</text:span> If a new program was added to the warehouse yesterday, I won't be able to find it with <text:span text:style-name="Source_20_Text"><text:span text:style-name="T5">apt-cache search</text:span></text:span> or install it until I run <text:span text:style-name="Source_20_Text"><text:span text:style-name="T5">update</text:span></text:span>.</text:p>
        </text:list-item>
        <text:list-item>
          <text:p text:style-name="P10"><text:span text:style-name="T2">To see security fixes:</text:span> If a program I use (like <text:span text:style-name="T2">GCC</text:span>) has a bug fix, I won't know about it until my catalog is updated to show the newer version number.</text:p>
        </text:list-item>
        <text:list-item>
          <text:p text:style-name="P11"><text:span text:style-name="T2">Safety:</text:span> It ensures that when I do decide to install something, I am getting the version that the developers currently recommend.</text:p>
        </text:list-item>
      </text:list>
      <text:h text:style-name="P5" text:outline-level="2">The Typical Workflow</text:h>
      <text:p text:style-name="P12">I usually run this right before I do anything else. My standard "Maintenance" routine looks like this:</text:p>
      <text:list text:style-name="L4">
        <text:list-item>
          <text:p text:style-name="P13"><text:span text:style-name="Source_20_Text"><text:span text:style-name="T4">sudo apt-get update</text:span></text:span> (Refresh the catalog).</text:p>
        </text:list-item>
        <text:list-item>
          <text:p text:style-name="P13"><text:span text:style-name="Source_20_Text"><text:span text:style-name="T4">apt-cache search ...</text:span></text:span> (Find what I want).</text:p>
        </text:list-item>
        <text:list-item>
          <text:p text:style-name="P14"><text:span text:style-name="Source_20_Text"><text:span text:style-name="T4">sudo apt-get install ...</text:span></text:span> (Bring it home).</text:p>
        </text:list-item>
      </text:list>
      <text:p text:style-name="Horizontal_20_Line"/>
      <text:p text:style-name="P15"><text:soft-page-break/>Summary for my notes:</text:p>
      <text:list text:style-name="L5">
        <text:list-item>
          <text:p text:style-name="P16"><text:span text:style-name="Source_20_Text"><text:span text:style-name="T4">update</text:span></text:span> = Refresh the <text:span text:style-name="T2">list</text:span> of available software.</text:p>
        </text:list-item>
        <text:list-item>
          <text:p text:style-name="P17"><text:span text:style-name="T2">Analogy</text:span> = Getting the newest edition of a store's catalog so I can see the latest prices and products.</text:p>
        </text:list-item>
      </text:list>
      <text:p text:style-name="P18"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" text:outline-level="2"><text:soft-page-break/>1. sudo apt-get update (The "Catalog Refresh")</text:h>
      <text:p text:style-name="P2"/>
      <text:list text:style-name="L6">
        <text:list-item>
          <text:p text:style-name="P19"><text:span text:style-name="T2">What I am doing:</text:span> I am updating the <text:span text:style-name="T2">list</text:span> of available software.</text:p>
        </text:list-item>
        <text:list-item>
          <text:p text:style-name="P19"><text:span text:style-name="T2">What actually happens:</text:span> My computer talks to the internet and updates its package index. It now knows if there are newer versions of my apps, but it <text:span text:style-name="T2">hasn't changed</text:span> my apps yet.</text:p>
        </text:list-item>
        <text:list-item>
          <text:p text:style-name="P20"><text:span text:style-name="T2">Analogy:</text:span> I am downloading the <text:span text:style-name="T2">newest IKEA catalog</text:span>. I can see the new furniture, but my house still has the old furniture in it.</text:p>
        </text:list-item>
      </text:list>
      <text:h text:style-name="P5" text:outline-level="2">2. sudo apt-get upgrade (The "Actual Installation")</text:h>
      <text:p text:style-name="P2"/>
      <text:list text:style-name="L7">
        <text:list-item>
          <text:p text:style-name="P21"><text:span text:style-name="T2">What I am doing:</text:span> I am telling the system to actually download and install the new versions.</text:p>
        </text:list-item>
        <text:list-item>
          <text:p text:style-name="P21"><text:span text:style-name="T2">What actually happens:</text:span> APT looks at the new "Catalog" I just downloaded. It compares the versions in the catalog to the versions I have on my computer. If it finds a newer version, it replaces the old one.</text:p>
        </text:list-item>
        <text:list-item>
          <text:p text:style-name="P22"><text:span text:style-name="T2">Analogy:</text:span> I am actually <text:span text:style-name="T2">ordering the new furniture</text:span> from the catalog to replace my old stuff.</text:p>
        </text:list-item>
      </text:list>
      <text:p text:style-name="Horizontal_20_Line"/>
      <text:h text:style-name="P5" text:outline-level="2">The Key Difference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Feature</text:p>
          </table:table-cell>
          <table:table-cell table:style-name="Table1.A1" office:value-type="string">
            <text:p text:style-name="P24"><text:span text:style-name="Source_20_Text"><text:span text:style-name="T5">update</text:span></text:span></text:p>
          </table:table-cell>
          <table:table-cell table:style-name="Table1.A1" office:value-type="string">
            <text:p text:style-name="P24"><text:span text:style-name="Source_20_Text"><text:span text:style-name="T5">upgrade</text:span></text:span></text:p>
          </table:table-cell>
        </table:table-row>
        <table:table-row>
          <table:table-cell table:style-name="Table1.A1" office:value-type="string">
            <text:p text:style-name="P25">Does it change my apps?</text:p>
          </table:table-cell>
          <table:table-cell table:style-name="Table1.A1" office:value-type="string">
            <text:p text:style-name="P26">No.</text:p>
          </table:table-cell>
          <table:table-cell table:style-name="Table1.A1" office:value-type="string">
            <text:p text:style-name="P26">Yes.</text:p>
          </table:table-cell>
        </table:table-row>
        <table:table-row>
          <table:table-cell table:style-name="Table1.A1" office:value-type="string">
            <text:p text:style-name="P25">Does it use a lot of data?</text:p>
          </table:table-cell>
          <table:table-cell table:style-name="Table1.A1" office:value-type="string">
            <text:p text:style-name="P26">Very little (just text files).</text:p>
          </table:table-cell>
          <table:table-cell table:style-name="Table1.A1" office:value-type="string">
            <text:p text:style-name="P26">Can be a lot (downloads whole apps).</text:p>
          </table:table-cell>
        </table:table-row>
        <table:table-row>
          <table:table-cell table:style-name="Table1.A1" office:value-type="string">
            <text:p text:style-name="P25">Do I need internet?</text:p>
          </table:table-cell>
          <table:table-cell table:style-name="Table1.A1" office:value-type="string">
            <text:p text:style-name="P26">Yes.</text:p>
          </table:table-cell>
          <table:table-cell table:style-name="Table1.A1" office:value-type="string">
            <text:p text:style-name="P26">Yes.</text:p>
          </table:table-cell>
        </table:table-row>
        <table:table-row>
          <table:table-cell table:style-name="Table1.A1" office:value-type="string">
            <text:p text:style-name="P25">When do I run it?</text:p>
          </table:table-cell>
          <table:table-cell table:style-name="Table1.A1" office:value-type="string">
            <text:p text:style-name="P25">First.</text:p>
          </table:table-cell>
          <table:table-cell table:style-name="Table1.A1" office:value-type="string">
            <text:p text:style-name="P25">Second.</text:p>
          </table:table-cell>
        </table:table-row>
      </table:table>
      <text:p text:style-name="Horizontal_20_Line"/>
      <text:h text:style-name="P5" text:outline-level="2">Why I must run them in order</text:h>
      <text:p text:style-name="P18"><text:span text:style-name="T6">If I run </text:span><text:span text:style-name="Source_20_Text"><text:span text:style-name="T7">sudo apt-get upgrade</text:span></text:span><text:span text:style-name="T6"> </text:span><text:span text:style-name="T2">without</text:span><text:span text:style-name="T6"> running </text:span><text:span text:style-name="Source_20_Text"><text:span text:style-name="T7">update</text:span></text:span><text:span text:style-name="T6"> first:</text:span></text:p>
      <text:list text:style-name="L8">
        <text:list-item>
          <text:p text:style-name="P27">My computer looks at its <text:span text:style-name="T2">old</text:span> catalog.</text:p>
        </text:list-item>
        <text:list-item>
          <text:p text:style-name="P28">It sees that I have the "latest" version according to that old list.</text:p>
        </text:list-item>
        <text:list-item>
          <text:p text:style-name="P29">It says "Nothing to do!" even if a newer version is actually waiting in the warehouse.</text:p>
        </text:list-item>
      </text:list>
      <text:p text:style-name="P18"><text:soft-page-break/><text:span text:style-name="T2">The "Standard One-Two Punch" command:</text:span><text:span text:style-name="T6"><text:line-break/>In the Linux world, I will often see people combine them into one line like this:<text:line-break/></text:span><text:span text:style-name="Source_20_Text"><text:span text:style-name="T7">sudo apt-get update &amp;&amp; sudo apt-get upgrade</text:span></text:span></text:p>
      <text:list text:style-name="L9">
        <text:list-item>
          <text:p text:style-name="P30">The <text:span text:style-name="Source_20_Text"><text:span text:style-name="T4">&amp;&amp;</text:span></text:span> just means "Do the first thing, and if it works, immediately do the second thing."</text:p>
        </text:list-item>
      </text:list>
      <text:p text:style-name="Horizontal_20_Line"/>
      <text:h text:style-name="P31" text:outline-level="2"><text:span text:style-name="T8">What about </text:span><text:span text:style-name="Source_20_Text"><text:span text:style-name="T9">sudo apt upgrade</text:span></text:span><text:span text:style-name="T8"> (The "Newer" way)?</text:span></text:h>
      <text:p text:style-name="P18"><text:span text:style-name="T6">I might notice some people don't use the </text:span><text:span text:style-name="Source_20_Text"><text:span text:style-name="T7">-get</text:span></text:span><text:span text:style-name="T6"> part.</text:span></text:p>
      <text:list text:style-name="L10">
        <text:list-item>
          <text:p text:style-name="P32"><text:span text:style-name="Source_20_Text"><text:span text:style-name="T4">apt-get</text:span></text:span> is the "classic" tool used in scripts and older tutorials.</text:p>
        </text:list-item>
        <text:list-item>
          <text:p text:style-name="P32"><text:span text:style-name="Source_20_Text"><text:span text:style-name="T4">apt</text:span></text:span> is the newer, "user-friendly" version. It does the same thing but adds a nice <text:span text:style-name="T2">progress bar</text:span> at the bottom so I can see how much is left to download.</text:p>
        </text:list-item>
        <text:list-item>
          <text:p text:style-name="P33"><text:span text:style-name="T2">For my notes:</text:span> They are essentially the same. For a person like me, <text:span text:style-name="Source_20_Text"><text:span text:style-name="T5">sudo apt upgrade</text:span></text:span> is usually nicer to look at!</text:p>
        </text:list-item>
      </text:list>
      <text:p text:style-name="Horizontal_20_Line"/>
      <text:p text:style-name="P15">Summary for my notes:</text:p>
      <text:list text:style-name="L11">
        <text:list-item>
          <text:p text:style-name="P34"><text:span text:style-name="T2">Update</text:span> = Get the list of what's new.</text:p>
        </text:list-item>
        <text:list-item>
          <text:p text:style-name="P35"><text:span text:style-name="T2">Upgrade</text:span> = Actually install the new stuff.</text:p>
        </text:list-item>
      </text:list>
      <text:p text:style-name="P15"/>
      <text:p text:style-name="P36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1T13:17:24.643677414</meta:creation-date>
    <dc:date>2026-05-11T13:23:17.506388706</dc:date>
    <meta:editing-duration>PT5M52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4" meta:paragraph-count="59" meta:word-count="734" meta:character-count="3918" meta:non-whitespace-character-count="3272"/>
  </office:meta>
</office:document-meta>
</file>