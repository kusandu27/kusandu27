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/>
      <style:text-properties fo:font-weight="bold"/>
    </style:style>
    <style:style style:name="P2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 style:writing-mode="lr-tb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4" style:family="paragraph" style:parent-style-name="Heading_20_2">
      <style:paragraph-properties fo:margin-left="0in" fo:margin-right="0in" fo:text-indent="0in" style:auto-text-indent="false"/>
      <style:text-properties fo:font-size="15pt" fo:font-weight="bold"/>
    </style:style>
    <style:style style:name="P5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</style:style>
    <style:style style:name="P6" style:family="paragraph" style:parent-style-name="Text_20_body" style:list-style-name="L1">
      <style:paragraph-properties fo:margin-left="0in" fo:margin-right="0in" fo:text-indent="0in" style:auto-text-indent="false"/>
    </style:style>
    <style:style style:name="P7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/>
      <style:text-properties fo:font-weight="normal"/>
    </style:style>
    <style:style style:name="P8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9" style:family="paragraph" style:parent-style-name="Text_20_body" style:list-style-name="L2">
      <style:paragraph-properties fo:margin-left="0in" fo:margin-right="0in" fo:text-indent="0in" style:auto-text-indent="false"/>
    </style:style>
    <style:style style:name="P10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/>
    </style:style>
    <style:style style:name="P11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12" style:family="paragraph" style:parent-style-name="Text_20_body" style:list-style-name="L3">
      <style:paragraph-properties fo:margin-left="0in" fo:margin-right="0in" fo:text-indent="0in" style:auto-text-indent="false" style:writing-mode="lr-tb"/>
    </style:style>
    <style:style style:name="P13" style:family="paragraph" style:parent-style-name="Text_20_body">
      <style:paragraph-properties fo:margin-left="0in" fo:margin-right="0in" fo:text-indent="0in" style:auto-text-indent="false" style:writing-mode="lr-tb"/>
    </style:style>
    <style:style style:name="P14" style:family="paragraph" style:parent-style-name="Text_20_body">
      <style:paragraph-properties fo:margin-left="0in" fo:margin-right="0in" fo:text-indent="0in" style:auto-text-indent="false" style:writing-mode="lr-tb"/>
      <style:text-properties officeooo:rsid="00067dbe" officeooo:paragraph-rsid="00067dbe"/>
    </style:style>
    <style:style style:name="P15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/>
    </style:style>
    <style:style style:name="T1" style:family="text">
      <style:text-properties fo:font-size="15pt"/>
    </style:style>
    <style:style style:name="T2" style:family="text">
      <style:text-properties fo:font-weight="normal"/>
    </style:style>
    <style:style style:name="T3" style:family="text">
      <style:text-properties fo:font-weight="normal" fo:background-color="#f4f6f7" loext:char-shading-value="0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T4" style:family="text">
      <style:text-properties fo:font-weight="bold" fo:background-color="#ffff00" loext:char-shading-value="0" style:font-weight-asian="bold" style:font-weight-complex="bold" loext:padding="0in" loext:border="none"/>
    </style:style>
    <style:style style:name="T5" style:family="text">
      <style:text-properties fo:color="#188038" loext:opacity="100%" fo:font-weight="bold" fo:background-color="#ffff00" loext:char-shading-value="0" style:font-weight-asian="bold" style:font-weight-complex="bold" loext:padding="0in" loext:border="none"/>
    </style:style>
    <style:style style:name="T6" style:family="text">
      <style:text-properties fo:color="#000080" loext:opacity="100%" fo:font-weight="bold" fo:background-color="#ffff00" loext:char-shading-value="0" style:font-weight-asian="bold" style:font-weight-complex="bold"/>
    </style:style>
    <style:style style:name="T7" style:family="text">
      <style:text-properties fo:color="#cccccc" loext:opacity="100%" fo:font-weight="bold" fo:background-color="#ffff00" loext:char-shading-value="0" style:font-weight-asian="bold" style:font-weight-complex="bold"/>
    </style:style>
    <style:style style:name="T8" style:family="text">
      <style:text-properties fo:font-weight="bold"/>
    </style:style>
    <style:style style:name="T9" style:family="text">
      <style:text-properties fo:color="#b45908" loext:opacity="100%" fo:font-weight="bold" fo:background-color="#ffff00" loext:char-shading-value="0" style:font-weight-asian="bold" style:font-weight-complex="bold" loext:padding="0in" loext:border="none"/>
    </style:style>
    <style:style style:name="T10" style:family="text">
      <style:text-properties style:text-underline-style="none" fo:font-weight="bold" fo:background-color="#ffff00" loext:char-shading-value="0"/>
    </style:style>
    <style:style style:name="T11" style:family="text">
      <style:text-properties fo:background-color="#f4f6f7" loext:char-shading-value="0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1">1. Creating Files in Folders</text:span></text:h>
      <text:p text:style-name="P2"><text:span text:style-name="T2">Use </text:span><text:span text:style-name="Source_20_Text"><text:span text:style-name="T3">mkdir -p</text:span></text:span><text:span text:style-name="T2"> to create a directory and </text:span><text:span text:style-name="Source_20_Text"><text:span text:style-name="T3">tee</text:span></text:span><text:span text:style-name="T2"> to save text into a file within that folder.</text:span></text:p>
      <text:p text:style-name="P3"><text:span text:style-name="Source_20_Text"><text:span text:style-name="T4">mkdir -p super_secret_stuff &amp;&amp; echo </text:span></text:span><text:span text:style-name="Source_20_Text"><text:span text:style-name="T5">"this is a test"</text:span></text:span><text:span text:style-name="Source_20_Text"><text:span text:style-name="T4"> | tee super_secret_stuff/top_secret.txt</text:span></text:span></text:p>
      <text:h text:style-name="P4" text:outline-level="2">2. Indexing &amp; Finding Files</text:h>
      <text:p text:style-name="P2"><text:span text:style-name="T2">Update your system database and use </text:span><text:span text:style-name="Source_20_Text"><text:span text:style-name="T3">locate</text:span></text:span><text:span text:style-name="T2"> for instant file searching.</text:span></text:p>
      <text:list text:style-name="L1">
        <text:list-item>
          <text:p text:style-name="P5"><text:a xlink:type="simple" xlink:href="https://man7.org/linux/man-pages/man1/find.1.html" text:style-name="Internet_20_link" text:visited-style-name="Visited_20_Internet_20_Link"><text:span text:style-name="T6">sudo updatedb</text:span></text:a><text:span text:style-name="T7">:</text:span> Refreshes the file database.</text:p>
        </text:list-item>
        <text:list-item>
          <text:p text:style-name="P6"><text:span text:style-name="T8">locate */top_secret.txt:</text:span> Quickly finds the file path.</text:p>
        </text:list-item>
      </text:list>
      <text:h text:style-name="P4" text:outline-level="2">3. Advanced Search &amp; Report</text:h>
      <text:p text:style-name="P7">Find files over 1MB, limit depth to 4 levels, and generate a detailed list.</text:p>
      <text:p text:style-name="P3"><text:span text:style-name="Source_20_Text"><text:span text:style-name="T4">sudo find / -maxdepth </text:span></text:span><text:span text:style-name="Source_20_Text"><text:span text:style-name="T9">4</text:span></text:span><text:span text:style-name="Source_20_Text"><text:span text:style-name="T4"> -type f -size +</text:span></text:span><text:span text:style-name="Source_20_Text"><text:span text:style-name="T9">1</text:span></text:span><text:span text:style-name="Source_20_Text"><text:span text:style-name="T4">M -exec ls -lh {} +</text:span></text:span></text:p>
      <text:list text:style-name="L2">
        <text:list-item>
          <text:p text:style-name="P8"><text:a xlink:type="simple" xlink:href="https://linux.die.net/man/1/tee" text:style-name="Internet_20_link" text:visited-style-name="Visited_20_Internet_20_Link"><text:span text:style-name="T10">-exec ... {} +</text:span></text:a><text:span text:style-name="T8">:</text:span> Runs a command (like <text:span text:style-name="Source_20_Text"><text:span text:style-name="T11">ls</text:span></text:span>) on every result. Using <text:span text:style-name="Source_20_Text"><text:span text:style-name="T11">+</text:span></text:span> is faster than <text:span text:style-name="Source_20_Text"><text:span text:style-name="T11">\;</text:span></text:span> because it groups files together.</text:p>
        </text:list-item>
        <text:list-item>
          <text:p text:style-name="P9"><text:span text:style-name="T8">ls -lh:</text:span> Shows "Human-readable" sizes (e.g., 10M instead of bytes).</text:p>
        </text:list-item>
      </text:list>
      <text:h text:style-name="P4" text:outline-level="2">4. Sorting &amp; Saving Results</text:h>
      <text:p text:style-name="P2"><text:span text:style-name="T2">Pipe the search results into </text:span><text:span text:style-name="Source_20_Text"><text:span text:style-name="T3">sort</text:span></text:span><text:span text:style-name="T2"> and save them to a text file.</text:span></text:p>
      <text:p text:style-name="P3"><text:span text:style-name="Source_20_Text"><text:span text:style-name="T4">sudo find / -maxdepth </text:span></text:span><text:span text:style-name="Source_20_Text"><text:span text:style-name="T9">4</text:span></text:span><text:span text:style-name="Source_20_Text"><text:span text:style-name="T4"> -type f -size +</text:span></text:span><text:span text:style-name="Source_20_Text"><text:span text:style-name="T9">1</text:span></text:span><text:span text:style-name="Source_20_Text"><text:span text:style-name="T4">M -exec ls -lh {} + | sort -hr -k5 &gt; ~/filesizes.txt</text:span></text:span></text:p>
      <text:list text:style-name="L3">
        <text:list-item>
          <text:p text:style-name="P10"><text:span text:style-name="T8">sort -hr:</text:span> Sorts by human-readable numbers in reverse (largest first).</text:p>
        </text:list-item>
        <text:list-item>
          <text:p text:style-name="P11"><text:span text:style-name="T8">-k5:</text:span> Targets the 5th column (the size column in <text:span text:style-name="Source_20_Text"><text:span text:style-name="T11">ls -l</text:span></text:span>).</text:p>
        </text:list-item>
        <text:list-item>
          <text:p text:style-name="P12"><text:a xlink:type="simple" xlink:href="https://www.gnu.org/software/bash/manual/html_node/Quoting.html" text:style-name="Internet_20_link" text:visited-style-name="Visited_20_Internet_20_Link"><text:span text:style-name="T8">&gt;</text:span></text:a><text:span text:style-name="T8">:</text:span> Redirects the final list into <text:span text:style-name="Source_20_Text"><text:span text:style-name="T11">filesizes.txt</text:span></text:span>.</text:p>
        </text:list-item>
      </text:list>
      <text:p text:style-name="P13"/>
      <text:p text:style-name="P14">Task 1 - mkdir -p super_secret_stuff &amp;&amp; echo "this is a test" | tee super_secret_stuff/top_secret.txt</text:p>
      <text:p text:style-name="P14"/>
      <text:p text:style-name="P14">Task 2 - sudo find / -maxdepth 4 -type f -size +1M -exec ls -lh {} + | sort -hr -k5 &gt; ~/filesizes.txt</text:p>
      <text:p text:style-name="P15"/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4T15:51:43.625732167</meta:creation-date>
    <dc:date>2026-05-04T16:21:20.236228778</dc:date>
    <meta:editing-duration>PT8M26S</meta:editing-duration>
    <meta:editing-cycles>1</meta:editing-cycles>
    <meta:document-statistic meta:table-count="0" meta:image-count="0" meta:object-count="0" meta:page-count="2" meta:paragraph-count="20" meta:word-count="241" meta:character-count="1306" meta:non-whitespace-character-count="1092"/>
    <meta:generator>LibreOffice/25.2.3.2$Linux_X86_64 LibreOffice_project/520$Build-2</meta:generator>
  </office:meta>
</office:document-meta>
</file>