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Standard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10" style:family="paragraph" style:parent-style-name="Heading_20_2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2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4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5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font-weight="normal"/>
    </style:style>
    <style:style style:name="P16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7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8" style:family="paragraph" style:parent-style-name="Heading_20_2">
      <style:paragraph-properties fo:margin-left="0in" fo:margin-right="0in" fo:text-indent="0in" style:auto-text-indent="false"/>
      <style:text-properties fo:font-size="15pt" fo:font-weight="bold"/>
    </style:style>
    <style:style style:name="P19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0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21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 style:writing-mode="lr-tb"/>
    </style:style>
    <style:style style:name="P22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weight="normal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4" style:family="text">
      <style:text-properties fo:font-size="15pt" fo:font-weight="bold"/>
    </style:style>
    <style:style style:name="T5" style:family="text">
      <style:text-properties fo:font-size="15pt"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6" style:family="text">
      <style:text-properties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style:style style:name="T7" style:family="text">
      <style:text-properties fo:font-weight="bold" fo:background-color="#f4f6f7" loext:char-shading-value="0" loext:padding-left="0.0417in" loext:padding-right="0in" loext:padding-top="0.0209in" loext:padding-bottom="0.0209in" loext:border-left="0.06pt solid #f4f6f7" loext:border-right="none" loext:border-top="0.06pt solid #f4f6f7" loext:border-bottom="0.06pt solid #f4f6f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1. <text:span text:style-name="Source_20_Text">ls -l /etc</text:span></text:h>
      <text:p text:style-name="Text_20_body">👉 Lists files inside <text:span text:style-name="Source_20_Text">/etc</text:span> (a system folder)</text:p>
      <text:list text:style-name="L1">
        <text:list-item>
          <text:p text:style-name="P1"><text:span text:style-name="Source_20_Text">ls</text:span> → list files</text:p>
        </text:list-item>
        <text:list-item>
          <text:p text:style-name="P1"><text:span text:style-name="Source_20_Text">-l</text:span> → long format (more details)</text:p>
        </text:list-item>
      </text:list>
      <text:p text:style-name="Text_20_body">So you’ll see stuff like:</text:p>
      <text:list text:style-name="L2">
        <text:list-item>
          <text:p text:style-name="P2">permissions</text:p>
        </text:list-item>
        <text:list-item>
          <text:p text:style-name="P2">owner</text:p>
        </text:list-item>
        <text:list-item>
          <text:p text:style-name="P2">size</text:p>
        </text:list-item>
        <text:list-item>
          <text:p text:style-name="P2">date</text:p>
        </text:list-item>
        <text:list-item>
          <text:p text:style-name="P2">filename</text:p>
        </text:list-item>
      </text:list>
      <text:p text:style-name="Horizontal_20_Line"/>
      <text:h text:style-name="Heading_20_3" text:outline-level="3">2. <text:span text:style-name="Source_20_Text">|</text:span></text:h>
      <text:p text:style-name="Text_20_body">👉 This is called a <text:span text:style-name="Strong_20_Emphasis">pipe</text:span></text:p>
      <text:p text:style-name="Text_20_body">It means:</text:p>
      <text:p text:style-name="Quotations">“Take the output from the left and send it to the right”</text:p>
      <text:p text:style-name="Horizontal_20_Line"/>
      <text:h text:style-name="Heading_20_3" text:outline-level="3">3. <text:span text:style-name="Source_20_Text">head -n 20</text:span></text:h>
      <text:p text:style-name="Text_20_body">👉 Shows only the <text:span text:style-name="Strong_20_Emphasis">first 20 lines</text:span></text:p>
      <text:list text:style-name="L3">
        <text:list-item>
          <text:p text:style-name="P3"><text:span text:style-name="Source_20_Text">head</text:span> → show top part</text:p>
        </text:list-item>
        <text:list-item>
          <text:p text:style-name="P3"><text:span text:style-name="Source_20_Text">-n 20</text:span> → limit to 20 lines</text:p>
        </text:list-item>
      </text:list>
      <text:p text:style-name="Horizontal_20_Line"/>
      <text:h text:style-name="Heading_20_2" text:outline-level="2">✅ Final meaning:</text:h>
      <text:p text:style-name="Quotations">“Show detailed list of files in <text:span text:style-name="Source_20_Text">/etc</text:span>, but only the first 20 results.”</text:p>
      <text:p text:style-name="Horizontal_20_Line"/>
      <text:h text:style-name="Heading_20_2" text:outline-level="2">💡 Real-life idea:</text:h>
      <text:p text:style-name="Text_20_body"><text:span text:style-name="Source_20_Text">/etc</text:span> has a LOT of files<text:line-break/>Without <text:span text:style-name="Source_20_Text">head</text:span>, your terminal gets flooded</text:p>
      <text:p text:style-name="Text_20_body"><text:soft-page-break/>So this:</text:p>
      <text:p text:style-name="P4"><text:span text:style-name="Source_20_Text">ls -l /etc | head -n 20</text:span></text:p>
      <text:p text:style-name="Text_20_body">👉 gives you a <text:span text:style-name="Strong_20_Emphasis">quick preview</text:span></text:p>
      <text:p text:style-name="Horizontal_20_Line"/>
      <text:h text:style-name="Heading_20_2" text:outline-level="2">🧠 Simple memory:</text:h>
      <text:list text:style-name="L4">
        <text:list-item>
          <text:p text:style-name="P5"><text:span text:style-name="Source_20_Text">ls -l</text:span> → detailed list</text:p>
        </text:list-item>
        <text:list-item>
          <text:p text:style-name="P5"><text:span text:style-name="Source_20_Text">|</text:span> → pass output</text:p>
        </text:list-item>
        <text:list-item>
          <text:p text:style-name="P5"><text:span text:style-name="Source_20_Text">head</text:span> → cut the top</text:p>
        </text:list-item>
      </text:list>
      <text:p text:style-name="Text_20_body">👉 Together:</text:p>
      <text:p text:style-name="Quotations">“Show me just the top part of a big list”</text:p>
      <text:p text:style-name="Horizontal_20_Line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🧠 <text:span text:style-name="Strong_20_Emphasis"><text:span text:style-name="Source_20_Text">head</text:span></text:span><text:span text:style-name="Strong_20_Emphasis"> (core idea)</text:span></text:h>
      <text:p text:style-name="Text_20_body">👉 It shows the <text:span text:style-name="Strong_20_Emphasis">beginning (top part)</text:span> of something</text:p>
      <text:p text:style-name="Text_20_body">By default:</text:p>
      <text:p text:style-name="P4"><text:span text:style-name="Source_20_Text">head file.txt</text:span></text:p>
      <text:p text:style-name="Text_20_body">➡️ shows <text:span text:style-name="Strong_20_Emphasis">first 10 lines</text:span></text:p>
      <text:p text:style-name="Horizontal_20_Line"/>
      <text:h text:style-name="Heading_20_2" text:outline-level="2">🔧 Most important option</text:h>
      <text:h text:style-name="Heading_20_3" text:outline-level="3"><text:span text:style-name="Source_20_Text">-n</text:span> → number of lines</text:h>
      <text:p text:style-name="P4"><text:span text:style-name="Source_20_Text">head -n 5 file.txt</text:span></text:p>
      <text:p text:style-name="Text_20_body">➡️ shows <text:span text:style-name="Strong_20_Emphasis">first 5 lines</text:span></text:p>
      <text:p text:style-name="P4"><text:span text:style-name="Source_20_Text">head -n 20 file.txt</text:span></text:p>
      <text:p text:style-name="Text_20_body">➡️ shows <text:span text:style-name="Strong_20_Emphasis">first 20 lines</text:span></text:p>
      <text:p text:style-name="Horizontal_20_Line"/>
      <text:h text:style-name="Heading_20_2" text:outline-level="2">🔄 It also works with pipes</text:h>
      <text:p text:style-name="Text_20_body">You don’t always need a file:</text:p>
      <text:p text:style-name="P4"><text:span text:style-name="Source_20_Text">ls -l | head</text:span></text:p>
      <text:p text:style-name="Text_20_body">➡️ shows first 10 results of <text:span text:style-name="Source_20_Text">ls</text:span></text:p>
      <text:p text:style-name="Horizontal_20_Line"/>
      <text:h text:style-name="Heading_20_2" text:outline-level="2">💡 Why people use it</text:h>
      <text:h text:style-name="Heading_20_3" text:outline-level="3">1. Big files (logs, data)</text:h>
      <text:p text:style-name="P4"><text:span text:style-name="Source_20_Text">head hugefile.txt</text:span></text:p>
      <text:p text:style-name="Text_20_body">➡️ quick preview without opening everything</text:p>
      <text:p text:style-name="Horizontal_20_Line"/>
      <text:h text:style-name="Heading_20_3" text:outline-level="3">2. Check if a file looks right</text:h>
      <text:p text:style-name="P4"><text:span text:style-name="Source_20_Text">head data.csv</text:span></text:p>
      <text:p text:style-name="Text_20_body">➡️ see column headers / first entries</text:p>
      <text:p text:style-name="Horizontal_20_Line"><text:soft-page-break/></text:p>
      <text:h text:style-name="Heading_20_3" text:outline-level="3">3. Combine with other commands</text:h>
      <text:p text:style-name="P4"><text:span text:style-name="Source_20_Text">sort -nr scores.txt | head -n 3</text:span></text:p>
      <text:p text:style-name="Text_20_body">➡️ top 3 highest scores 🔥</text:p>
      <text:p text:style-name="Horizontal_20_Line"/>
      <text:h text:style-name="Heading_20_2" text:outline-level="2">⚡ Bonus (slightly advanced but useful)</text:h>
      <text:h text:style-name="Heading_20_3" text:outline-level="3"><text:span text:style-name="Source_20_Text">-c</text:span> → by characters (not lines)</text:h>
      <text:p text:style-name="P4"><text:span text:style-name="Source_20_Text">head -c 50 file.txt</text:span></text:p>
      <text:p text:style-name="Text_20_body">➡️ shows first <text:span text:style-name="Strong_20_Emphasis">50 characters</text:span></text:p>
      <text:p text:style-name="Horizontal_20_Line"/>
      <text:h text:style-name="Heading_20_2" text:outline-level="2">🧠 Easy way to remember</text:h>
      <text:p text:style-name="Quotations"><text:span text:style-name="Source_20_Text">head</text:span> = top<text:line-break/><text:span text:style-name="Source_20_Text">tail</text:span> = bottom</text:p>
      <text:p text:style-name="Horizontal_20_Line"/>
      <text:h text:style-name="Heading_20_2" text:outline-level="2">🎯 Real-life analogy</text:h>
      <text:p text:style-name="Text_20_body">Think of a book:</text:p>
      <text:list text:style-name="L5">
        <text:list-item>
          <text:p text:style-name="P6"><text:span text:style-name="Source_20_Text">head</text:span> → read first page</text:p>
        </text:list-item>
        <text:list-item>
          <text:p text:style-name="P6"><text:span text:style-name="Source_20_Text">tail</text:span> → read last page</text:p>
        </text:list-item>
      </text:list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Horizontal_20_Line"/>
      <text:h text:style-name="Heading_20_2" text:outline-level="2">🧠 Full command:</text:h>
      <text:p text:style-name="P4"><text:span text:style-name="Source_20_Text">ls -l /etc | head -n 20 | sort -k 5</text:span></text:p>
      <text:p text:style-name="Horizontal_20_Line"/>
      <text:h text:style-name="Heading_20_2" text:outline-level="2">🔍 Step-by-step:</text:h>
      <text:h text:style-name="Heading_20_3" text:outline-level="3">1. <text:span text:style-name="Source_20_Text">ls -l /etc</text:span></text:h>
      <text:p text:style-name="Text_20_body">👉 Get detailed list of files</text:p>
      <text:p text:style-name="Horizontal_20_Line"/>
      <text:h text:style-name="Heading_20_3" text:outline-level="3">2. <text:span text:style-name="Source_20_Text">| head -n 20</text:span></text:h>
      <text:p text:style-name="Text_20_body">👉 Take only <text:span text:style-name="Strong_20_Emphasis">first 20 lines</text:span></text:p>
      <text:p text:style-name="Horizontal_20_Line"/>
      <text:h text:style-name="Heading_20_3" text:outline-level="3">3. <text:span text:style-name="Source_20_Text">| sort -k 5</text:span></text:h>
      <text:p text:style-name="Text_20_body">👉 Now it sorts based on <text:span text:style-name="Strong_20_Emphasis">column 5</text:span></text:p>
      <text:p text:style-name="Horizontal_20_Line"/>
      <text:h text:style-name="Heading_20_2" text:outline-level="2">❗ Important part: <text:span text:style-name="Source_20_Text">-k 5</text:span></text:h>
      <text:p text:style-name="Text_20_body">In <text:span text:style-name="Source_20_Text">ls -l</text:span>, columns look like this:</text:p>
      <text:p text:style-name="P4"><text:span text:style-name="Source_20_Text">-rw-r--r-- <text:s/>1 root root <text:s/>1200 May <text:s/>1 file.txt</text:span></text:p>
      <text:p text:style-name="Text_20_body">Columns:</text:p>
      <text:list text:style-name="L6">
        <text:list-item>
          <text:p text:style-name="P7">permissions</text:p>
        </text:list-item>
        <text:list-item>
          <text:p text:style-name="P7">links</text:p>
        </text:list-item>
        <text:list-item>
          <text:p text:style-name="P7">owner</text:p>
        </text:list-item>
        <text:list-item>
          <text:p text:style-name="P7">group</text:p>
        </text:list-item>
        <text:list-item>
          <text:p text:style-name="P7"><text:span text:style-name="Strong_20_Emphasis">size</text:span> 👈</text:p>
        </text:list-item>
        <text:list-item>
          <text:p text:style-name="P7">date</text:p>
        </text:list-item>
        <text:list-item>
          <text:p text:style-name="P7">name</text:p>
        </text:list-item>
      </text:list>
      <text:p text:style-name="Text_20_body">👉 So:</text:p>
      <text:p text:style-name="Quotations"><text:soft-page-break/><text:span text:style-name="Source_20_Text">-k 5</text:span> = sort by <text:span text:style-name="Strong_20_Emphasis">file size</text:span></text:p>
      <text:p text:style-name="Horizontal_20_Line"/>
      <text:h text:style-name="Heading_20_2" text:outline-level="2">🔥 Now your question: <text:span text:style-name="Source_20_Text">u</text:span>, <text:span text:style-name="Source_20_Text">r</text:span>, <text:span text:style-name="Source_20_Text">n</text:span> ?</text:h>
      <text:p text:style-name="Text_20_body">These are <text:span text:style-name="Strong_20_Emphasis">extra options you can add</text:span></text:p>
      <text:p text:style-name="Horizontal_20_Line"/>
      <text:h text:style-name="Heading_20_3" text:outline-level="3">✅ <text:span text:style-name="Source_20_Text">-n</text:span> (MOST IMPORTANT here)</text:h>
      <text:p text:style-name="P4"><text:span text:style-name="Source_20_Text">sort -k 5 -n</text:span></text:p>
      <text:p text:style-name="Text_20_body">👉 Sorts <text:span text:style-name="Strong_20_Emphasis">numerically</text:span> (correct for file sizes)</text:p>
      <text:p text:style-name="Text_20_body">Without <text:span text:style-name="Source_20_Text">-n</text:span>, it sorts like text (wrong sometimes)</text:p>
      <text:p text:style-name="Horizontal_20_Line"/>
      <text:h text:style-name="Heading_20_3" text:outline-level="3">✅ <text:span text:style-name="Source_20_Text">-r</text:span></text:h>
      <text:p text:style-name="P4"><text:span text:style-name="Source_20_Text">sort -k 5 -nr</text:span></text:p>
      <text:p text:style-name="Text_20_body">👉 Reverse order → <text:span text:style-name="Strong_20_Emphasis">biggest files first</text:span> 🔥</text:p>
      <text:p text:style-name="Horizontal_20_Line"/>
      <text:h text:style-name="Heading_20_3" text:outline-level="3">⚠️ <text:span text:style-name="Source_20_Text">-u</text:span></text:h>
      <text:p text:style-name="P4"><text:span text:style-name="Source_20_Text">sort -k 5 -u</text:span></text:p>
      <text:p text:style-name="Text_20_body">👉 Removes duplicates (same size lines)</text:p>
      <text:p text:style-name="Text_20_body">Not super useful here usually</text:p>
      <text:p text:style-name="Horizontal_20_Line"/>
      <text:h text:style-name="Heading_20_2" text:outline-level="2">💥 Best version (real use):</text:h>
      <text:p text:style-name="P4"><text:span text:style-name="Source_20_Text">ls -l /etc | head -n 20 | sort -k 5 -nr</text:span></text:p>
      <text:p text:style-name="Text_20_body">👉 Meaning:</text:p>
      <text:p text:style-name="Quotations">“Show first 20 files, then sort them by size (big → small)”</text:p>
      <text:p text:style-name="Horizontal_20_Line"/>
      <text:h text:style-name="Heading_20_2" text:outline-level="2">🧠 Easy way to think:</text:h>
      <text:list text:style-name="L7">
        <text:list-item>
          <text:p text:style-name="P8"><text:span text:style-name="Source_20_Text">-k 5</text:span> → focus on size</text:p>
        </text:list-item>
        <text:list-item>
          <text:p text:style-name="P8"><text:soft-page-break/><text:span text:style-name="Source_20_Text">-n</text:span> → numbers</text:p>
        </text:list-item>
        <text:list-item>
          <text:p text:style-name="P8"><text:span text:style-name="Source_20_Text">-r</text:span> → biggest first</text:p>
        </text:list-item>
        <text:list-item>
          <text:p text:style-name="P8"><text:span text:style-name="Source_20_Text">-u</text:span> → remove duplicates</text:p>
        </text:list-item>
      </text:list>
      <text:p text:style-name="Horizontal_20_Line"/>
      <text:h text:style-name="Heading_20_2" text:outline-level="2">⚡ Small pro tip (very important)</text:h>
      <text:p text:style-name="Text_20_body">Right now:</text:p>
      <text:p text:style-name="P4"><text:span text:style-name="Source_20_Text">head → sort</text:span></text:p>
      <text:p text:style-name="Text_20_body">So you're sorting <text:span text:style-name="Strong_20_Emphasis">only 20 files</text:span></text:p>
      <text:p text:style-name="Text_20_body">If you want better:</text:p>
      <text:p text:style-name="P4"><text:span text:style-name="Source_20_Text">ls -l /etc | sort -k 5 -nr | head -n 20</text:span></text:p>
      <text:p text:style-name="Text_20_body">👉 Now you:</text:p>
      <text:p text:style-name="Quotations">sort EVERYTHING → then take top 20 biggest files</text:p>
      <text:p text:style-name="Text_20_body">🔥 This is the correct way in real usage</text:p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9"><text:span text:style-name="T1">Think of these commands like a </text:span><text:span text:style-name="T2">factory assembly line</text:span><text:span text:style-name="T1">. Each part does one job and passes the result to the next person using the pipe symbol (</text:span><text:span text:style-name="Source_20_Text"><text:span text:style-name="T3">|</text:span></text:span><text:span text:style-name="T1">).</text:span></text:p>
      <text:h text:style-name="P10" text:outline-level="2"><text:span text:style-name="T4">1. The Starter: </text:span><text:span text:style-name="Source_20_Text"><text:span text:style-name="T5">ls -l /etc</text:span></text:span></text:h>
      <text:list text:style-name="L8">
        <text:list-item>
          <text:p text:style-name="P11"><text:span text:style-name="T2">What it does:</text:span> It asks Linux to "List" (<text:span text:style-name="Source_20_Text"><text:span text:style-name="T6">ls</text:span></text:span>) the contents of the <text:span text:style-name="Source_20_Text"><text:span text:style-name="T6">/etc</text:span></text:span> folder (where system settings live).</text:p>
        </text:list-item>
        <text:list-item>
          <text:p text:style-name="P12"><text:span text:style-name="T2">The </text:span><text:span text:style-name="Source_20_Text"><text:span text:style-name="T7">-l</text:span></text:span><text:span text:style-name="T2"> part:</text:span> This stands for <text:span text:style-name="T2">Long</text:span>. Instead of just a list of names, it gives you a row of details like "Who owns it," "How big is it," and "When was it made."</text:p>
        </text:list-item>
      </text:list>
      <text:h text:style-name="P10" text:outline-level="2"><text:span text:style-name="T4">2. The Filter: </text:span><text:span text:style-name="Source_20_Text"><text:span text:style-name="T5">head -n 20</text:span></text:span></text:h>
      <text:list text:style-name="L9">
        <text:list-item>
          <text:p text:style-name="P13"><text:span text:style-name="T2">What it does:</text:span> The <text:span text:style-name="Source_20_Text"><text:span text:style-name="T6">/etc</text:span></text:span> folder usually has hundreds of files. <text:span text:style-name="Source_20_Text"><text:span text:style-name="T6">head</text:span></text:span> tells Linux: "Only show me the very top (the head) of the list."</text:p>
        </text:list-item>
        <text:list-item>
          <text:p text:style-name="P14"><text:span text:style-name="T2">The </text:span><text:span text:style-name="Source_20_Text"><text:span text:style-name="T7">-n 20</text:span></text:span><text:span text:style-name="T2"> part:</text:span> This specifically asks for the <text:span text:style-name="T2">first 20 lines</text:span> only.</text:p>
        </text:list-item>
      </text:list>
      <text:h text:style-name="P10" text:outline-level="2"><text:span text:style-name="T4">3. The Organizer: </text:span><text:span text:style-name="Source_20_Text"><text:span text:style-name="T5">sort</text:span></text:span></text:h>
      <text:p text:style-name="P15">This is where you choose how to arrange those 20 lines.</text:p>
      <text:list text:style-name="L10">
        <text:list-item>
          <text:p text:style-name="P16"><text:span text:style-name="Source_20_Text"><text:span text:style-name="T7">sort -k 6M</text:span></text:span>:</text:p>
          <text:list>
            <text:list-item>
              <text:p text:style-name="P16"><text:span text:style-name="Source_20_Text"><text:span text:style-name="T7">-k 6</text:span></text:span>: Look at the <text:span text:style-name="T2">6th column</text:span> (which is the Month).</text:p>
            </text:list-item>
            <text:list-item>
              <text:p text:style-name="P16"><text:span text:style-name="Source_20_Text"><text:span text:style-name="T7">M</text:span></text:span>: Sort by <text:span text:style-name="T2">Month name</text:span> (so January comes before March). Without the <text:span text:style-name="Source_20_Text"><text:span text:style-name="T6">M</text:span></text:span>, Linux would sort alphabetically (April would come first).</text:p>
            </text:list-item>
          </text:list>
        </text:list-item>
        <text:list-item>
          <text:p text:style-name="P16"><text:span text:style-name="Source_20_Text"><text:span text:style-name="T7">sort -k 5hr</text:span></text:span>:</text:p>
          <text:list>
            <text:list-item>
              <text:p text:style-name="P16"><text:span text:style-name="Source_20_Text"><text:span text:style-name="T7">-k 5</text:span></text:span>: Look at the <text:span text:style-name="T2">5th column</text:span> (which is the File Size).</text:p>
            </text:list-item>
            <text:list-item>
              <text:p text:style-name="P16"><text:span text:style-name="Source_20_Text"><text:span text:style-name="T7">h</text:span></text:span>: <text:span text:style-name="T2">Human-friendly</text:span>. It understands that "10M" (Megabytes) is bigger than "100K" (Kilobytes).</text:p>
            </text:list-item>
            <text:list-item>
              <text:p text:style-name="P17"><text:span text:style-name="Source_20_Text"><text:span text:style-name="T7">r</text:span></text:span>: <text:span text:style-name="T2">Reverse</text:span>. It puts the biggest ones at the top instead of the smallest.</text:p>
            </text:list-item>
          </text:list>
        </text:list-item>
      </text:list>
      <text:p text:style-name="Horizontal_20_Line"/>
      <text:h text:style-name="P18" text:outline-level="2">Real World Example</text:h>
      <text:p text:style-name="P15">Imagine you have a stack of 100 messy papers:</text:p>
      <text:list text:style-name="L11">
        <text:list-item>
          <text:p text:style-name="P19"><text:span text:style-name="Source_20_Text"><text:span text:style-name="T7">ls -l</text:span></text:span>: You spread them out so you can see the dates and sizes.</text:p>
        </text:list-item>
        <text:list-item>
          <text:p text:style-name="P19"><text:soft-page-break/><text:span text:style-name="Source_20_Text"><text:span text:style-name="T7">head -n 20</text:span></text:span>: You grab just the top 20 papers from the pile.</text:p>
        </text:list-item>
        <text:list-item>
          <text:p text:style-name="P20"><text:span text:style-name="Source_20_Text"><text:span text:style-name="T7">sort</text:span></text:span>: You rearrange those 20 papers so the <text:span text:style-name="T2">biggest file</text:span> is on top.</text:p>
        </text:list-item>
      </text:list>
      <text:p text:style-name="P21"><text:span text:style-name="T2">Quick Tip:</text:span><text:span text:style-name="T1"> In Linux, the </text:span><text:span text:style-name="T2">pipe</text:span><text:span text:style-name="T1"> </text:span><text:span text:style-name="Source_20_Text"><text:span text:style-name="T3">|</text:span></text:span><text:span text:style-name="T1"> is your best friend. It’s how you combine small, simple tools to do really powerful things.</text:span></text:p>
      <text:p text:style-name="P2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10:41:09.061817835</meta:creation-date>
    <dc:date>2026-05-04T11:08:15.833952501</dc:date>
    <meta:editing-duration>PT27M10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9" meta:paragraph-count="141" meta:word-count="926" meta:character-count="4261" meta:non-whitespace-character-count="3513"/>
  </office:meta>
</office:document-meta>
</file>